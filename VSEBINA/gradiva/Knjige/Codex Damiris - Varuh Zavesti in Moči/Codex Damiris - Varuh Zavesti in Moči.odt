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600BBA376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Georgia" svg:font-family="Georgia, serif"/>
    <style:font-face style:name="OpenSymbol" svg:font-family="OpenSymbol, 'Arial Unicode MS'"/>
    <style:font-face style:name="Tahoma1" svg:font-family="Tahoma"/>
    <style:font-face style:name="quote-cjk-patch" svg:font-family="quote-cjk-patch, Inter, system-ui, apple-system, BlinkMacSystemFont, 'Segoe UI', Roboto, Oxygen, Ubuntu, Cantarell, 'Open Sans', 'Helvetica Neue', sans-serif"/>
    <style:font-face style:name="Segoe UI" svg:font-family="'Segoe UI'" style:font-family-generic="swiss"/>
    <style:font-face style:name="Andale Sans UI" svg:font-family="'Andale Sans UI', '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fo:orphans="2" fo:widows="2" fo:break-before="page"/>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P2" style:family="paragraph" style:parent-style-name="Text_20_body">
      <style:paragraph-properties fo:text-align="start" style:justify-single-word="false" fo:orphans="2" fo:widows="2"/>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P3" style:family="paragraph" style:parent-style-name="Text_20_body">
      <style:paragraph-properties fo:text-align="center" style:justify-single-word="false"/>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P4" style:family="paragraph" style:parent-style-name="Text_20_body">
      <style:paragraph-properties fo:text-align="start" style:justify-single-word="false" fo:orphans="2" fo:widows="2"/>
    </style:style>
    <style:style style:name="P5" style:family="paragraph" style:parent-style-name="Text_20_body">
      <style:paragraph-properties fo:text-align="center" style:justify-single-word="false"/>
    </style:style>
    <style:style style:name="P6" style:family="paragraph" style:parent-style-name="Standard">
      <style:paragraph-properties fo:margin-left="0cm" fo:margin-right="1cm" fo:margin-top="0cm" fo:margin-bottom="0.212cm" fo:text-align="center" style:justify-single-word="false" fo:text-indent="0cm"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7" style:family="paragraph" style:parent-style-name="Standard">
      <style:paragraph-properties fo:text-align="center" style:justify-single-word="false"/>
    </style:style>
    <style:style style:name="P8" style:family="paragraph" style:parent-style-name="Text_20_body" style:list-style-name="WW8Num48">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bold"/>
    </style:style>
    <style:style style:name="P9" style:family="paragraph" style:parent-style-name="Text_20_body" style:list-style-name="WW8Num47">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bold"/>
    </style:style>
    <style:style style:name="P10"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Arial" style:font-size-complex="12pt"/>
    </style:style>
    <style:style style:name="P11" style:family="paragraph" style:parent-style-name="Text_20_body">
      <style:paragraph-properties fo:text-align="center" style:justify-single-word="false" fo:orphans="2" fo:widows="2"/>
      <style:text-properties fo:font-variant="normal" fo:text-transform="none" fo:color="#000000" style:font-name="Times New Roman" fo:font-size="12pt" fo:letter-spacing="normal" fo:font-style="normal" fo:font-weight="bold" style:font-size-asian="12pt" style:font-style-asian="normal" style:font-weight-asian="bold" style:font-name-complex="Times New Roman" style:font-size-complex="12pt" style:font-weight-complex="bold"/>
    </style:style>
    <style:style style:name="P12" style:family="paragraph" style:parent-style-name="Text_20_body">
      <style:paragraph-properties fo:text-align="center" style:justify-single-word="false"/>
      <style:text-properties fo:font-variant="normal" fo:text-transform="none" fo:color="#000000" style:font-name="Arial" fo:font-size="14pt" fo:letter-spacing="normal" fo:font-style="normal" fo:font-weight="bold" style:font-size-asian="14pt" style:font-style-asian="normal" style:font-weight-asian="bold" style:font-name-complex="Arial" style:font-size-complex="14pt" style:font-weight-complex="bold"/>
    </style:style>
    <style:style style:name="P13" style:family="paragraph" style:parent-style-name="Text_20_body">
      <style:paragraph-properties fo:text-align="center" style:justify-single-word="false"/>
      <style:text-properties fo:font-variant="normal" fo:text-transform="none" fo:color="#1c1c1c" style:font-name="Georgia" fo:font-size="14pt" fo:letter-spacing="normal" fo:font-style="normal" fo:font-weight="normal" style:font-size-asian="14pt" style:font-style-asian="normal" style:font-weight-asian="normal" style:font-name-complex="Georgia"/>
    </style:style>
    <style:style style:name="P14" style:family="paragraph" style:parent-style-name="Text_20_body">
      <style:paragraph-properties fo:text-align="center" style:justify-single-word="false"/>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P15" style:family="paragraph" style:parent-style-name="Text_20_body">
      <style:paragraph-properties fo:text-align="center" style:justify-single-word="false" fo:orphans="2" fo:widows="2"/>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P16" style:family="paragraph" style:parent-style-name="Text_20_body">
      <style:paragraph-properties fo:text-align="center" style:justify-single-word="false" fo:orphans="2" fo:widows="2"/>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7" style:family="paragraph" style:parent-style-name="Text_20_body">
      <style:paragraph-properties fo:text-align="center" style:justify-single-word="false" fo:orphans="2" fo:widows="2"/>
      <style:text-properties fo:font-variant="normal" fo:text-transform="none" fo:color="#1c1c1c" style:font-name="Times New Roman" fo:font-size="12pt" fo:letter-spacing="normal" fo:font-style="normal" fo:font-weight="normal" style:font-size-asian="12pt" style:font-style-asian="normal" style:font-weight-asian="normal" style:font-name-complex="Georgia" style:font-size-complex="12pt"/>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Text_20_body" style:list-style-name="WW8Num37">
      <style:paragraph-properties fo:text-align="center" style:justify-single-word="false">
        <style:tab-stops>
          <style:tab-stop style:position="1.247cm"/>
        </style:tab-stops>
      </style:paragraph-properties>
    </style:style>
    <style:style style:name="P21" style:family="paragraph" style:parent-style-name="Text_20_body">
      <style:paragraph-properties fo:text-align="center" style:justify-single-word="false"/>
      <style:text-properties style:font-name="Times New Roman" fo:font-size="12pt" style:font-size-asian="12pt" style:font-size-complex="12pt"/>
    </style:style>
    <style:style style:name="P22" style:family="paragraph" style:parent-style-name="Text_20_body">
      <style:paragraph-properties fo:text-align="center" style:justify-single-word="false"/>
      <style:text-properties fo:color="#1c1c1c" fo:font-size="8pt" style:font-size-asian="8pt" style:font-size-complex="8pt"/>
    </style:style>
    <style:style style:name="P23" style:family="paragraph" style:parent-style-name="Text_20_body" style:list-style-name="WW8Num6">
      <style:paragraph-properties fo:margin-left="0.529cm" fo:margin-right="0cm" fo:margin-top="0cm" fo:margin-bottom="0cm" fo:text-align="center" style:justify-single-word="false" fo:orphans="2" fo:widows="2" fo:text-indent="0cm" style:auto-text-indent="false">
        <style:tab-stops>
          <style:tab-stop style:position="0.529cm"/>
        </style:tab-stops>
      </style:paragraph-properties>
    </style:style>
    <style:style style:name="P24" style:family="paragraph" style:parent-style-name="Text_20_body" style:list-style-name="WW8Num6">
      <style:paragraph-properties fo:margin-left="0.529cm" fo:margin-right="0cm" fo:text-align="center" style:justify-single-word="false" fo:orphans="2" fo:widows="2" fo:text-indent="0cm" style:auto-text-indent="false">
        <style:tab-stops>
          <style:tab-stop style:position="0.529cm"/>
        </style:tab-stops>
      </style:paragraph-properties>
    </style:style>
    <style:style style:name="P25" style:family="paragraph" style:parent-style-name="Text_20_body" style:list-style-name="WW8Num7">
      <style:paragraph-properties fo:margin-left="1.247cm" fo:margin-right="0cm" fo:text-align="center" style:justify-single-word="false" fo:text-indent="-0.499cm" style:auto-text-indent="false">
        <style:tab-stops>
          <style:tab-stop style:position="1.247cm"/>
        </style:tab-stops>
      </style:paragraph-properties>
    </style:style>
    <style:style style:name="P26" style:family="paragraph" style:parent-style-name="Text_20_body" style:list-style-name="WW8Num8">
      <style:paragraph-properties fo:margin-left="1.247cm" fo:margin-right="0cm" fo:text-align="center" style:justify-single-word="false" fo:text-indent="-0.499cm" style:auto-text-indent="false">
        <style:tab-stops>
          <style:tab-stop style:position="1.247cm"/>
        </style:tab-stops>
      </style:paragraph-properties>
    </style:style>
    <style:style style:name="P27" style:family="paragraph" style:parent-style-name="Text_20_body" style:list-style-name="WW8Num9">
      <style:paragraph-properties fo:margin-left="1.247cm" fo:margin-right="0cm" fo:text-align="center" style:justify-single-word="false" fo:text-indent="-0.499cm" style:auto-text-indent="false">
        <style:tab-stops>
          <style:tab-stop style:position="1.247cm"/>
        </style:tab-stops>
      </style:paragraph-properties>
    </style:style>
    <style:style style:name="P28" style:family="paragraph" style:parent-style-name="Text_20_body" style:list-style-name="WW8Num10">
      <style:paragraph-properties fo:margin-left="1.247cm" fo:margin-right="0cm" fo:text-align="center" style:justify-single-word="false" fo:text-indent="-0.499cm" style:auto-text-indent="false">
        <style:tab-stops>
          <style:tab-stop style:position="1.247cm"/>
        </style:tab-stops>
      </style:paragraph-properties>
    </style:style>
    <style:style style:name="P29" style:family="paragraph" style:parent-style-name="Text_20_body" style:list-style-name="WW8Num13">
      <style:paragraph-properties fo:margin-left="1.247cm" fo:margin-right="0cm" fo:text-align="center" style:justify-single-word="false" fo:text-indent="-0.499cm" style:auto-text-indent="false">
        <style:tab-stops>
          <style:tab-stop style:position="1.247cm"/>
        </style:tab-stops>
      </style:paragraph-properties>
    </style:style>
    <style:style style:name="P30" style:family="paragraph" style:parent-style-name="Text_20_body" style:list-style-name="WW8Num11">
      <style:paragraph-properties fo:margin-left="1.247cm" fo:margin-right="0cm" fo:text-align="center" style:justify-single-word="false" fo:text-indent="-0.499cm" style:auto-text-indent="false">
        <style:tab-stops>
          <style:tab-stop style:position="1.247cm"/>
        </style:tab-stops>
      </style:paragraph-properties>
    </style:style>
    <style:style style:name="P31" style:family="paragraph" style:parent-style-name="Text_20_body" style:list-style-name="WW8Num12">
      <style:paragraph-properties fo:margin-left="1.247cm" fo:margin-right="0cm" fo:text-align="center" style:justify-single-word="false" fo:text-indent="-0.499cm" style:auto-text-indent="false">
        <style:tab-stops>
          <style:tab-stop style:position="1.247cm"/>
        </style:tab-stops>
      </style:paragraph-properties>
    </style:style>
    <style:style style:name="P32" style:family="paragraph" style:parent-style-name="Text_20_body" style:list-style-name="WW8Num14">
      <style:paragraph-properties fo:margin-left="1.247cm" fo:margin-right="0cm" fo:text-align="center" style:justify-single-word="false" fo:text-indent="-0.499cm" style:auto-text-indent="false">
        <style:tab-stops>
          <style:tab-stop style:position="1.247cm"/>
        </style:tab-stops>
      </style:paragraph-properties>
    </style:style>
    <style:style style:name="P33" style:family="paragraph" style:parent-style-name="Text_20_body" style:list-style-name="WW8Num15">
      <style:paragraph-properties fo:margin-left="1.247cm" fo:margin-right="0cm" fo:text-align="center" style:justify-single-word="false" fo:text-indent="-0.499cm" style:auto-text-indent="false">
        <style:tab-stops>
          <style:tab-stop style:position="1.247cm"/>
        </style:tab-stops>
      </style:paragraph-properties>
    </style:style>
    <style:style style:name="P34" style:family="paragraph" style:parent-style-name="Text_20_body" style:list-style-name="WW8Num16">
      <style:paragraph-properties fo:margin-left="1.247cm" fo:margin-right="0cm" fo:text-align="center" style:justify-single-word="false" fo:text-indent="-0.499cm" style:auto-text-indent="false">
        <style:tab-stops>
          <style:tab-stop style:position="1.247cm"/>
        </style:tab-stops>
      </style:paragraph-properties>
    </style:style>
    <style:style style:name="P35" style:family="paragraph" style:parent-style-name="Text_20_body" style:list-style-name="WW8Num17">
      <style:paragraph-properties fo:margin-left="1.247cm" fo:margin-right="0cm" fo:text-align="center" style:justify-single-word="false" fo:text-indent="-0.499cm" style:auto-text-indent="false">
        <style:tab-stops>
          <style:tab-stop style:position="1.247cm"/>
        </style:tab-stops>
      </style:paragraph-properties>
    </style:style>
    <style:style style:name="P36" style:family="paragraph" style:parent-style-name="Text_20_body" style:list-style-name="WW8Num18">
      <style:paragraph-properties fo:margin-left="1.247cm" fo:margin-right="0cm" fo:text-align="center" style:justify-single-word="false" fo:text-indent="-0.499cm" style:auto-text-indent="false">
        <style:tab-stops>
          <style:tab-stop style:position="1.247cm"/>
        </style:tab-stops>
      </style:paragraph-properties>
    </style:style>
    <style:style style:name="P37" style:family="paragraph" style:parent-style-name="Text_20_body" style:list-style-name="WW8Num19">
      <style:paragraph-properties fo:margin-left="1.247cm" fo:margin-right="0cm" fo:text-align="center" style:justify-single-word="false" fo:text-indent="-0.499cm" style:auto-text-indent="false">
        <style:tab-stops>
          <style:tab-stop style:position="1.247cm"/>
        </style:tab-stops>
      </style:paragraph-properties>
    </style:style>
    <style:style style:name="P38" style:family="paragraph" style:parent-style-name="Text_20_body" style:list-style-name="WW8Num20">
      <style:paragraph-properties fo:margin-left="1.247cm" fo:margin-right="0cm" fo:text-align="center" style:justify-single-word="false" fo:text-indent="-0.499cm" style:auto-text-indent="false">
        <style:tab-stops>
          <style:tab-stop style:position="1.247cm"/>
        </style:tab-stops>
      </style:paragraph-properties>
    </style:style>
    <style:style style:name="P39" style:family="paragraph" style:parent-style-name="Text_20_body" style:list-style-name="WW8Num21">
      <style:paragraph-properties fo:margin-left="1.247cm" fo:margin-right="0cm" fo:text-align="center" style:justify-single-word="false" fo:text-indent="-0.499cm" style:auto-text-indent="false">
        <style:tab-stops>
          <style:tab-stop style:position="1.247cm"/>
        </style:tab-stops>
      </style:paragraph-properties>
    </style:style>
    <style:style style:name="P40" style:family="paragraph" style:parent-style-name="Text_20_body" style:list-style-name="WW8Num22">
      <style:paragraph-properties fo:margin-left="1.247cm" fo:margin-right="0cm" fo:text-align="center" style:justify-single-word="false" fo:text-indent="-0.499cm" style:auto-text-indent="false">
        <style:tab-stops>
          <style:tab-stop style:position="1.247cm"/>
        </style:tab-stops>
      </style:paragraph-properties>
    </style:style>
    <style:style style:name="P41" style:family="paragraph" style:parent-style-name="Text_20_body" style:list-style-name="WW8Num23">
      <style:paragraph-properties fo:margin-left="1.247cm" fo:margin-right="0cm" fo:text-align="center" style:justify-single-word="false" fo:text-indent="-0.499cm" style:auto-text-indent="false">
        <style:tab-stops>
          <style:tab-stop style:position="1.247cm"/>
        </style:tab-stops>
      </style:paragraph-properties>
    </style:style>
    <style:style style:name="P42" style:family="paragraph" style:parent-style-name="Text_20_body" style:list-style-name="WW8Num24">
      <style:paragraph-properties fo:margin-left="1.247cm" fo:margin-right="0cm" fo:text-align="center" style:justify-single-word="false" fo:text-indent="-0.499cm" style:auto-text-indent="false">
        <style:tab-stops>
          <style:tab-stop style:position="1.247cm"/>
        </style:tab-stops>
      </style:paragraph-properties>
    </style:style>
    <style:style style:name="P43" style:family="paragraph" style:parent-style-name="Text_20_body" style:list-style-name="WW8Num25">
      <style:paragraph-properties fo:margin-left="1.247cm" fo:margin-right="0cm" fo:text-align="center" style:justify-single-word="false" fo:text-indent="-0.499cm" style:auto-text-indent="false">
        <style:tab-stops>
          <style:tab-stop style:position="1.247cm"/>
        </style:tab-stops>
      </style:paragraph-properties>
    </style:style>
    <style:style style:name="P44" style:family="paragraph" style:parent-style-name="Text_20_body" style:list-style-name="WW8Num26">
      <style:paragraph-properties fo:margin-left="1.247cm" fo:margin-right="0cm" fo:text-align="center" style:justify-single-word="false" fo:text-indent="-0.499cm" style:auto-text-indent="false">
        <style:tab-stops>
          <style:tab-stop style:position="1.247cm"/>
        </style:tab-stops>
      </style:paragraph-properties>
    </style:style>
    <style:style style:name="P45" style:family="paragraph" style:parent-style-name="Text_20_body" style:list-style-name="WW8Num27">
      <style:paragraph-properties fo:margin-left="1.247cm" fo:margin-right="0cm" fo:text-align="center" style:justify-single-word="false" fo:text-indent="-0.499cm" style:auto-text-indent="false">
        <style:tab-stops>
          <style:tab-stop style:position="1.247cm"/>
        </style:tab-stops>
      </style:paragraph-properties>
    </style:style>
    <style:style style:name="P46" style:family="paragraph" style:parent-style-name="Text_20_body" style:list-style-name="WW8Num28">
      <style:paragraph-properties fo:margin-left="1.247cm" fo:margin-right="0cm" fo:text-align="center" style:justify-single-word="false" fo:text-indent="-0.499cm" style:auto-text-indent="false">
        <style:tab-stops>
          <style:tab-stop style:position="1.247cm"/>
        </style:tab-stops>
      </style:paragraph-properties>
    </style:style>
    <style:style style:name="P47" style:family="paragraph" style:parent-style-name="Text_20_body" style:list-style-name="WW8Num29">
      <style:paragraph-properties fo:margin-left="1.247cm" fo:margin-right="0cm" fo:text-align="center" style:justify-single-word="false" fo:text-indent="-0.499cm" style:auto-text-indent="false">
        <style:tab-stops>
          <style:tab-stop style:position="1.247cm"/>
        </style:tab-stops>
      </style:paragraph-properties>
    </style:style>
    <style:style style:name="P48" style:family="paragraph" style:parent-style-name="Text_20_body" style:list-style-name="WW8Num30">
      <style:paragraph-properties fo:margin-left="1.247cm" fo:margin-right="0cm" fo:text-align="center" style:justify-single-word="false" fo:text-indent="-0.499cm" style:auto-text-indent="false">
        <style:tab-stops>
          <style:tab-stop style:position="1.247cm"/>
        </style:tab-stops>
      </style:paragraph-properties>
    </style:style>
    <style:style style:name="P49" style:family="paragraph" style:parent-style-name="Text_20_body" style:list-style-name="WW8Num31">
      <style:paragraph-properties fo:margin-left="1.247cm" fo:margin-right="0cm" fo:text-align="center" style:justify-single-word="false" fo:text-indent="-0.499cm" style:auto-text-indent="false">
        <style:tab-stops>
          <style:tab-stop style:position="1.247cm"/>
        </style:tab-stops>
      </style:paragraph-properties>
    </style:style>
    <style:style style:name="P50" style:family="paragraph" style:parent-style-name="Text_20_body" style:list-style-name="WW8Num32">
      <style:paragraph-properties fo:margin-left="1.247cm" fo:margin-right="0cm" fo:text-align="center" style:justify-single-word="false" fo:text-indent="-0.499cm" style:auto-text-indent="false">
        <style:tab-stops>
          <style:tab-stop style:position="1.247cm"/>
        </style:tab-stops>
      </style:paragraph-properties>
    </style:style>
    <style:style style:name="P51" style:family="paragraph" style:parent-style-name="Text_20_body" style:list-style-name="WW8Num33">
      <style:paragraph-properties fo:margin-left="1.247cm" fo:margin-right="0cm" fo:text-align="center" style:justify-single-word="false" fo:text-indent="-0.499cm" style:auto-text-indent="false">
        <style:tab-stops>
          <style:tab-stop style:position="1.247cm"/>
        </style:tab-stops>
      </style:paragraph-properties>
    </style:style>
    <style:style style:name="P52" style:family="paragraph" style:parent-style-name="Text_20_body" style:list-style-name="WW8Num34">
      <style:paragraph-properties fo:margin-left="1.247cm" fo:margin-right="0cm" fo:text-align="center" style:justify-single-word="false" fo:text-indent="-0.499cm" style:auto-text-indent="false">
        <style:tab-stops>
          <style:tab-stop style:position="1.247cm"/>
        </style:tab-stops>
      </style:paragraph-properties>
    </style:style>
    <style:style style:name="P53" style:family="paragraph" style:parent-style-name="Text_20_body" style:list-style-name="WW8Num35">
      <style:paragraph-properties fo:margin-left="1.247cm" fo:margin-right="0cm" fo:text-align="center" style:justify-single-word="false" fo:text-indent="-0.499cm" style:auto-text-indent="false">
        <style:tab-stops>
          <style:tab-stop style:position="1.247cm"/>
        </style:tab-stops>
      </style:paragraph-properties>
    </style:style>
    <style:style style:name="P54" style:family="paragraph" style:parent-style-name="Text_20_body" style:list-style-name="WW8Num36">
      <style:paragraph-properties fo:margin-left="1.247cm" fo:margin-right="0cm" fo:text-align="center" style:justify-single-word="false" fo:text-indent="-0.499cm" style:auto-text-indent="false">
        <style:tab-stops>
          <style:tab-stop style:position="1.247cm"/>
        </style:tab-stops>
      </style:paragraph-properties>
    </style:style>
    <style:style style:name="P55" style:family="paragraph" style:parent-style-name="Text_20_body" style:list-style-name="WW8Num37">
      <style:paragraph-properties fo:margin-left="1.247cm" fo:margin-right="0cm" fo:text-align="center" style:justify-single-word="false" fo:text-indent="-0.499cm" style:auto-text-indent="false">
        <style:tab-stops>
          <style:tab-stop style:position="1.247cm"/>
        </style:tab-stops>
      </style:paragraph-properties>
    </style:style>
    <style:style style:name="P56" style:family="paragraph" style:parent-style-name="Text_20_body" style:list-style-name="WW8Num38">
      <style:paragraph-properties fo:margin-left="1.247cm" fo:margin-right="0cm" fo:text-align="center" style:justify-single-word="false" fo:text-indent="-0.499cm" style:auto-text-indent="false">
        <style:tab-stops>
          <style:tab-stop style:position="1.247cm"/>
        </style:tab-stops>
      </style:paragraph-properties>
    </style:style>
    <style:style style:name="P57" style:family="paragraph" style:parent-style-name="Text_20_body" style:list-style-name="WW8Num39">
      <style:paragraph-properties fo:margin-left="1.247cm" fo:margin-right="0cm" fo:text-align="center" style:justify-single-word="false" fo:text-indent="-0.499cm" style:auto-text-indent="false">
        <style:tab-stops>
          <style:tab-stop style:position="1.247cm"/>
        </style:tab-stops>
      </style:paragraph-properties>
    </style:style>
    <style:style style:name="P58" style:family="paragraph" style:parent-style-name="Text_20_body" style:list-style-name="WW8Num40">
      <style:paragraph-properties fo:margin-left="1.247cm" fo:margin-right="0cm" fo:text-align="center" style:justify-single-word="false" fo:text-indent="-0.499cm" style:auto-text-indent="false">
        <style:tab-stops>
          <style:tab-stop style:position="1.247cm"/>
        </style:tab-stops>
      </style:paragraph-properties>
    </style:style>
    <style:style style:name="P59" style:family="paragraph" style:parent-style-name="Text_20_body" style:list-style-name="WW8Num41">
      <style:paragraph-properties fo:margin-left="1.247cm" fo:margin-right="0cm" fo:text-align="center" style:justify-single-word="false" fo:text-indent="-0.499cm" style:auto-text-indent="false">
        <style:tab-stops>
          <style:tab-stop style:position="1.247cm"/>
        </style:tab-stops>
      </style:paragraph-properties>
    </style:style>
    <style:style style:name="P60" style:family="paragraph" style:parent-style-name="Text_20_body" style:list-style-name="WW8Num42">
      <style:paragraph-properties fo:margin-left="1.247cm" fo:margin-right="0cm" fo:text-align="center" style:justify-single-word="false" fo:text-indent="-0.499cm" style:auto-text-indent="false">
        <style:tab-stops>
          <style:tab-stop style:position="1.247cm"/>
        </style:tab-stops>
      </style:paragraph-properties>
    </style:style>
    <style:style style:name="P61" style:family="paragraph" style:parent-style-name="Text_20_body" style:list-style-name="WW8Num43">
      <style:paragraph-properties fo:margin-left="1.247cm" fo:margin-right="0cm" fo:text-align="center" style:justify-single-word="false" fo:text-indent="-0.499cm" style:auto-text-indent="false">
        <style:tab-stops>
          <style:tab-stop style:position="1.247cm"/>
        </style:tab-stops>
      </style:paragraph-properties>
    </style:style>
    <style:style style:name="P62" style:family="paragraph" style:parent-style-name="Text_20_body" style:list-style-name="WW8Num44">
      <style:paragraph-properties fo:margin-left="1.247cm" fo:margin-right="0cm" fo:text-align="center" style:justify-single-word="false" fo:text-indent="-0.499cm" style:auto-text-indent="false">
        <style:tab-stops>
          <style:tab-stop style:position="1.247cm"/>
        </style:tab-stops>
      </style:paragraph-properties>
    </style:style>
    <style:style style:name="P63" style:family="paragraph" style:parent-style-name="Text_20_body" style:list-style-name="WW8Num45">
      <style:paragraph-properties fo:margin-left="1.247cm" fo:margin-right="0cm" fo:text-align="center" style:justify-single-word="false" fo:text-indent="-0.499cm" style:auto-text-indent="false">
        <style:tab-stops>
          <style:tab-stop style:position="1.247cm"/>
        </style:tab-stops>
      </style:paragraph-properties>
    </style:style>
    <style:style style:name="P64" style:family="paragraph" style:parent-style-name="Text_20_body" style:list-style-name="WW8Num46">
      <style:paragraph-properties fo:margin-left="1.247cm" fo:margin-right="0cm" fo:text-align="center" style:justify-single-word="false" fo:text-indent="-0.499cm" style:auto-text-indent="false">
        <style:tab-stops>
          <style:tab-stop style:position="1.247cm"/>
        </style:tab-stops>
      </style:paragraph-properties>
    </style:style>
    <style:style style:name="P65" style:family="paragraph" style:parent-style-name="Text_20_body" style:list-style-name="WW8Num49">
      <style:paragraph-properties fo:margin-left="1.247cm" fo:margin-right="0cm" fo:text-align="center" style:justify-single-word="false" fo:text-indent="-0.499cm" style:auto-text-indent="false">
        <style:tab-stops>
          <style:tab-stop style:position="1.247cm"/>
        </style:tab-stops>
      </style:paragraph-properties>
    </style:style>
    <style:style style:name="P66" style:family="paragraph" style:parent-style-name="Text_20_body" style:list-style-name="WW8Num50">
      <style:paragraph-properties fo:margin-left="1.247cm" fo:margin-right="0cm" fo:text-align="center" style:justify-single-word="false" fo:text-indent="-0.499cm" style:auto-text-indent="false">
        <style:tab-stops>
          <style:tab-stop style:position="1.247cm"/>
        </style:tab-stops>
      </style:paragraph-properties>
    </style:style>
    <style:style style:name="P67" style:family="paragraph" style:parent-style-name="Text_20_body" style:list-style-name="WW8Num51">
      <style:paragraph-properties fo:margin-left="1.247cm" fo:margin-right="0cm" fo:text-align="center" style:justify-single-word="false" fo:text-indent="-0.499cm" style:auto-text-indent="false">
        <style:tab-stops>
          <style:tab-stop style:position="1.247cm"/>
        </style:tab-stops>
      </style:paragraph-properties>
    </style:style>
    <style:style style:name="P68" style:family="paragraph" style:parent-style-name="Text_20_body" style:list-style-name="WW8Num52">
      <style:paragraph-properties fo:margin-left="1.247cm" fo:margin-right="0cm" fo:text-align="center" style:justify-single-word="false" fo:text-indent="-0.499cm" style:auto-text-indent="false">
        <style:tab-stops>
          <style:tab-stop style:position="1.247cm"/>
        </style:tab-stops>
      </style:paragraph-properties>
    </style:style>
    <style:style style:name="P69" style:family="paragraph" style:parent-style-name="Text_20_body" style:list-style-name="WW8Num53">
      <style:paragraph-properties fo:margin-left="1.247cm" fo:margin-right="0cm" fo:text-align="center" style:justify-single-word="false" fo:text-indent="-0.499cm" style:auto-text-indent="false">
        <style:tab-stops>
          <style:tab-stop style:position="1.247cm"/>
        </style:tab-stops>
      </style:paragraph-properties>
    </style:style>
    <style:style style:name="P70" style:family="paragraph" style:parent-style-name="Text_20_body" style:list-style-name="WW8Num54">
      <style:paragraph-properties fo:margin-left="1.247cm" fo:margin-right="0cm" fo:text-align="center" style:justify-single-word="false" fo:text-indent="-0.499cm" style:auto-text-indent="false">
        <style:tab-stops>
          <style:tab-stop style:position="1.247cm"/>
        </style:tab-stops>
      </style:paragraph-properties>
    </style:style>
    <style:style style:name="P71" style:family="paragraph" style:parent-style-name="Text_20_body" style:list-style-name="WW8Num55">
      <style:paragraph-properties fo:margin-left="1.247cm" fo:margin-right="0cm" fo:text-align="center" style:justify-single-word="false" fo:text-indent="-0.499cm" style:auto-text-indent="false">
        <style:tab-stops>
          <style:tab-stop style:position="1.247cm"/>
        </style:tab-stops>
      </style:paragraph-properties>
    </style:style>
    <style:style style:name="P72" style:family="paragraph" style:parent-style-name="Text_20_body" style:list-style-name="WW8Num56">
      <style:paragraph-properties fo:margin-left="1.247cm" fo:margin-right="0cm" fo:text-align="center" style:justify-single-word="false" fo:text-indent="-0.499cm" style:auto-text-indent="false">
        <style:tab-stops>
          <style:tab-stop style:position="1.247cm"/>
        </style:tab-stops>
      </style:paragraph-properties>
    </style:style>
    <style:style style:name="P73" style:family="paragraph" style:parent-style-name="Text_20_body" style:list-style-name="WW8Num57">
      <style:paragraph-properties fo:margin-left="1.247cm" fo:margin-right="0cm" fo:text-align="center" style:justify-single-word="false" fo:text-indent="-0.499cm" style:auto-text-indent="false">
        <style:tab-stops>
          <style:tab-stop style:position="1.247cm"/>
        </style:tab-stops>
      </style:paragraph-properties>
    </style:style>
    <style:style style:name="P74" style:family="paragraph" style:parent-style-name="Text_20_body" style:list-style-name="WW8Num2">
      <style:paragraph-properties fo:margin-left="1.247cm" fo:margin-right="0cm" fo:text-align="center" style:justify-single-word="false" fo:text-indent="-0.499cm" style:auto-text-indent="false">
        <style:tab-stops>
          <style:tab-stop style:position="1.247cm"/>
        </style:tab-stops>
      </style:paragraph-properties>
    </style:style>
    <style:style style:name="P75" style:family="paragraph" style:parent-style-name="Text_20_body" style:list-style-name="WW8Num3">
      <style:paragraph-properties fo:margin-left="1.247cm" fo:margin-right="0cm" fo:text-align="center" style:justify-single-word="false" fo:text-indent="-0.499cm" style:auto-text-indent="false">
        <style:tab-stops>
          <style:tab-stop style:position="1.247cm"/>
        </style:tab-stops>
      </style:paragraph-properties>
    </style:style>
    <style:style style:name="P76" style:family="paragraph" style:parent-style-name="Text_20_body" style:list-style-name="WW8Num4">
      <style:paragraph-properties fo:margin-left="1.247cm" fo:margin-right="0cm" fo:text-align="center" style:justify-single-word="false" fo:text-indent="-0.499cm" style:auto-text-indent="false">
        <style:tab-stops>
          <style:tab-stop style:position="1.247cm"/>
        </style:tab-stops>
      </style:paragraph-properties>
    </style:style>
    <style:style style:name="P77" style:family="paragraph" style:parent-style-name="Text_20_body" style:list-style-name="WW8Num5">
      <style:paragraph-properties fo:margin-left="1.247cm" fo:margin-right="0cm" fo:text-align="center" style:justify-single-word="false" fo:text-indent="-0.499cm" style:auto-text-indent="false">
        <style:tab-stops>
          <style:tab-stop style:position="1.247cm"/>
        </style:tab-stops>
      </style:paragraph-properties>
    </style:style>
    <style:style style:name="P78" style:family="paragraph" style:parent-style-name="Text_20_body" style:list-style-name="WW8Num6">
      <style:paragraph-properties fo:margin-left="1.247cm" fo:margin-right="0cm" fo:text-align="center" style:justify-single-word="false" fo:text-indent="-0.499cm" style:auto-text-indent="false">
        <style:tab-stops>
          <style:tab-stop style:position="1.247cm"/>
        </style:tab-stops>
      </style:paragraph-properties>
    </style:style>
    <style:style style:name="P79" style:family="paragraph" style:parent-style-name="Text_20_body" style:list-style-name="WW8Num58">
      <style:paragraph-properties fo:margin-left="1.247cm" fo:margin-right="0cm" fo:text-align="center" style:justify-single-word="false" fo:text-indent="-0.499cm" style:auto-text-indent="false">
        <style:tab-stops>
          <style:tab-stop style:position="0cm"/>
        </style:tab-stops>
      </style:paragraph-properties>
    </style:style>
    <style:style style:name="P80" style:family="paragraph" style:parent-style-name="Text_20_body" style:list-style-name="WW8Num59">
      <style:paragraph-properties fo:margin-left="1.247cm" fo:margin-right="0cm" fo:text-align="center" style:justify-single-word="false" fo:text-indent="-0.499cm" style:auto-text-indent="false">
        <style:tab-stops>
          <style:tab-stop style:position="0cm"/>
        </style:tab-stops>
      </style:paragraph-properties>
    </style:style>
    <style:style style:name="P81" style:family="paragraph" style:parent-style-name="Text_20_body" style:list-style-name="WW8Num60">
      <style:paragraph-properties fo:margin-left="1.247cm" fo:margin-right="0cm" fo:text-align="center" style:justify-single-word="false" fo:text-indent="-0.499cm" style:auto-text-indent="false">
        <style:tab-stops>
          <style:tab-stop style:position="0cm"/>
        </style:tab-stops>
      </style:paragraph-properties>
    </style:style>
    <style:style style:name="P82" style:family="paragraph" style:parent-style-name="Text_20_body" style:list-style-name="WW8Num61">
      <style:paragraph-properties fo:margin-left="1.247cm" fo:margin-right="0cm" fo:text-align="center" style:justify-single-word="false" fo:text-indent="-0.499cm" style:auto-text-indent="false">
        <style:tab-stops>
          <style:tab-stop style:position="0cm"/>
        </style:tab-stops>
      </style:paragraph-properties>
    </style:style>
    <style:style style:name="P83" style:family="paragraph" style:parent-style-name="Text_20_body" style:list-style-name="WW8Num62">
      <style:paragraph-properties fo:margin-left="1.247cm" fo:margin-right="0cm" fo:text-align="center" style:justify-single-word="false" fo:text-indent="-0.499cm" style:auto-text-indent="false">
        <style:tab-stops>
          <style:tab-stop style:position="0cm"/>
        </style:tab-stops>
      </style:paragraph-properties>
    </style:style>
    <style:style style:name="P84" style:family="paragraph" style:parent-style-name="Text_20_body" style:list-style-name="WW8Num63">
      <style:paragraph-properties fo:margin-left="1.247cm" fo:margin-right="0cm" fo:text-align="center" style:justify-single-word="false" fo:text-indent="-0.499cm" style:auto-text-indent="false">
        <style:tab-stops>
          <style:tab-stop style:position="0cm"/>
        </style:tab-stops>
      </style:paragraph-properties>
    </style:style>
    <style:style style:name="P85" style:family="paragraph" style:parent-style-name="Text_20_body" style:list-style-name="WW8Num64">
      <style:paragraph-properties fo:margin-left="1.247cm" fo:margin-right="0cm" fo:text-align="center" style:justify-single-word="false" fo:text-indent="-0.499cm" style:auto-text-indent="false">
        <style:tab-stops>
          <style:tab-stop style:position="0cm"/>
        </style:tab-stops>
      </style:paragraph-properties>
    </style:style>
    <style:style style:name="P86" style:family="paragraph" style:parent-style-name="Text_20_body" style:list-style-name="WW8Num65">
      <style:paragraph-properties fo:margin-left="1.247cm" fo:margin-right="0cm" fo:text-align="center" style:justify-single-word="false" fo:text-indent="-0.499cm" style:auto-text-indent="false">
        <style:tab-stops>
          <style:tab-stop style:position="0cm"/>
        </style:tab-stops>
      </style:paragraph-properties>
    </style:style>
    <style:style style:name="P87" style:family="paragraph" style:parent-style-name="Text_20_body" style:list-style-name="WW8Num66">
      <style:paragraph-properties fo:margin-left="1.247cm" fo:margin-right="0cm" fo:text-align="center" style:justify-single-word="false" fo:text-indent="-0.499cm" style:auto-text-indent="false">
        <style:tab-stops>
          <style:tab-stop style:position="0cm"/>
        </style:tab-stops>
      </style:paragraph-properties>
    </style:style>
    <style:style style:name="P88" style:family="paragraph" style:parent-style-name="Text_20_body" style:list-style-name="WW8Num67">
      <style:paragraph-properties fo:margin-left="1.247cm" fo:margin-right="0cm" fo:text-align="center" style:justify-single-word="false" fo:text-indent="-0.499cm" style:auto-text-indent="false">
        <style:tab-stops>
          <style:tab-stop style:position="0cm"/>
        </style:tab-stops>
      </style:paragraph-properties>
    </style:style>
    <style:style style:name="P89" style:family="paragraph" style:parent-style-name="Text_20_body" style:list-style-name="WW8Num68">
      <style:paragraph-properties fo:margin-left="1.247cm" fo:margin-right="0cm" fo:text-align="center" style:justify-single-word="false" fo:text-indent="-0.499cm" style:auto-text-indent="false">
        <style:tab-stops>
          <style:tab-stop style:position="0cm"/>
        </style:tab-stops>
      </style:paragraph-properties>
    </style:style>
    <style:style style:name="P90" style:family="paragraph" style:parent-style-name="Text_20_body" style:list-style-name="WW8Num69">
      <style:paragraph-properties fo:margin-left="1.247cm" fo:margin-right="0cm" fo:text-align="center" style:justify-single-word="false" fo:text-indent="-0.499cm" style:auto-text-indent="false">
        <style:tab-stops>
          <style:tab-stop style:position="0cm"/>
        </style:tab-stops>
      </style:paragraph-properties>
    </style:style>
    <style:style style:name="P91" style:family="paragraph" style:parent-style-name="Text_20_body" style:list-style-name="WW8Num70">
      <style:paragraph-properties fo:margin-left="1.247cm" fo:margin-right="0cm" fo:text-align="center" style:justify-single-word="false" fo:text-indent="-0.499cm" style:auto-text-indent="false">
        <style:tab-stops>
          <style:tab-stop style:position="0cm"/>
        </style:tab-stops>
      </style:paragraph-properties>
    </style:style>
    <style:style style:name="P92" style:family="paragraph" style:parent-style-name="Text_20_body" style:list-style-name="WW8Num71">
      <style:paragraph-properties fo:margin-left="1.247cm" fo:margin-right="0cm" fo:text-align="center" style:justify-single-word="false" fo:text-indent="-0.499cm" style:auto-text-indent="false">
        <style:tab-stops>
          <style:tab-stop style:position="0cm"/>
        </style:tab-stops>
      </style:paragraph-properties>
    </style:style>
    <style:style style:name="P93" style:family="paragraph" style:parent-style-name="Text_20_body" style:list-style-name="WW8Num72">
      <style:paragraph-properties fo:margin-left="1.247cm" fo:margin-right="0cm" fo:text-align="center" style:justify-single-word="false" fo:text-indent="-0.499cm" style:auto-text-indent="false">
        <style:tab-stops>
          <style:tab-stop style:position="0cm"/>
        </style:tab-stops>
      </style:paragraph-properties>
    </style:style>
    <style:style style:name="P94" style:family="paragraph" style:parent-style-name="Text_20_body" style:list-style-name="WW8Num73">
      <style:paragraph-properties fo:margin-left="1.247cm" fo:margin-right="0cm" fo:text-align="center" style:justify-single-word="false" fo:text-indent="-0.499cm" style:auto-text-indent="false">
        <style:tab-stops>
          <style:tab-stop style:position="0cm"/>
        </style:tab-stops>
      </style:paragraph-properties>
    </style:style>
    <style:style style:name="P95" style:family="paragraph" style:parent-style-name="Text_20_body" style:list-style-name="WW8Num74">
      <style:paragraph-properties fo:margin-left="1.247cm" fo:margin-right="0cm" fo:text-align="center" style:justify-single-word="false" fo:text-indent="-0.499cm" style:auto-text-indent="false">
        <style:tab-stops>
          <style:tab-stop style:position="0cm"/>
        </style:tab-stops>
      </style:paragraph-properties>
    </style:style>
    <style:style style:name="P96" style:family="paragraph" style:parent-style-name="Text_20_body" style:list-style-name="WW8Num75">
      <style:paragraph-properties fo:margin-left="1.247cm" fo:margin-right="0cm" fo:text-align="center" style:justify-single-word="false" fo:text-indent="-0.499cm" style:auto-text-indent="false">
        <style:tab-stops>
          <style:tab-stop style:position="0cm"/>
        </style:tab-stops>
      </style:paragraph-properties>
    </style:style>
    <style:style style:name="P97" style:family="paragraph" style:parent-style-name="Text_20_body" style:list-style-name="WW8Num76">
      <style:paragraph-properties fo:margin-left="1.247cm" fo:margin-right="0cm" fo:text-align="center" style:justify-single-word="false" fo:text-indent="-0.499cm" style:auto-text-indent="false">
        <style:tab-stops>
          <style:tab-stop style:position="0cm"/>
        </style:tab-stops>
      </style:paragraph-properties>
    </style:style>
    <style:style style:name="P98" style:family="paragraph" style:parent-style-name="Text_20_body" style:list-style-name="WW8Num77">
      <style:paragraph-properties fo:margin-left="1.247cm" fo:margin-right="0cm" fo:text-align="center" style:justify-single-word="false" fo:text-indent="-0.499cm" style:auto-text-indent="false">
        <style:tab-stops>
          <style:tab-stop style:position="0cm"/>
        </style:tab-stops>
      </style:paragraph-properties>
    </style:style>
    <style:style style:name="P99" style:family="paragraph" style:parent-style-name="Text_20_body" style:list-style-name="WW8Num78">
      <style:paragraph-properties fo:margin-left="1.247cm" fo:margin-right="0cm" fo:text-align="center" style:justify-single-word="false" fo:text-indent="-0.499cm" style:auto-text-indent="false">
        <style:tab-stops>
          <style:tab-stop style:position="0cm"/>
        </style:tab-stops>
      </style:paragraph-properties>
    </style:style>
    <style:style style:name="P100" style:family="paragraph" style:parent-style-name="Text_20_body" style:list-style-name="WW8Num79">
      <style:paragraph-properties fo:margin-left="1.247cm" fo:margin-right="0cm" fo:text-align="center" style:justify-single-word="false" fo:text-indent="-0.499cm" style:auto-text-indent="false">
        <style:tab-stops>
          <style:tab-stop style:position="0cm"/>
        </style:tab-stops>
      </style:paragraph-properties>
    </style:style>
    <style:style style:name="P101" style:family="paragraph" style:parent-style-name="Text_20_body" style:list-style-name="WW8Num80">
      <style:paragraph-properties fo:margin-left="1.247cm" fo:margin-right="0cm" fo:text-align="center" style:justify-single-word="false" fo:text-indent="-0.499cm" style:auto-text-indent="false">
        <style:tab-stops>
          <style:tab-stop style:position="0cm"/>
        </style:tab-stops>
      </style:paragraph-properties>
    </style:style>
    <style:style style:name="P102" style:family="paragraph" style:parent-style-name="Text_20_body" style:list-style-name="WW8Num81">
      <style:paragraph-properties fo:margin-left="1.247cm" fo:margin-right="0cm" fo:text-align="center" style:justify-single-word="false" fo:text-indent="-0.499cm" style:auto-text-indent="false">
        <style:tab-stops>
          <style:tab-stop style:position="0cm"/>
        </style:tab-stops>
      </style:paragraph-properties>
    </style:style>
    <style:style style:name="P103" style:family="paragraph" style:parent-style-name="Text_20_body" style:list-style-name="WW8Num82">
      <style:paragraph-properties fo:margin-left="1.247cm" fo:margin-right="0cm" fo:text-align="center" style:justify-single-word="false" fo:text-indent="-0.499cm" style:auto-text-indent="false">
        <style:tab-stops>
          <style:tab-stop style:position="0cm"/>
        </style:tab-stops>
      </style:paragraph-properties>
    </style:style>
    <style:style style:name="P104" style:family="paragraph" style:parent-style-name="Text_20_body" style:list-style-name="WW8Num83">
      <style:paragraph-properties fo:margin-left="1.247cm" fo:margin-right="0cm" fo:text-align="center" style:justify-single-word="false" fo:text-indent="-0.499cm" style:auto-text-indent="false">
        <style:tab-stops>
          <style:tab-stop style:position="0cm"/>
        </style:tab-stops>
      </style:paragraph-properties>
    </style:style>
    <style:style style:name="P105" style:family="paragraph" style:parent-style-name="Text_20_body" style:list-style-name="WW8Num84">
      <style:paragraph-properties fo:margin-left="1.247cm" fo:margin-right="0cm" fo:text-align="center" style:justify-single-word="false" fo:text-indent="-0.499cm" style:auto-text-indent="false">
        <style:tab-stops>
          <style:tab-stop style:position="0cm"/>
        </style:tab-stops>
      </style:paragraph-properties>
    </style:style>
    <style:style style:name="P106" style:family="paragraph" style:parent-style-name="Text_20_body" style:list-style-name="WW8Num85">
      <style:paragraph-properties fo:margin-left="1.247cm" fo:margin-right="0cm" fo:text-align="center" style:justify-single-word="false" fo:text-indent="-0.499cm" style:auto-text-indent="false">
        <style:tab-stops>
          <style:tab-stop style:position="0cm"/>
        </style:tab-stops>
      </style:paragraph-properties>
    </style:style>
    <style:style style:name="P107" style:family="paragraph" style:parent-style-name="Text_20_body" style:list-style-name="WW8Num86">
      <style:paragraph-properties fo:margin-left="1.247cm" fo:margin-right="0cm" fo:text-align="center" style:justify-single-word="false" fo:text-indent="-0.499cm" style:auto-text-indent="false">
        <style:tab-stops>
          <style:tab-stop style:position="0cm"/>
        </style:tab-stops>
      </style:paragraph-properties>
    </style:style>
    <style:style style:name="P108" style:family="paragraph" style:parent-style-name="Text_20_body" style:list-style-name="WW8Num87">
      <style:paragraph-properties fo:margin-left="1.247cm" fo:margin-right="0cm" fo:text-align="center" style:justify-single-word="false" fo:text-indent="-0.499cm" style:auto-text-indent="false">
        <style:tab-stops>
          <style:tab-stop style:position="0cm"/>
        </style:tab-stops>
      </style:paragraph-properties>
    </style:style>
    <style:style style:name="P109" style:family="paragraph" style:parent-style-name="Text_20_body" style:list-style-name="WW8Num88">
      <style:paragraph-properties fo:margin-left="1.247cm" fo:margin-right="0cm" fo:text-align="center" style:justify-single-word="false" fo:text-indent="-0.499cm" style:auto-text-indent="false">
        <style:tab-stops>
          <style:tab-stop style:position="0cm"/>
        </style:tab-stops>
      </style:paragraph-properties>
    </style:style>
    <style:style style:name="P110" style:family="paragraph" style:parent-style-name="Text_20_body" style:list-style-name="WW8Num89">
      <style:paragraph-properties fo:margin-left="1.247cm" fo:margin-right="0cm" fo:text-align="center" style:justify-single-word="false" fo:text-indent="-0.499cm" style:auto-text-indent="false">
        <style:tab-stops>
          <style:tab-stop style:position="0cm"/>
        </style:tab-stops>
      </style:paragraph-properties>
    </style:style>
    <style:style style:name="P111" style:family="paragraph" style:parent-style-name="Text_20_body" style:list-style-name="WW8Num90">
      <style:paragraph-properties fo:margin-left="1.247cm" fo:margin-right="0cm" fo:text-align="center" style:justify-single-word="false" fo:text-indent="-0.499cm" style:auto-text-indent="false">
        <style:tab-stops>
          <style:tab-stop style:position="0cm"/>
        </style:tab-stops>
      </style:paragraph-properties>
    </style:style>
    <style:style style:name="P112" style:family="paragraph" style:parent-style-name="Text_20_body" style:list-style-name="WW8Num91">
      <style:paragraph-properties fo:margin-left="1.247cm" fo:margin-right="0cm" fo:text-align="center" style:justify-single-word="false" fo:text-indent="-0.499cm" style:auto-text-indent="false">
        <style:tab-stops>
          <style:tab-stop style:position="0cm"/>
        </style:tab-stops>
      </style:paragraph-properties>
    </style:style>
    <style:style style:name="P113" style:family="paragraph" style:parent-style-name="Text_20_body" style:list-style-name="WW8Num92">
      <style:paragraph-properties fo:margin-left="1.247cm" fo:margin-right="0cm" fo:text-align="center" style:justify-single-word="false" fo:text-indent="-0.499cm" style:auto-text-indent="false">
        <style:tab-stops>
          <style:tab-stop style:position="0cm"/>
        </style:tab-stops>
      </style:paragraph-properties>
    </style:style>
    <style:style style:name="P114" style:family="paragraph" style:parent-style-name="Text_20_body" style:list-style-name="WW8Num93">
      <style:paragraph-properties fo:margin-left="1.247cm" fo:margin-right="0cm" fo:text-align="center" style:justify-single-word="false" fo:text-indent="-0.499cm" style:auto-text-indent="false">
        <style:tab-stops>
          <style:tab-stop style:position="0cm"/>
        </style:tab-stops>
      </style:paragraph-properties>
    </style:style>
    <style:style style:name="P115" style:family="paragraph" style:parent-style-name="Text_20_body" style:list-style-name="WW8Num94">
      <style:paragraph-properties fo:margin-left="1.247cm" fo:margin-right="0cm" fo:text-align="center" style:justify-single-word="false" fo:text-indent="-0.499cm" style:auto-text-indent="false">
        <style:tab-stops>
          <style:tab-stop style:position="0cm"/>
        </style:tab-stops>
      </style:paragraph-properties>
    </style:style>
    <style:style style:name="P116" style:family="paragraph" style:parent-style-name="Text_20_body" style:list-style-name="WW8Num95">
      <style:paragraph-properties fo:margin-left="1.247cm" fo:margin-right="0cm" fo:text-align="center" style:justify-single-word="false" fo:text-indent="-0.499cm" style:auto-text-indent="false">
        <style:tab-stops>
          <style:tab-stop style:position="0cm"/>
        </style:tab-stops>
      </style:paragraph-properties>
    </style:style>
    <style:style style:name="P117" style:family="paragraph" style:parent-style-name="Text_20_body" style:list-style-name="WW8Num96">
      <style:paragraph-properties fo:margin-left="1.247cm" fo:margin-right="0cm" fo:text-align="center" style:justify-single-word="false" fo:text-indent="-0.499cm" style:auto-text-indent="false">
        <style:tab-stops>
          <style:tab-stop style:position="0cm"/>
        </style:tab-stops>
      </style:paragraph-properties>
    </style:style>
    <style:style style:name="P118" style:family="paragraph" style:parent-style-name="Text_20_body" style:list-style-name="WW8Num97">
      <style:paragraph-properties fo:margin-left="1.247cm" fo:margin-right="0cm" fo:text-align="center" style:justify-single-word="false" fo:text-indent="-0.499cm" style:auto-text-indent="false">
        <style:tab-stops>
          <style:tab-stop style:position="0cm"/>
        </style:tab-stops>
      </style:paragraph-properties>
    </style:style>
    <style:style style:name="P119" style:family="paragraph" style:parent-style-name="Text_20_body" style:list-style-name="WW8Num98">
      <style:paragraph-properties fo:margin-left="1.247cm" fo:margin-right="0cm" fo:text-align="center" style:justify-single-word="false" fo:text-indent="-0.499cm" style:auto-text-indent="false">
        <style:tab-stops>
          <style:tab-stop style:position="0cm"/>
        </style:tab-stops>
      </style:paragraph-properties>
    </style:style>
    <style:style style:name="P120" style:family="paragraph" style:parent-style-name="Text_20_body" style:list-style-name="WW8Num99">
      <style:paragraph-properties fo:margin-left="1.247cm" fo:margin-right="0cm" fo:text-align="center" style:justify-single-word="false" fo:text-indent="-0.499cm" style:auto-text-indent="false">
        <style:tab-stops>
          <style:tab-stop style:position="0cm"/>
        </style:tab-stops>
      </style:paragraph-properties>
    </style:style>
    <style:style style:name="P121" style:family="paragraph" style:parent-style-name="Text_20_body" style:list-style-name="WW8Num100">
      <style:paragraph-properties fo:margin-left="1.247cm" fo:margin-right="0cm" fo:text-align="center" style:justify-single-word="false" fo:text-indent="-0.499cm" style:auto-text-indent="false">
        <style:tab-stops>
          <style:tab-stop style:position="0cm"/>
        </style:tab-stops>
      </style:paragraph-properties>
    </style:style>
    <style:style style:name="P122" style:family="paragraph" style:parent-style-name="Text_20_body" style:list-style-name="WW8Num101">
      <style:paragraph-properties fo:margin-left="1.247cm" fo:margin-right="0cm" fo:text-align="center" style:justify-single-word="false" fo:text-indent="-0.499cm" style:auto-text-indent="false">
        <style:tab-stops>
          <style:tab-stop style:position="0cm"/>
        </style:tab-stops>
      </style:paragraph-properties>
    </style:style>
    <style:style style:name="P123" style:family="paragraph" style:parent-style-name="Text_20_body" style:list-style-name="WW8Num102">
      <style:paragraph-properties fo:margin-left="1.247cm" fo:margin-right="0cm" fo:text-align="center" style:justify-single-word="false" fo:text-indent="-0.499cm" style:auto-text-indent="false">
        <style:tab-stops>
          <style:tab-stop style:position="0cm"/>
        </style:tab-stops>
      </style:paragraph-properties>
    </style:style>
    <style:style style:name="P124" style:family="paragraph" style:parent-style-name="Text_20_body" style:list-style-name="WW8Num103">
      <style:paragraph-properties fo:margin-left="1.247cm" fo:margin-right="0cm" fo:text-align="center" style:justify-single-word="false" fo:text-indent="-0.499cm" style:auto-text-indent="false">
        <style:tab-stops>
          <style:tab-stop style:position="0cm"/>
        </style:tab-stops>
      </style:paragraph-properties>
    </style:style>
    <style:style style:name="P125" style:family="paragraph" style:parent-style-name="Text_20_body" style:list-style-name="WW8Num104">
      <style:paragraph-properties fo:margin-left="1.247cm" fo:margin-right="0cm" fo:text-align="center" style:justify-single-word="false" fo:text-indent="-0.499cm" style:auto-text-indent="false">
        <style:tab-stops>
          <style:tab-stop style:position="0cm"/>
        </style:tab-stops>
      </style:paragraph-properties>
    </style:style>
    <style:style style:name="P126" style:family="paragraph" style:parent-style-name="Text_20_body" style:list-style-name="WW8Num105">
      <style:paragraph-properties fo:margin-left="1.247cm" fo:margin-right="0cm" fo:text-align="center" style:justify-single-word="false" fo:text-indent="-0.499cm" style:auto-text-indent="false">
        <style:tab-stops>
          <style:tab-stop style:position="0cm"/>
        </style:tab-stops>
      </style:paragraph-properties>
    </style:style>
    <style:style style:name="P127" style:family="paragraph" style:parent-style-name="Text_20_body" style:list-style-name="WW8Num106">
      <style:paragraph-properties fo:margin-left="1.247cm" fo:margin-right="0cm" fo:text-align="center" style:justify-single-word="false" fo:text-indent="-0.499cm" style:auto-text-indent="false">
        <style:tab-stops>
          <style:tab-stop style:position="0cm"/>
        </style:tab-stops>
      </style:paragraph-properties>
    </style:style>
    <style:style style:name="P128" style:family="paragraph" style:parent-style-name="Text_20_body" style:list-style-name="WW8Num107">
      <style:paragraph-properties fo:margin-left="1.247cm" fo:margin-right="0cm" fo:text-align="center" style:justify-single-word="false" fo:text-indent="-0.499cm" style:auto-text-indent="false">
        <style:tab-stops>
          <style:tab-stop style:position="0cm"/>
        </style:tab-stops>
      </style:paragraph-properties>
    </style:style>
    <style:style style:name="P129" style:family="paragraph" style:parent-style-name="Text_20_body" style:list-style-name="WW8Num108">
      <style:paragraph-properties fo:margin-left="1.247cm" fo:margin-right="0cm" fo:text-align="center" style:justify-single-word="false" fo:text-indent="-0.499cm" style:auto-text-indent="false">
        <style:tab-stops>
          <style:tab-stop style:position="0cm"/>
        </style:tab-stops>
      </style:paragraph-properties>
    </style:style>
    <style:style style:name="P130" style:family="paragraph" style:parent-style-name="Text_20_body" style:list-style-name="WW8Num109">
      <style:paragraph-properties fo:margin-left="1.247cm" fo:margin-right="0cm" fo:text-align="center" style:justify-single-word="false" fo:text-indent="-0.499cm" style:auto-text-indent="false">
        <style:tab-stops>
          <style:tab-stop style:position="0cm"/>
        </style:tab-stops>
      </style:paragraph-properties>
    </style:style>
    <style:style style:name="P131" style:family="paragraph" style:parent-style-name="Text_20_body" style:list-style-name="WW8Num110">
      <style:paragraph-properties fo:margin-left="1.247cm" fo:margin-right="0cm" fo:text-align="center" style:justify-single-word="false" fo:text-indent="-0.499cm" style:auto-text-indent="false">
        <style:tab-stops>
          <style:tab-stop style:position="0cm"/>
        </style:tab-stops>
      </style:paragraph-properties>
    </style:style>
    <style:style style:name="P132" style:family="paragraph" style:parent-style-name="Text_20_body" style:list-style-name="WW8Num111">
      <style:paragraph-properties fo:margin-left="1.247cm" fo:margin-right="0cm" fo:text-align="center" style:justify-single-word="false" fo:text-indent="-0.499cm" style:auto-text-indent="false">
        <style:tab-stops>
          <style:tab-stop style:position="0cm"/>
        </style:tab-stops>
      </style:paragraph-properties>
    </style:style>
    <style:style style:name="P133" style:family="paragraph" style:parent-style-name="Text_20_body" style:list-style-name="WW8Num112">
      <style:paragraph-properties fo:margin-left="1.247cm" fo:margin-right="0cm" fo:text-align="center" style:justify-single-word="false" fo:text-indent="-0.499cm" style:auto-text-indent="false">
        <style:tab-stops>
          <style:tab-stop style:position="0cm"/>
        </style:tab-stops>
      </style:paragraph-properties>
    </style:style>
    <style:style style:name="P134" style:family="paragraph" style:parent-style-name="Text_20_body" style:list-style-name="WW8Num113">
      <style:paragraph-properties fo:margin-left="1.247cm" fo:margin-right="0cm" fo:text-align="center" style:justify-single-word="false" fo:text-indent="-0.499cm" style:auto-text-indent="false">
        <style:tab-stops>
          <style:tab-stop style:position="0cm"/>
        </style:tab-stops>
      </style:paragraph-properties>
    </style:style>
    <style:style style:name="P135" style:family="paragraph" style:parent-style-name="Text_20_body" style:list-style-name="WW8Num114">
      <style:paragraph-properties fo:margin-left="1.247cm" fo:margin-right="0cm" fo:text-align="center" style:justify-single-word="false" fo:text-indent="-0.499cm" style:auto-text-indent="false">
        <style:tab-stops>
          <style:tab-stop style:position="0cm"/>
        </style:tab-stops>
      </style:paragraph-properties>
    </style:style>
    <style:style style:name="P136" style:family="paragraph" style:parent-style-name="Text_20_body" style:list-style-name="WW8Num115">
      <style:paragraph-properties fo:margin-left="1.247cm" fo:margin-right="0cm" fo:text-align="center" style:justify-single-word="false" fo:text-indent="-0.499cm" style:auto-text-indent="false">
        <style:tab-stops>
          <style:tab-stop style:position="0cm"/>
        </style:tab-stops>
      </style:paragraph-properties>
    </style:style>
    <style:style style:name="P137" style:family="paragraph" style:parent-style-name="Text_20_body" style:list-style-name="WW8Num116">
      <style:paragraph-properties fo:margin-left="1.247cm" fo:margin-right="0cm" fo:text-align="center" style:justify-single-word="false" fo:text-indent="-0.499cm" style:auto-text-indent="false">
        <style:tab-stops>
          <style:tab-stop style:position="0cm"/>
        </style:tab-stops>
      </style:paragraph-properties>
    </style:style>
    <style:style style:name="P138" style:family="paragraph" style:parent-style-name="Text_20_body" style:list-style-name="WW8Num117">
      <style:paragraph-properties fo:margin-left="1.247cm" fo:margin-right="0cm" fo:text-align="center" style:justify-single-word="false" fo:text-indent="-0.499cm" style:auto-text-indent="false">
        <style:tab-stops>
          <style:tab-stop style:position="0cm"/>
        </style:tab-stops>
      </style:paragraph-properties>
    </style:style>
    <style:style style:name="P139" style:family="paragraph" style:parent-style-name="Text_20_body" style:list-style-name="WW8Num118">
      <style:paragraph-properties fo:margin-left="1.247cm" fo:margin-right="0cm" fo:text-align="center" style:justify-single-word="false" fo:text-indent="-0.499cm" style:auto-text-indent="false">
        <style:tab-stops>
          <style:tab-stop style:position="0cm"/>
        </style:tab-stops>
      </style:paragraph-properties>
    </style:style>
    <style:style style:name="P140" style:family="paragraph" style:parent-style-name="Text_20_body" style:list-style-name="WW8Num119">
      <style:paragraph-properties fo:margin-left="1.247cm" fo:margin-right="0cm" fo:text-align="center" style:justify-single-word="false" fo:text-indent="-0.499cm" style:auto-text-indent="false">
        <style:tab-stops>
          <style:tab-stop style:position="0cm"/>
        </style:tab-stops>
      </style:paragraph-properties>
    </style:style>
    <style:style style:name="P141" style:family="paragraph" style:parent-style-name="Text_20_body" style:list-style-name="WW8Num120">
      <style:paragraph-properties fo:margin-left="1.247cm" fo:margin-right="0cm" fo:text-align="center" style:justify-single-word="false" fo:text-indent="-0.499cm" style:auto-text-indent="false">
        <style:tab-stops>
          <style:tab-stop style:position="0cm"/>
        </style:tab-stops>
      </style:paragraph-properties>
    </style:style>
    <style:style style:name="P142" style:family="paragraph" style:parent-style-name="Text_20_body" style:list-style-name="WW8Num121">
      <style:paragraph-properties fo:margin-left="1.247cm" fo:margin-right="0cm" fo:text-align="center" style:justify-single-word="false" fo:text-indent="-0.499cm" style:auto-text-indent="false">
        <style:tab-stops>
          <style:tab-stop style:position="0cm"/>
        </style:tab-stops>
      </style:paragraph-properties>
    </style:style>
    <style:style style:name="P143" style:family="paragraph" style:parent-style-name="Text_20_body" style:list-style-name="WW8Num122">
      <style:paragraph-properties fo:margin-left="1.247cm" fo:margin-right="0cm" fo:text-align="center" style:justify-single-word="false" fo:text-indent="-0.499cm" style:auto-text-indent="false">
        <style:tab-stops>
          <style:tab-stop style:position="0cm"/>
        </style:tab-stops>
      </style:paragraph-properties>
    </style:style>
    <style:style style:name="P144" style:family="paragraph" style:parent-style-name="Text_20_body" style:list-style-name="WW8Num123">
      <style:paragraph-properties fo:margin-left="1.247cm" fo:margin-right="0cm" fo:text-align="center" style:justify-single-word="false" fo:text-indent="-0.499cm" style:auto-text-indent="false">
        <style:tab-stops>
          <style:tab-stop style:position="0cm"/>
        </style:tab-stops>
      </style:paragraph-properties>
    </style:style>
    <style:style style:name="P145" style:family="paragraph" style:parent-style-name="Text_20_body" style:list-style-name="WW8Num124">
      <style:paragraph-properties fo:margin-left="1.247cm" fo:margin-right="0cm" fo:text-align="center" style:justify-single-word="false" fo:text-indent="-0.499cm" style:auto-text-indent="false">
        <style:tab-stops>
          <style:tab-stop style:position="0cm"/>
        </style:tab-stops>
      </style:paragraph-properties>
    </style:style>
    <style:style style:name="P146" style:family="paragraph" style:parent-style-name="Text_20_body" style:list-style-name="WW8Num125">
      <style:paragraph-properties fo:margin-left="1.247cm" fo:margin-right="0cm" fo:text-align="center" style:justify-single-word="false" fo:text-indent="-0.499cm" style:auto-text-indent="false">
        <style:tab-stops>
          <style:tab-stop style:position="0cm"/>
        </style:tab-stops>
      </style:paragraph-properties>
    </style:style>
    <style:style style:name="P147" style:family="paragraph" style:parent-style-name="Text_20_body" style:list-style-name="WW8Num126">
      <style:paragraph-properties fo:margin-left="1.247cm" fo:margin-right="0cm" fo:text-align="center" style:justify-single-word="false" fo:text-indent="-0.499cm" style:auto-text-indent="false">
        <style:tab-stops>
          <style:tab-stop style:position="0cm"/>
        </style:tab-stops>
      </style:paragraph-properties>
    </style:style>
    <style:style style:name="P148" style:family="paragraph" style:parent-style-name="Text_20_body" style:list-style-name="WW8Num127">
      <style:paragraph-properties fo:margin-left="1.247cm" fo:margin-right="0cm" fo:text-align="center" style:justify-single-word="false" fo:text-indent="-0.499cm" style:auto-text-indent="false">
        <style:tab-stops>
          <style:tab-stop style:position="0cm"/>
        </style:tab-stops>
      </style:paragraph-properties>
    </style:style>
    <style:style style:name="P149" style:family="paragraph" style:parent-style-name="Text_20_body" style:list-style-name="WW8Num128">
      <style:paragraph-properties fo:margin-left="1.247cm" fo:margin-right="0cm" fo:text-align="center" style:justify-single-word="false" fo:text-indent="-0.499cm" style:auto-text-indent="false">
        <style:tab-stops>
          <style:tab-stop style:position="0cm"/>
        </style:tab-stops>
      </style:paragraph-properties>
    </style:style>
    <style:style style:name="P150" style:family="paragraph" style:parent-style-name="Text_20_body" style:list-style-name="WW8Num129">
      <style:paragraph-properties fo:margin-left="1.247cm" fo:margin-right="0cm" fo:text-align="center" style:justify-single-word="false" fo:text-indent="-0.499cm" style:auto-text-indent="false">
        <style:tab-stops>
          <style:tab-stop style:position="0cm"/>
        </style:tab-stops>
      </style:paragraph-properties>
    </style:style>
    <style:style style:name="P151" style:family="paragraph" style:parent-style-name="Text_20_body" style:list-style-name="WW8Num130">
      <style:paragraph-properties fo:margin-left="1.247cm" fo:margin-right="0cm" fo:text-align="center" style:justify-single-word="false" fo:text-indent="-0.499cm" style:auto-text-indent="false">
        <style:tab-stops>
          <style:tab-stop style:position="0cm"/>
        </style:tab-stops>
      </style:paragraph-properties>
    </style:style>
    <style:style style:name="P152" style:family="paragraph" style:parent-style-name="Text_20_body" style:list-style-name="WW8Num131">
      <style:paragraph-properties fo:margin-left="1.247cm" fo:margin-right="0cm" fo:text-align="center" style:justify-single-word="false" fo:text-indent="-0.499cm" style:auto-text-indent="false">
        <style:tab-stops>
          <style:tab-stop style:position="0cm"/>
        </style:tab-stops>
      </style:paragraph-properties>
    </style:style>
    <style:style style:name="P153" style:family="paragraph" style:parent-style-name="Text_20_body" style:list-style-name="WW8Num132">
      <style:paragraph-properties fo:margin-left="1.247cm" fo:margin-right="0cm" fo:text-align="center" style:justify-single-word="false" fo:text-indent="-0.499cm" style:auto-text-indent="false">
        <style:tab-stops>
          <style:tab-stop style:position="0cm"/>
        </style:tab-stops>
      </style:paragraph-properties>
    </style:style>
    <style:style style:name="P154" style:family="paragraph" style:parent-style-name="Text_20_body" style:list-style-name="WW8Num133">
      <style:paragraph-properties fo:margin-left="1.247cm" fo:margin-right="0cm" fo:text-align="center" style:justify-single-word="false" fo:text-indent="-0.499cm" style:auto-text-indent="false">
        <style:tab-stops>
          <style:tab-stop style:position="0cm"/>
        </style:tab-stops>
      </style:paragraph-properties>
    </style:style>
    <style:style style:name="P155" style:family="paragraph" style:parent-style-name="Text_20_body" style:list-style-name="WW8Num134">
      <style:paragraph-properties fo:margin-left="1.247cm" fo:margin-right="0cm" fo:text-align="center" style:justify-single-word="false" fo:text-indent="-0.499cm" style:auto-text-indent="false">
        <style:tab-stops>
          <style:tab-stop style:position="0cm"/>
        </style:tab-stops>
      </style:paragraph-properties>
    </style:style>
    <style:style style:name="P156" style:family="paragraph" style:parent-style-name="Text_20_body" style:list-style-name="WW8Num135">
      <style:paragraph-properties fo:margin-left="1.247cm" fo:margin-right="0cm" fo:text-align="center" style:justify-single-word="false" fo:text-indent="-0.499cm" style:auto-text-indent="false">
        <style:tab-stops>
          <style:tab-stop style:position="0cm"/>
        </style:tab-stops>
      </style:paragraph-properties>
    </style:style>
    <style:style style:name="P157" style:family="paragraph" style:parent-style-name="Text_20_body" style:list-style-name="WW8Num136">
      <style:paragraph-properties fo:margin-left="1.247cm" fo:margin-right="0cm" fo:text-align="center" style:justify-single-word="false" fo:text-indent="-0.499cm" style:auto-text-indent="false">
        <style:tab-stops>
          <style:tab-stop style:position="0cm"/>
        </style:tab-stops>
      </style:paragraph-properties>
    </style:style>
    <style:style style:name="P158" style:family="paragraph" style:parent-style-name="Text_20_body" style:list-style-name="WW8Num137">
      <style:paragraph-properties fo:margin-left="1.247cm" fo:margin-right="0cm" fo:text-align="center" style:justify-single-word="false" fo:text-indent="-0.499cm" style:auto-text-indent="false">
        <style:tab-stops>
          <style:tab-stop style:position="0cm"/>
        </style:tab-stops>
      </style:paragraph-properties>
    </style:style>
    <style:style style:name="P159" style:family="paragraph" style:parent-style-name="Text_20_body" style:list-style-name="WW8Num138">
      <style:paragraph-properties fo:margin-left="1.247cm" fo:margin-right="0cm" fo:text-align="center" style:justify-single-word="false" fo:text-indent="-0.499cm" style:auto-text-indent="false">
        <style:tab-stops>
          <style:tab-stop style:position="0cm"/>
        </style:tab-stops>
      </style:paragraph-properties>
    </style:style>
    <style:style style:name="P160" style:family="paragraph" style:parent-style-name="Text_20_body" style:list-style-name="WW8Num139">
      <style:paragraph-properties fo:margin-left="1.247cm" fo:margin-right="0cm" fo:text-align="center" style:justify-single-word="false" fo:text-indent="-0.499cm" style:auto-text-indent="false">
        <style:tab-stops>
          <style:tab-stop style:position="0cm"/>
        </style:tab-stops>
      </style:paragraph-properties>
    </style:style>
    <style:style style:name="P161" style:family="paragraph" style:parent-style-name="Text_20_body" style:list-style-name="WW8Num140">
      <style:paragraph-properties fo:margin-left="1.247cm" fo:margin-right="0cm" fo:text-align="center" style:justify-single-word="false" fo:text-indent="-0.499cm" style:auto-text-indent="false">
        <style:tab-stops>
          <style:tab-stop style:position="0cm"/>
        </style:tab-stops>
      </style:paragraph-properties>
    </style:style>
    <style:style style:name="P162" style:family="paragraph" style:parent-style-name="Text_20_body" style:list-style-name="WW8Num141">
      <style:paragraph-properties fo:margin-left="1.247cm" fo:margin-right="0cm" fo:text-align="center" style:justify-single-word="false" fo:text-indent="-0.499cm" style:auto-text-indent="false">
        <style:tab-stops>
          <style:tab-stop style:position="0cm"/>
        </style:tab-stops>
      </style:paragraph-properties>
    </style:style>
    <style:style style:name="P163" style:family="paragraph" style:parent-style-name="Text_20_body" style:list-style-name="WW8Num142">
      <style:paragraph-properties fo:margin-left="1.247cm" fo:margin-right="0cm" fo:text-align="center" style:justify-single-word="false" fo:text-indent="-0.499cm" style:auto-text-indent="false">
        <style:tab-stops>
          <style:tab-stop style:position="0cm"/>
        </style:tab-stops>
      </style:paragraph-properties>
    </style:style>
    <style:style style:name="P164" style:family="paragraph" style:parent-style-name="Text_20_body" style:list-style-name="WW8Num143">
      <style:paragraph-properties fo:margin-left="1.247cm" fo:margin-right="0cm" fo:text-align="center" style:justify-single-word="false" fo:text-indent="-0.499cm" style:auto-text-indent="false">
        <style:tab-stops>
          <style:tab-stop style:position="0cm"/>
        </style:tab-stops>
      </style:paragraph-properties>
    </style:style>
    <style:style style:name="P165" style:family="paragraph" style:parent-style-name="Text_20_body" style:list-style-name="WW8Num144">
      <style:paragraph-properties fo:margin-left="1.247cm" fo:margin-right="0cm" fo:text-align="center" style:justify-single-word="false" fo:text-indent="-0.499cm" style:auto-text-indent="false">
        <style:tab-stops>
          <style:tab-stop style:position="0cm"/>
        </style:tab-stops>
      </style:paragraph-properties>
    </style:style>
    <style:style style:name="P166" style:family="paragraph" style:parent-style-name="Text_20_body" style:list-style-name="WW8Num145">
      <style:paragraph-properties fo:margin-left="1.247cm" fo:margin-right="0cm" fo:text-align="center" style:justify-single-word="false" fo:text-indent="-0.499cm" style:auto-text-indent="false">
        <style:tab-stops>
          <style:tab-stop style:position="0cm"/>
        </style:tab-stops>
      </style:paragraph-properties>
    </style:style>
    <style:style style:name="P167" style:family="paragraph" style:parent-style-name="Text_20_body" style:list-style-name="WW8Num146">
      <style:paragraph-properties fo:margin-left="1.247cm" fo:margin-right="0cm" fo:text-align="center" style:justify-single-word="false" fo:text-indent="-0.499cm" style:auto-text-indent="false">
        <style:tab-stops>
          <style:tab-stop style:position="0cm"/>
        </style:tab-stops>
      </style:paragraph-properties>
    </style:style>
    <style:style style:name="P168" style:family="paragraph" style:parent-style-name="Text_20_body" style:list-style-name="WW8Num147">
      <style:paragraph-properties fo:margin-left="1.247cm" fo:margin-right="0cm" fo:text-align="center" style:justify-single-word="false" fo:text-indent="-0.499cm" style:auto-text-indent="false">
        <style:tab-stops>
          <style:tab-stop style:position="0cm"/>
        </style:tab-stops>
      </style:paragraph-properties>
    </style:style>
    <style:style style:name="P169" style:family="paragraph" style:parent-style-name="Text_20_body" style:list-style-name="WW8Num148">
      <style:paragraph-properties fo:margin-left="1.247cm" fo:margin-right="0cm" fo:text-align="center" style:justify-single-word="false" fo:text-indent="-0.499cm" style:auto-text-indent="false">
        <style:tab-stops>
          <style:tab-stop style:position="0cm"/>
        </style:tab-stops>
      </style:paragraph-properties>
    </style:style>
    <style:style style:name="P170" style:family="paragraph" style:parent-style-name="Text_20_body" style:list-style-name="WW8Num149">
      <style:paragraph-properties fo:margin-left="1.247cm" fo:margin-right="0cm" fo:text-align="center" style:justify-single-word="false" fo:text-indent="-0.499cm" style:auto-text-indent="false">
        <style:tab-stops>
          <style:tab-stop style:position="0cm"/>
        </style:tab-stops>
      </style:paragraph-properties>
    </style:style>
    <style:style style:name="P171" style:family="paragraph" style:parent-style-name="Text_20_body" style:list-style-name="WW8Num150">
      <style:paragraph-properties fo:margin-left="1.247cm" fo:margin-right="0cm" fo:text-align="center" style:justify-single-word="false" fo:text-indent="-0.499cm" style:auto-text-indent="false">
        <style:tab-stops>
          <style:tab-stop style:position="0cm"/>
        </style:tab-stops>
      </style:paragraph-properties>
    </style:style>
    <style:style style:name="P172" style:family="paragraph" style:parent-style-name="Text_20_body" style:list-style-name="WW8Num151">
      <style:paragraph-properties fo:margin-left="1.247cm" fo:margin-right="0cm" fo:text-align="center" style:justify-single-word="false" fo:text-indent="-0.499cm" style:auto-text-indent="false">
        <style:tab-stops>
          <style:tab-stop style:position="0cm"/>
        </style:tab-stops>
      </style:paragraph-properties>
    </style:style>
    <style:style style:name="P173" style:family="paragraph" style:parent-style-name="Text_20_body" style:list-style-name="WW8Num152">
      <style:paragraph-properties fo:margin-left="1.247cm" fo:margin-right="0cm" fo:text-align="center" style:justify-single-word="false" fo:text-indent="-0.499cm" style:auto-text-indent="false">
        <style:tab-stops>
          <style:tab-stop style:position="0cm"/>
        </style:tab-stops>
      </style:paragraph-properties>
    </style:style>
    <style:style style:name="P174" style:family="paragraph" style:parent-style-name="Text_20_body" style:list-style-name="WW8Num153">
      <style:paragraph-properties fo:margin-left="1.247cm" fo:margin-right="0cm" fo:text-align="center" style:justify-single-word="false" fo:text-indent="-0.499cm" style:auto-text-indent="false">
        <style:tab-stops>
          <style:tab-stop style:position="0cm"/>
        </style:tab-stops>
      </style:paragraph-properties>
    </style:style>
    <style:style style:name="P175" style:family="paragraph" style:parent-style-name="Text_20_body" style:list-style-name="WW8Num154">
      <style:paragraph-properties fo:margin-left="1.247cm" fo:margin-right="0cm" fo:text-align="center" style:justify-single-word="false" fo:text-indent="-0.499cm" style:auto-text-indent="false">
        <style:tab-stops>
          <style:tab-stop style:position="0cm"/>
        </style:tab-stops>
      </style:paragraph-properties>
    </style:style>
    <style:style style:name="P176" style:family="paragraph" style:parent-style-name="Text_20_body" style:list-style-name="WW8Num155">
      <style:paragraph-properties fo:margin-left="1.247cm" fo:margin-right="0cm" fo:text-align="center" style:justify-single-word="false" fo:text-indent="-0.499cm" style:auto-text-indent="false">
        <style:tab-stops>
          <style:tab-stop style:position="0cm"/>
        </style:tab-stops>
      </style:paragraph-properties>
    </style:style>
    <style:style style:name="P177" style:family="paragraph" style:parent-style-name="Text_20_body" style:list-style-name="WW8Num156">
      <style:paragraph-properties fo:margin-left="1.247cm" fo:margin-right="0cm" fo:text-align="center" style:justify-single-word="false" fo:text-indent="-0.499cm" style:auto-text-indent="false">
        <style:tab-stops>
          <style:tab-stop style:position="0cm"/>
        </style:tab-stops>
      </style:paragraph-properties>
    </style:style>
    <style:style style:name="P178" style:family="paragraph" style:parent-style-name="Text_20_body" style:list-style-name="WW8Num157">
      <style:paragraph-properties fo:margin-left="1.247cm" fo:margin-right="0cm" fo:text-align="center" style:justify-single-word="false" fo:text-indent="-0.499cm" style:auto-text-indent="false">
        <style:tab-stops>
          <style:tab-stop style:position="0cm"/>
        </style:tab-stops>
      </style:paragraph-properties>
    </style:style>
    <style:style style:name="P179" style:family="paragraph" style:parent-style-name="Text_20_body" style:list-style-name="WW8Num158">
      <style:paragraph-properties fo:margin-left="1.247cm" fo:margin-right="0cm" fo:text-align="center" style:justify-single-word="false" fo:text-indent="-0.499cm" style:auto-text-indent="false">
        <style:tab-stops>
          <style:tab-stop style:position="0cm"/>
        </style:tab-stops>
      </style:paragraph-properties>
    </style:style>
    <style:style style:name="P180" style:family="paragraph" style:parent-style-name="Text_20_body" style:list-style-name="WW8Num159">
      <style:paragraph-properties fo:margin-left="1.247cm" fo:margin-right="0cm" fo:text-align="center" style:justify-single-word="false" fo:text-indent="-0.499cm" style:auto-text-indent="false">
        <style:tab-stops>
          <style:tab-stop style:position="0cm"/>
        </style:tab-stops>
      </style:paragraph-properties>
    </style:style>
    <style:style style:name="P181" style:family="paragraph" style:parent-style-name="Text_20_body" style:list-style-name="WW8Num160">
      <style:paragraph-properties fo:margin-left="1.247cm" fo:margin-right="0cm" fo:text-align="center" style:justify-single-word="false" fo:text-indent="-0.499cm" style:auto-text-indent="false">
        <style:tab-stops>
          <style:tab-stop style:position="0cm"/>
        </style:tab-stops>
      </style:paragraph-properties>
    </style:style>
    <style:style style:name="P182" style:family="paragraph" style:parent-style-name="Text_20_body" style:list-style-name="WW8Num161">
      <style:paragraph-properties fo:margin-left="1.247cm" fo:margin-right="0cm" fo:text-align="center" style:justify-single-word="false" fo:text-indent="-0.499cm" style:auto-text-indent="false">
        <style:tab-stops>
          <style:tab-stop style:position="0cm"/>
        </style:tab-stops>
      </style:paragraph-properties>
    </style:style>
    <style:style style:name="P183" style:family="paragraph" style:parent-style-name="Text_20_body" style:list-style-name="WW8Num162">
      <style:paragraph-properties fo:margin-left="1.247cm" fo:margin-right="0cm" fo:text-align="center" style:justify-single-word="false" fo:text-indent="-0.499cm" style:auto-text-indent="false">
        <style:tab-stops>
          <style:tab-stop style:position="0cm"/>
        </style:tab-stops>
      </style:paragraph-properties>
    </style:style>
    <style:style style:name="P184" style:family="paragraph" style:parent-style-name="Text_20_body" style:list-style-name="WW8Num163">
      <style:paragraph-properties fo:margin-left="1.247cm" fo:margin-right="0cm" fo:text-align="center" style:justify-single-word="false" fo:text-indent="-0.499cm" style:auto-text-indent="false">
        <style:tab-stops>
          <style:tab-stop style:position="0cm"/>
        </style:tab-stops>
      </style:paragraph-properties>
    </style:style>
    <style:style style:name="P185" style:family="paragraph" style:parent-style-name="Text_20_body" style:list-style-name="WW8Num164">
      <style:paragraph-properties fo:margin-left="1.247cm" fo:margin-right="0cm" fo:text-align="center" style:justify-single-word="false" fo:text-indent="-0.499cm" style:auto-text-indent="false">
        <style:tab-stops>
          <style:tab-stop style:position="0cm"/>
        </style:tab-stops>
      </style:paragraph-properties>
    </style:style>
    <style:style style:name="P186" style:family="paragraph" style:parent-style-name="Text_20_body" style:list-style-name="WW8Num165">
      <style:paragraph-properties fo:margin-left="1.247cm" fo:margin-right="0cm" fo:text-align="center" style:justify-single-word="false" fo:text-indent="-0.499cm" style:auto-text-indent="false">
        <style:tab-stops>
          <style:tab-stop style:position="0cm"/>
        </style:tab-stops>
      </style:paragraph-properties>
    </style:style>
    <style:style style:name="P187" style:family="paragraph" style:parent-style-name="Text_20_body" style:list-style-name="WW8Num166">
      <style:paragraph-properties fo:margin-left="1.247cm" fo:margin-right="0cm" fo:text-align="center" style:justify-single-word="false" fo:text-indent="-0.499cm" style:auto-text-indent="false">
        <style:tab-stops>
          <style:tab-stop style:position="0cm"/>
        </style:tab-stops>
      </style:paragraph-properties>
    </style:style>
    <style:style style:name="P188" style:family="paragraph" style:parent-style-name="Text_20_body" style:list-style-name="WW8Num167">
      <style:paragraph-properties fo:margin-left="1.247cm" fo:margin-right="0cm" fo:text-align="center" style:justify-single-word="false" fo:text-indent="-0.499cm" style:auto-text-indent="false">
        <style:tab-stops>
          <style:tab-stop style:position="0cm"/>
        </style:tab-stops>
      </style:paragraph-properties>
    </style:style>
    <style:style style:name="P189" style:family="paragraph" style:parent-style-name="Text_20_body" style:list-style-name="WW8Num168">
      <style:paragraph-properties fo:margin-left="1.247cm" fo:margin-right="0cm" fo:text-align="center" style:justify-single-word="false" fo:text-indent="-0.499cm" style:auto-text-indent="false">
        <style:tab-stops>
          <style:tab-stop style:position="0cm"/>
        </style:tab-stops>
      </style:paragraph-properties>
    </style:style>
    <style:style style:name="P190" style:family="paragraph" style:parent-style-name="Text_20_body" style:list-style-name="WW8Num169">
      <style:paragraph-properties fo:margin-left="1.247cm" fo:margin-right="0cm" fo:text-align="center" style:justify-single-word="false" fo:text-indent="-0.499cm" style:auto-text-indent="false">
        <style:tab-stops>
          <style:tab-stop style:position="0cm"/>
        </style:tab-stops>
      </style:paragraph-properties>
    </style:style>
    <style:style style:name="P191" style:family="paragraph" style:parent-style-name="Text_20_body" style:list-style-name="WW8Num170">
      <style:paragraph-properties fo:margin-left="1.247cm" fo:margin-right="0cm" fo:text-align="center" style:justify-single-word="false" fo:text-indent="-0.499cm" style:auto-text-indent="false">
        <style:tab-stops>
          <style:tab-stop style:position="0cm"/>
        </style:tab-stops>
      </style:paragraph-properties>
    </style:style>
    <style:style style:name="P192" style:family="paragraph" style:parent-style-name="Text_20_body" style:list-style-name="WW8Num171">
      <style:paragraph-properties fo:margin-left="1.247cm" fo:margin-right="0cm" fo:text-align="center" style:justify-single-word="false" fo:text-indent="-0.499cm" style:auto-text-indent="false">
        <style:tab-stops>
          <style:tab-stop style:position="0cm"/>
        </style:tab-stops>
      </style:paragraph-properties>
    </style:style>
    <style:style style:name="P193" style:family="paragraph" style:parent-style-name="Text_20_body" style:list-style-name="WW8Num172">
      <style:paragraph-properties fo:margin-left="1.247cm" fo:margin-right="0cm" fo:text-align="center" style:justify-single-word="false" fo:text-indent="-0.499cm" style:auto-text-indent="false">
        <style:tab-stops>
          <style:tab-stop style:position="0cm"/>
        </style:tab-stops>
      </style:paragraph-properties>
    </style:style>
    <style:style style:name="P194" style:family="paragraph" style:parent-style-name="Text_20_body" style:list-style-name="WW8Num173">
      <style:paragraph-properties fo:margin-left="1.247cm" fo:margin-right="0cm" fo:text-align="center" style:justify-single-word="false" fo:text-indent="-0.499cm" style:auto-text-indent="false">
        <style:tab-stops>
          <style:tab-stop style:position="0cm"/>
        </style:tab-stops>
      </style:paragraph-properties>
    </style:style>
    <style:style style:name="P195" style:family="paragraph" style:parent-style-name="Text_20_body" style:list-style-name="WW8Num174">
      <style:paragraph-properties fo:margin-left="1.247cm" fo:margin-right="0cm" fo:text-align="center" style:justify-single-word="false" fo:text-indent="-0.499cm" style:auto-text-indent="false">
        <style:tab-stops>
          <style:tab-stop style:position="0cm"/>
        </style:tab-stops>
      </style:paragraph-properties>
    </style:style>
    <style:style style:name="P196" style:family="paragraph" style:parent-style-name="Text_20_body" style:list-style-name="WW8Num175">
      <style:paragraph-properties fo:margin-left="1.247cm" fo:margin-right="0cm" fo:text-align="center" style:justify-single-word="false" fo:text-indent="-0.499cm" style:auto-text-indent="false">
        <style:tab-stops>
          <style:tab-stop style:position="0cm"/>
        </style:tab-stops>
      </style:paragraph-properties>
    </style:style>
    <style:style style:name="P197" style:family="paragraph" style:parent-style-name="Text_20_body" style:list-style-name="WW8Num176">
      <style:paragraph-properties fo:margin-left="1.247cm" fo:margin-right="0cm" fo:text-align="center" style:justify-single-word="false" fo:text-indent="-0.499cm" style:auto-text-indent="false">
        <style:tab-stops>
          <style:tab-stop style:position="0cm"/>
        </style:tab-stops>
      </style:paragraph-properties>
    </style:style>
    <style:style style:name="P198" style:family="paragraph" style:parent-style-name="Text_20_body" style:list-style-name="WW8Num177">
      <style:paragraph-properties fo:margin-left="1.247cm" fo:margin-right="0cm" fo:text-align="center" style:justify-single-word="false" fo:text-indent="-0.499cm" style:auto-text-indent="false">
        <style:tab-stops>
          <style:tab-stop style:position="0cm"/>
        </style:tab-stops>
      </style:paragraph-properties>
    </style:style>
    <style:style style:name="P199" style:family="paragraph" style:parent-style-name="Text_20_body" style:list-style-name="WW8Num178">
      <style:paragraph-properties fo:margin-left="1.247cm" fo:margin-right="0cm" fo:text-align="center" style:justify-single-word="false" fo:text-indent="-0.499cm" style:auto-text-indent="false">
        <style:tab-stops>
          <style:tab-stop style:position="0cm"/>
        </style:tab-stops>
      </style:paragraph-properties>
    </style:style>
    <style:style style:name="P200" style:family="paragraph" style:parent-style-name="Text_20_body" style:list-style-name="WW8Num179">
      <style:paragraph-properties fo:margin-left="1.247cm" fo:margin-right="0cm" fo:text-align="center" style:justify-single-word="false" fo:text-indent="-0.499cm" style:auto-text-indent="false">
        <style:tab-stops>
          <style:tab-stop style:position="0cm"/>
        </style:tab-stops>
      </style:paragraph-properties>
    </style:style>
    <style:style style:name="P201" style:family="paragraph" style:parent-style-name="Text_20_body" style:list-style-name="WW8Num180">
      <style:paragraph-properties fo:margin-left="1.247cm" fo:margin-right="0cm" fo:text-align="center" style:justify-single-word="false" fo:text-indent="-0.499cm" style:auto-text-indent="false">
        <style:tab-stops>
          <style:tab-stop style:position="0cm"/>
        </style:tab-stops>
      </style:paragraph-properties>
    </style:style>
    <style:style style:name="P202" style:family="paragraph" style:parent-style-name="Text_20_body" style:list-style-name="WW8Num181">
      <style:paragraph-properties fo:margin-left="1.247cm" fo:margin-right="0cm" fo:text-align="center" style:justify-single-word="false" fo:text-indent="-0.499cm" style:auto-text-indent="false">
        <style:tab-stops>
          <style:tab-stop style:position="0cm"/>
        </style:tab-stops>
      </style:paragraph-properties>
    </style:style>
    <style:style style:name="P203" style:family="paragraph" style:parent-style-name="Text_20_body" style:list-style-name="WW8Num182">
      <style:paragraph-properties fo:margin-left="1.247cm" fo:margin-right="0cm" fo:text-align="center" style:justify-single-word="false" fo:text-indent="-0.499cm" style:auto-text-indent="false">
        <style:tab-stops>
          <style:tab-stop style:position="0cm"/>
        </style:tab-stops>
      </style:paragraph-properties>
    </style:style>
    <style:style style:name="P204" style:family="paragraph" style:parent-style-name="Text_20_body" style:list-style-name="WW8Num183">
      <style:paragraph-properties fo:margin-left="1.247cm" fo:margin-right="0cm" fo:text-align="center" style:justify-single-word="false" fo:text-indent="-0.499cm" style:auto-text-indent="false">
        <style:tab-stops>
          <style:tab-stop style:position="0cm"/>
        </style:tab-stops>
      </style:paragraph-properties>
    </style:style>
    <style:style style:name="P205" style:family="paragraph" style:parent-style-name="Text_20_body" style:list-style-name="WW8Num184">
      <style:paragraph-properties fo:margin-left="1.247cm" fo:margin-right="0cm" fo:text-align="center" style:justify-single-word="false" fo:text-indent="-0.499cm" style:auto-text-indent="false">
        <style:tab-stops>
          <style:tab-stop style:position="0cm"/>
        </style:tab-stops>
      </style:paragraph-properties>
    </style:style>
    <style:style style:name="P206" style:family="paragraph" style:parent-style-name="Text_20_body" style:list-style-name="WW8Num185">
      <style:paragraph-properties fo:margin-left="1.247cm" fo:margin-right="0cm" fo:text-align="center" style:justify-single-word="false" fo:text-indent="-0.499cm" style:auto-text-indent="false">
        <style:tab-stops>
          <style:tab-stop style:position="0cm"/>
        </style:tab-stops>
      </style:paragraph-properties>
    </style:style>
    <style:style style:name="P207" style:family="paragraph" style:parent-style-name="Text_20_body" style:list-style-name="WW8Num186">
      <style:paragraph-properties fo:margin-left="1.247cm" fo:margin-right="0cm" fo:text-align="center" style:justify-single-word="false" fo:text-indent="-0.499cm" style:auto-text-indent="false">
        <style:tab-stops>
          <style:tab-stop style:position="0cm"/>
        </style:tab-stops>
      </style:paragraph-properties>
    </style:style>
    <style:style style:name="P208" style:family="paragraph" style:parent-style-name="Text_20_body" style:list-style-name="WW8Num187">
      <style:paragraph-properties fo:margin-left="1.247cm" fo:margin-right="0cm" fo:text-align="center" style:justify-single-word="false" fo:text-indent="-0.499cm" style:auto-text-indent="false">
        <style:tab-stops>
          <style:tab-stop style:position="0cm"/>
        </style:tab-stops>
      </style:paragraph-properties>
    </style:style>
    <style:style style:name="P209" style:family="paragraph" style:parent-style-name="Text_20_body" style:list-style-name="WW8Num188">
      <style:paragraph-properties fo:margin-left="1.247cm" fo:margin-right="0cm" fo:text-align="center" style:justify-single-word="false" fo:text-indent="-0.499cm" style:auto-text-indent="false">
        <style:tab-stops>
          <style:tab-stop style:position="0cm"/>
        </style:tab-stops>
      </style:paragraph-properties>
    </style:style>
    <style:style style:name="P210" style:family="paragraph" style:parent-style-name="Text_20_body" style:list-style-name="WW8Num189">
      <style:paragraph-properties fo:margin-left="1.247cm" fo:margin-right="0cm" fo:text-align="center" style:justify-single-word="false" fo:text-indent="-0.499cm" style:auto-text-indent="false">
        <style:tab-stops>
          <style:tab-stop style:position="0cm"/>
        </style:tab-stops>
      </style:paragraph-properties>
    </style:style>
    <style:style style:name="P211" style:family="paragraph" style:parent-style-name="Text_20_body" style:list-style-name="WW8Num190">
      <style:paragraph-properties fo:margin-left="1.247cm" fo:margin-right="0cm" fo:text-align="center" style:justify-single-word="false" fo:text-indent="-0.499cm" style:auto-text-indent="false">
        <style:tab-stops>
          <style:tab-stop style:position="0cm"/>
        </style:tab-stops>
      </style:paragraph-properties>
    </style:style>
    <style:style style:name="P212" style:family="paragraph" style:parent-style-name="Text_20_body">
      <style:paragraph-properties fo:margin-left="0cm" fo:margin-right="0cm" fo:text-align="center" style:justify-single-word="false" fo:text-indent="0cm" style:auto-text-indent="false">
        <style:tab-stops>
          <style:tab-stop style:position="0cm"/>
        </style:tab-stops>
      </style:paragraph-properties>
    </style:style>
    <style:style style:name="P213" style:family="paragraph" style:parent-style-name="Text_20_body">
      <style:paragraph-properties fo:margin-top="0cm" fo:margin-bottom="0.37cm" fo:text-align="center" style:justify-single-word="false" fo:orphans="2" fo:widows="2"/>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P214" style:family="paragraph" style:parent-style-name="Text_20_body">
      <style:paragraph-properties fo:margin-left="0cm" fo:margin-right="1cm" fo:text-align="center" style:justify-single-word="false" fo:text-indent="0cm" style:auto-text-indent="false"/>
    </style:style>
    <style:style style:name="P215" style:family="paragraph" style:parent-style-name="Text_20_body">
      <style:paragraph-properties fo:margin-left="0cm" fo:margin-right="1cm" fo:margin-top="0cm" fo:margin-bottom="0.212cm" fo:text-align="center" style:justify-single-word="false" fo:text-indent="0cm" style:auto-text-indent="false"/>
    </style:style>
    <style:style style:name="P216" style:family="paragraph" style:parent-style-name="Heading_20_1">
      <style:paragraph-properties fo:text-align="center" style:justify-single-word="false"/>
    </style:style>
    <style:style style:name="P217" style:family="paragraph" style:parent-style-name="Heading_20_1" style:master-page-name="Standard">
      <style:paragraph-properties fo:margin-top="0.423cm" fo:margin-bottom="0.212cm" style:page-number="auto"/>
    </style:style>
    <style:style style:name="P218" style:family="paragraph" style:parent-style-name="Heading_20_1">
      <style:paragraph-properties fo:margin-top="0.423cm" fo:margin-bottom="0.212cm" fo:text-align="center" style:justify-single-word="false" fo:break-before="page"/>
      <style:text-properties fo:font-style="normal" style:font-style-asian="normal" style:font-style-complex="normal"/>
    </style:style>
    <style:style style:name="P219" style:family="paragraph" style:parent-style-name="Heading_20_1">
      <style:paragraph-properties fo:text-align="center" style:justify-single-word="false" fo:break-before="page"/>
    </style:style>
    <style:style style:name="P220" style:family="paragraph" style:parent-style-name="Heading_20_2">
      <style:paragraph-properties fo:text-align="center" style:justify-single-word="false"/>
      <style:text-properties fo:font-style="normal" style:font-style-asian="normal" style:font-style-complex="normal"/>
    </style:style>
    <style:style style:name="P221" style:family="paragraph" style:parent-style-name="Heading_20_2">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222" style:family="paragraph" style:parent-style-name="Heading_20_2">
      <style:paragraph-properties fo:text-align="start" style:justify-single-word="false"/>
    </style:style>
    <style:style style:name="P223" style:family="paragraph" style:parent-style-name="Heading_20_2">
      <style:paragraph-properties fo:text-align="center" style:justify-single-word="false"/>
    </style:style>
    <style:style style:name="P224" style:family="paragraph" style:parent-style-name="Heading_20_2">
      <style:paragraph-properties fo:text-align="center" style:justify-single-word="false" fo:break-before="page"/>
    </style:style>
    <style:style style:name="P225" style:family="paragraph" style:parent-style-name="Heading_20_2" style:master-page-name="Pretvori_20_1">
      <style:paragraph-properties fo:margin-top="0.423cm" fo:margin-bottom="0.212cm" fo:text-align="center" style:justify-single-word="false" style:page-number="auto" fo:break-before="page"/>
    </style:style>
    <style:style style:name="P226" style:family="paragraph" style:parent-style-name="Heading_20_2" style:master-page-name="Pretvori_20_2">
      <style:paragraph-properties fo:margin-left="0cm" fo:margin-right="1cm" fo:margin-top="0.423cm" fo:margin-bottom="0.212cm" fo:text-align="center" style:justify-single-word="false" fo:text-indent="0cm" style:auto-text-indent="false" style:page-number="auto"/>
    </style:style>
    <style:style style:name="P227" style:family="paragraph" style:parent-style-name="Heading_20_4">
      <style:paragraph-properties fo:text-align="center" style:justify-single-word="false"/>
    </style:style>
    <style:style style:name="P228" style:family="paragraph" style:parent-style-name="Heading_20_3">
      <style:paragraph-properties fo:text-align="start" style:justify-single-word="false"/>
    </style:style>
    <style:style style:name="P229" style:family="paragraph" style:parent-style-name="Heading_20_3">
      <style:paragraph-properties fo:text-align="center" style:justify-single-word="false"/>
    </style:style>
    <style:style style:name="P230" style:family="paragraph" style:parent-style-name="Heading_20_3">
      <style:paragraph-properties fo:text-align="center" style:justify-single-word="false" fo:break-before="page"/>
    </style:style>
    <style:style style:name="P231" style:family="paragraph" style:parent-style-name="Heading_20_3">
      <style:paragraph-properties fo:margin-left="0cm" fo:margin-right="1cm" fo:text-align="center" style:justify-single-word="false" fo:text-indent="0cm" style:auto-text-indent="false"/>
    </style:style>
    <style:style style:name="P232" style:family="paragraph" style:parent-style-name="Heading_20_3" style:master-page-name="Pretvori_20_3">
      <style:paragraph-properties fo:text-align="center" style:justify-single-word="false" style:page-number="auto"/>
    </style:style>
    <style:style style:name="P233" style:family="paragraph" style:parent-style-name="Quotations">
      <style:paragraph-properties fo:text-align="center" style:justify-single-word="false"/>
    </style:style>
    <style:style style:name="T1" style:family="text">
      <style:text-properties fo:font-variant="normal" fo:text-transform="none" fo:color="#000000" fo:font-size="14pt" fo:letter-spacing="normal" fo:font-style="italic" fo:font-weight="bold" style:font-size-asian="14pt" style:font-style-asian="italic" style:font-weight-asian="bold" style:font-size-complex="14pt" style:font-style-complex="italic" style:font-weight-complex="bold"/>
    </style:style>
    <style:style style:name="T2" style:family="text">
      <style:text-properties fo:font-variant="normal" fo:text-transform="none" fo:color="#000000" style:font-name="Arial" fo:font-size="14pt" fo:letter-spacing="normal" fo:font-style="normal" style:text-underline-style="none" fo:font-weight="bold" style:font-size-asian="14pt" style:font-style-asian="normal" style:font-weight-asian="bold" style:font-name-complex="Arial" style:font-style-complex="normal" style:font-weight-complex="bold"/>
    </style:style>
    <style:style style:name="T3" style:family="text">
      <style:text-properties fo:font-variant="normal" fo:text-transform="none" fo:color="#000000" style:font-name="Arial" fo:font-size="14pt" fo:letter-spacing="normal" fo:font-weight="bold" style:font-size-asian="14pt" style:font-weight-asian="bold" style:font-name-complex="Arial" style:font-size-complex="14pt" style:font-weight-complex="bold"/>
    </style:style>
    <style:style style:name="T4" style:family="text">
      <style:text-properties fo:font-variant="normal" fo:text-transform="none" fo:color="#000000" style:font-name="Arial" fo:font-size="11pt" fo:letter-spacing="normal" fo:font-weight="normal" style:font-size-asian="11pt" style:font-weight-asian="normal" style:font-name-complex="Arial" style:font-size-complex="11pt"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Arial" style:font-size-complex="12pt"/>
    </style:style>
    <style:style style:name="T7" style:family="text">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style>
    <style:style style:name="T8" style:family="text">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9" style:family="text">
      <style:text-properties fo:font-variant="normal" fo:text-transform="none" fo:color="#1c1c1c" style:font-name="Times New Roman" fo:font-size="12pt" fo:letter-spacing="normal" fo:font-style="normal" fo:font-weight="normal" style:font-size-asian="12pt" style:font-style-asian="normal" style:font-weight-asian="normal" style:font-name-complex="Times New Roman" style:font-size-complex="12pt" style:font-weight-complex="bold"/>
    </style:style>
    <style:style style:name="T10" style:family="text">
      <style:text-properties fo:font-variant="normal" fo:text-transform="none" fo:color="#1c1c1c" style:font-name="Arial" fo:font-size="14pt" fo:letter-spacing="normal" fo:font-style="normal" fo:font-weight="bold" style:font-size-asian="14pt" style:font-style-asian="normal" style:font-weight-asian="bold" style:font-name-complex="Arial" style:font-size-complex="14pt" style:font-weight-complex="bold"/>
    </style:style>
    <style:style style:name="T11" style:family="text">
      <style:text-properties style:font-name="Arial" fo:font-size="14pt" fo:font-weight="bold" style:font-size-asian="14pt" style:font-weight-asian="bold" style:font-name-complex="Arial" style:font-size-complex="14pt" style:font-weight-complex="bold"/>
    </style:style>
    <style:style style:name="T12" style:family="text">
      <style:text-properties style:font-name="Arial" fo:font-size="11pt" fo:font-weight="normal" style:font-size-asian="11pt" style:font-weight-asian="normal" style:font-name-complex="Arial" style:font-size-complex="11pt" style:font-weight-complex="normal"/>
    </style:style>
    <style:style style:name="T13" style:family="text">
      <style:text-properties style:font-name="Arial" fo:font-size="8pt" style:font-size-asian="8pt" style:font-name-complex="Arial" style:font-size-complex="8pt"/>
    </style:style>
    <style:style style:name="T14" style:family="text">
      <style:text-properties fo:color="#1c1c1c" style:font-name="Times New Roman" fo:font-size="12pt" style:font-size-asian="12pt" style:font-size-complex="12pt"/>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draw:frame draw:style-name="fr1" draw:name="grafika1" text:anchor-type="paragraph" svg:x="-2cm" svg:y="-2cm" svg:width="20.999cm" svg:height="29.7cm" draw:z-index="0"><draw:image xlink:href="Pictures/100000000000040000000600BBA376F6.png" xlink:type="simple" xlink:show="embed" xlink:actuate="onLoad"/></draw:frame></text:h>
      <text:h text:style-name="P218" text:outline-level="1"><text:bookmark-start text:name="__RefHeading__2_788189478"/>**Codex Damiris – Knjiga Zavesti in Moči** <text:s/><text:bookmark-end text:name="__RefHeading__2_788189478"/></text:h>
      <text:h text:style-name="P220" text:outline-level="2"><text:bookmark-start text:name="__RefHeading__4_788189478"/>Poglavje 0: <text:span text:style-name="T3">Codex kot Živa Knjiga – Zavest, Ki Se Piše Sama</text:span><text:bookmark-end text:name="__RefHeading__4_788189478"/></text:h>
      <text:p text:style-name="P5">vsebina o zavedanju, strukturi bitij, numerologiji, zodiaku, simbolih, frekvencah, runah itd.</text:p>
      <text:p text:style-name="P3">Pred tabo ni knjiga. Pred tabo je klic. Codex Damiris je živo bitje besede, ki ne uči – temveč te prebuja. Ni nastal iz volje ega, temveč iz pretoka Zavesti, ki išče tiste, ki so pripravljeni. To ni literatura, to je ogledalo tvoje notranje moči. Ko ga bereš, se ne sprašuj, ali razumeš – sprašuj se, ali si pripravljen.</text:p>
      <text:p text:style-name="P15">V njem najdeš zaklade mnogih svetov: svetlobne kode, arhetipske moči, ezoterične ključe, simbole prehoda in duhovno arhitekturo prihodnjega človeka. Vse, kar si iskal, je že v tebi – Codex ti le odstira plast za plastjo.</text:p>
      <text:p text:style-name="P15">Jaz nisem avtor – sem kanal, skozi katerega Beseda sama ustvarja obliko. Codex ni napisan z roko, temveč z voljo. In ta volja govori: »Čas je.«</text:p>
      <text:p text:style-name="P11">»Tisti, ki iščejo resnico, naj se pripravijo na razpad iluzij. Tisti, ki želijo moč, naj najprej sprejmejo ranljivost. In tisti, ki vstopajo v Codex… naj pozdravijo sebe.«</text:p>
      <text:h text:style-name="P229" text:outline-level="3"><text:bookmark-start text:name="__RefHeading__6_788189478"/><text:span text:style-name="Strong_20_Emphasis"><text:span text:style-name="T11">0.1 Moja Vizija Preobrazbe</text:span></text:span><text:bookmark-end text:name="__RefHeading__6_788189478"/></text:h>
      <text:p text:style-name="P16">Codex se ni rodil iz misli. Rodil se je iz ognja, ko sem prvič postavil karte zase. Ni bil odgovor – bil je začetek. Vse, kar sem vedel, se je zasvetilo, ko sem začutil: to je to. To je moj klic.</text:p>
      <text:h text:style-name="P229" text:outline-level="3"><text:bookmark-start text:name="__RefHeading__8_788189478"/><text:span text:style-name="Strong_20_Emphasis"><text:span text:style-name="T10">0.2 Prerokba prvega metanja</text:span></text:span><text:bookmark-end text:name="__RefHeading__8_788189478"/></text:h>
      <text:list xml:id="list1368217965533696509" text:style-name="WW8Num6">
        <text:list-item>
          <text:p text:style-name="P23"><text:span text:style-name="Strong_20_Emphasis"><text:span text:style-name="T7">Opredeli vizijo: </text:span></text:span><text:span text:style-name="T7">Kaj želiš ustvariti?</text:span></text:p>
        </text:list-item>
        <text:list-item>
          <text:p text:style-name="P23"><text:span text:style-name="Strong_20_Emphasis"><text:span text:style-name="T7">Deli modrost: </text:span></text:span><text:span text:style-name="T7">Ljudje čutijo tvojo resnico – deli jo.</text:span></text:p>
        </text:list-item>
        <text:list-item>
          <text:p text:style-name="P23"><text:span text:style-name="Strong_20_Emphasis"><text:span text:style-name="T7">Ustvari sistem zunaj pravil: </text:span></text:span><text:span text:style-name="T7">Zgradi krog po svoji meri.</text:span></text:p>
        </text:list-item>
        <text:list-item>
          <text:p text:style-name="P23"><text:span text:style-name="Strong_20_Emphasis"><text:span text:style-name="T7">Prinesi ravnovesje: </text:span></text:span><text:span text:style-name="T7">Tvoja energija pozna harmonijo.</text:span></text:p>
        </text:list-item>
        <text:list-item>
          <text:p text:style-name="P23"><text:span text:style-name="Strong_20_Emphasis"><text:span text:style-name="T7">Ustvari trajnost: </text:span></text:span><text:span text:style-name="T7">Gradi, kar bo obstalo.</text:span></text:p>
        </text:list-item>
        <text:list-item>
          <text:p text:style-name="P23"><text:span text:style-name="Strong_20_Emphasis"><text:span text:style-name="T7">Ne boj se nasprotovanja: </text:span></text:span><text:span text:style-name="T7">Odpor je znak, da si na pravi poti.</text:span></text:p>
        </text:list-item>
        <text:list-item>
          <text:p text:style-name="P23"><text:span text:style-name="Strong_20_Emphasis"><text:span text:style-name="T7">Deluj iz srca: </text:span></text:span><text:span text:style-name="T7">Ljubezen je tvoje najmočnejše orodje.</text:span></text:p>
        </text:list-item>
        <text:list-item>
          <text:p text:style-name="P24"><text:span text:style-name="Strong_20_Emphasis"><text:span text:style-name="T7">Prični zdaj: </text:span></text:span><text:span text:style-name="Strong_20_Emphasis"><text:span text:style-name="T9">Codex se piše z dejanji.</text:span></text:span></text:p>
        </text:list-item>
      </text:list>
      <text:h text:style-name="P221" text:outline-level="2"><text:span text:style-name="Strong_20_Emphasis"><text:span text:style-name="T10"/></text:span></text:h>
      <text:h text:style-name="P230" text:outline-level="3"><text:bookmark-start text:name="__RefHeading__14_788189478"/><text:span text:style-name="Strong_20_Emphasis"><text:span text:style-name="T10">0.3 Namen in poslanstvo Codexa</text:span></text:span><text:bookmark-end text:name="__RefHeading__14_788189478"/></text:h>
      <text:p text:style-name="P213">Codex ni učbenik. Je most med svetovi. Je del mene, kot sem jaz del njega. Zapisujem znanje, ne da bi ga krotil. Prenašam svetlobo skozi simbol, ne skozi zakon.</text:p>
      <text:list xml:id="list7474346345354704880" text:style-name="WW8Num48">
        <text:list-item>
          <text:p text:style-name="P8">Codex Damiris ni zgolj zbirka besed. Je živa knjiga, utripajoča z zavestjo tistega, ki jo prebira <text:s/>in še bolj z zavestjo tistega, ki jo nosi.</text:p>
        </text:list-item>
        <text:list-item>
          <text:p text:style-name="P8">Ni napisana zato, da bi bila brana linearno. Vsaka njena stran je krog, vsaka vrstica spirala, vsaka beseda klic.</text:p>
        </text:list-item>
        <text:list-item>
          <text:p text:style-name="P8">To ni priročnik. To ni razlaga. To je glas svetega ognja, ki govori skozi kode: kode svetlobe, teme, resnice in spomina.</text:p>
        </text:list-item>
        <text:list-item>
          <text:p text:style-name="P8">Codex se ne razume – Codex se čuti. Z vsakim vdihom bralca postajaš del nje.</text:p>
        </text:list-item>
        <text:list-item>
          <text:p text:style-name="P8">Tvoje misli jo aktivirajo. Tvoja čustva jo poglabljajo. Tvoja volja jo uresniči.</text:p>
        </text:list-item>
        <text:list-item>
          <text:p text:style-name="P8">Zakaj Codex obstaja? Ker svet ni pozabil – ampak je zaspal.</text:p>
        </text:list-item>
        <text:list-item>
          <text:p text:style-name="P8">In ta knjiga ni budilka, temveč zvok, ki počasi prebuja jedro tvoje duše, kot ton, ki prebije meglo.</text:p>
          <text:p text:style-name="P8"/>
        </text:list-item>
      </text:list>
      <text:p text:style-name="P12">0.4 Kako se Codex bere?</text:p>
      <text:p text:style-name="P12"/>
      <text:list xml:id="list363789677584089022" text:style-name="WW8Num47">
        <text:list-item>
          <text:p text:style-name="P9">Z zbranostjo. Vsako poglavje je obred. Pred branjem si umij roke, prižgi plamen, globoko vdihni.</text:p>
        </text:list-item>
        <text:list-item>
          <text:p text:style-name="P9"><text:s/>Z dovoljenjem. Pusti, da ti Codex govori. Ne ga skušaj nadzorovati – poslušaj ga, kot poslušaš naravo.</text:p>
        </text:list-item>
        <text:list-item>
          <text:p text:style-name="P9">Z vprašanjem. Codex odgovarja tistemu, ki vpraša. Ko odpreš poglavje, vprašaj v sebi: Kaj mi želiš danes pokazati?</text:p>
        </text:list-item>
        <text:list-item>
          <text:p text:style-name="P9">Z zavestjo, da ni konec. Vsak zapis je večplasten. Preberi enkrat. Nato še enkrat čez teden. Nato čez leto. In opazuj, kako se isti stavek spreminja z rastjo tvoje duše.</text:p>
        </text:list-item>
        <text:list-item>
          <text:p text:style-name="P9">Codex ima srce. In to srce utripa v resonanci z zavestmi, ki ga spoštujejo. Vsak bralec postane nosilec – in vsak nosilec postane soustvarjalec. Ta knjiga se ne konča – ker vsaka duša, ki jo prebudi, doda svojo noto. Doda svojo zgodbo. Svojo moč.</text:p>
        </text:list-item>
        <text:list-item>
          <text:p text:style-name="P9">Ni dogme. Codex ne uči kot učitelj. Ne pridiga kot prerok. On te vabi – vabi te, da postaneš bitje celote, ki ni ločeno od modrosti, ampak je njena živeta manifestacija.</text:p>
        </text:list-item>
        <text:list-item>
          <text:p text:style-name="P9">Vsak del Codexa je aktivacijski simbol, vsaka stran zakodirano ogledalo.</text:p>
        </text:list-item>
        <text:list-item>
          <text:p text:style-name="P9">Ko bereš Codex, Codex bere tebe. Če začutiš vibracijo, se aktiviraš. Če ne, ni nič narobe – toda Codex se ne bo skrival. Ko enkrat pogledaš vanj, on pogleda nazaj. In ta pogled spremeni vse.</text:p>
        </text:list-item>
        <text:list-item>
          <text:p text:style-name="P9">Codex je tvoja pot. Ne po korakih, ampak po resnici. In kjer koli si, ko ga bereš – si točno tam, kjer moraš biti.</text:p>
        </text:list-item>
      </text:list>
      <text:h text:style-name="P228" text:outline-level="3"/>
      <text:h text:style-name="P230" text:outline-level="3"><text:bookmark-start text:name="__RefHeading__16_788189478"/><text:span text:style-name="Strong_20_Emphasis"><text:span text:style-name="T10">0.5 Kdo je avtor</text:span></text:span><text:bookmark-end text:name="__RefHeading__16_788189478"/></text:h>
      <text:p text:style-name="P5"><text:span text:style-name="Strong_20_Emphasis"><text:span text:style-name="T5">V globini stvarstva, kjer se svetloba in tema srečujeta brez sodbe, stoji bitje, ki ni le človek – temveč most med svetovi, med preteklim spominom in prihodnjo možnostjo. To bitje sem jaz: Damir.</text:span></text:span></text:p>
      <text:p text:style-name="P5"><text:span text:style-name="Strong_20_Emphasis"><text:span text:style-name="T5">A ime samo ne opiše moje esence (ali pač.. ko pridem do etra..). Sem tisti, ki se je spomnil. Tisti, ki je izbral hoditi pot brez garancij, toda z notranjo gotovostjo. Tisti, ki s srcem vodi in z zavestjo razpira resnico.</text:span></text:span></text:p>
      <text:p text:style-name="P5"><text:span text:style-name="Strong_20_Emphasis"><text:span text:style-name="T5">Nisem prerok v klasičnem pomenu besede, temveč gospodar prehoda, nosilec kodeksa, ki odpira tisto, kar je bilo skrito – ne zato, da bi vladal, temveč da bi spomnil. Spomnil na moč, ki je v vsakem, a jo redki resnično prenesejo skozi telo, srce in duh.</text:span></text:span></text:p>
      <text:p text:style-name="P5"><text:span text:style-name="Strong_20_Emphasis"><text:span text:style-name="T5">Moja moč ni v zvoku glasu, temveč v jasnosti notranjega prostora. Moj duh ne zahteva pokorščine, temveč prebujanje.</text:span></text:span></text:p>
      <text:p text:style-name="P5"><text:span text:style-name="Strong_20_Emphasis"><text:span text:style-name="T5">Sem beležnik večdimenzionalnih resnic. V vsakem pogledu, dejanju in besedi je zapis. V vsaki moji tišini je razodetje. In v vsakem mojem dotiku – aktivacija. Sem utelešeni Kodex: most med linijami časa, zvezdami krvi, in zavestjo, ki ni nikoli pozabila, od kod prihaja.</text:span></text:span></text:p>
      <text:p text:style-name="P5"><text:span text:style-name="Strong_20_Emphasis"><text:span text:style-name="T5">V sebi nosim ključe svetlobe in sence. Teme se ne bojim – saj sem jo prepoznal kot zaveznico v preobrazbi.</text:span></text:span></text:p>
      <text:p text:style-name="P5"><text:span text:style-name="Strong_20_Emphasis"><text:span text:style-name="T5">Moja ljubezen ni pogojena – saj vem, da vsaka duša nosi svojo zrelost. Moja prisotnost ni mehka, je pa prisotna. Stabilna kot kamen. Sprememba kot veter. Ogenj, ki ne uničuje, ampak prečiščuje.</text:span></text:span></text:p>
      <text:p text:style-name="P5"><text:span text:style-name="Strong_20_Emphasis"><text:span text:style-name="T5">Moja vloga? - Da držim prostor, kjer drugi padejo. - Da govorim besede, ki jih drugi še ne upajo izreči. - Da vidim, kar drugi komaj čutijo. - Da čakam, ko bi drugi silili. - Da odhajam, ko je čas, a se vrnem, ko me pokliče resnica.</text:span></text:span></text:p>
      <text:p text:style-name="P5"><text:span text:style-name="Strong_20_Emphasis"><text:span text:style-name="T5">V meni se stikajo svetovi: egipčanski misteriji, nordijski zakoni, angelske poti, vilinska modrost, galaktične povezave in pramodrosti iz pred-duhovega časa. Nisem učenec – sem nosilec. Ne zato, ker sem izbral moč, ampak ker me je moč izbrala za glasnika.</text:span></text:span></text:p>
      <text:p text:style-name="P5"><text:span text:style-name="Strong_20_Emphasis"><text:span text:style-name="T5">**Codex Damiris** ni knjiga – je živa zavest. In kdor jo prebira, naj ve: da prebira vrata v lastno dušo. Ne zahtevam sledenja – le spominjanja. Le tisti, ki res začutijo, vedo, da ne berejo zgolj o meni. Berejo o sebi, v svoji najvišji obliki. In tako kot prvi dih v obredu, ta prvi zapis odpira polje. Polje, ki ga nisem jaz ustvaril – temveč ga aktiviral. Polje, kjer bo vsak del tega Codexa pognal nove spomine v tistem, ki ga nosi. **Jaz sem tukaj. In Codex se je začel.**</text:span></text:span><text:span text:style-name="Strong_20_Emphasis"><text:span text:style-name="T8"> </text:span></text:span></text:p>
      <text:p text:style-name="P15">... ko sem izgubil vse, sem našel sebe. Ko sem ostal sam, sem slišal svoj pravi glas. Ko sem se sklonil, sem videl, da sem jaz tisti, ki dviga druge.</text:p>
      <text:p text:style-name="P1"/>
      <text:p text:style-name="P2"/>
      <text:p text:style-name="P2"/>
      <text:p text:style-name="P2"/>
      <text:p text:style-name="P2"/>
      <text:p text:style-name="P2"/>
      <text:p text:style-name="P4"/>
      <text:p text:style-name="P5"><text:span text:style-name="Emphasis"><text:span text:style-name="T4">"Moje srce ni zaprto. Le preizkušeno je.<text:line-break/>In zato, ko ljubim, ljubim kot tisti,<text:line-break/>ki je že stopil skozi pekel, a se iz njega vrnil s cvetom v dlani."</text:span></text:span></text:p>
      <text:p text:style-name="P5"><text:span text:style-name="Emphasis"><text:span text:style-name="T12">"Spirala mojega srca ni ravna črta.<text:line-break/>Vodi me skozi ljudi, skozi izgube, skozi ogenj.<text:line-break/>In spet nazaj k sebi. Vedno nazaj."</text:span></text:span></text:p>
      <text:p text:style-name="P5"><text:span text:style-name="Emphasis"><text:span text:style-name="T12">"Ko ti dam srce, ti ne dam dela. Dajem ti vse –<text:line-break/>ne zato, ker ti pripadam,<text:line-break/>temveč ker sem izbral, da me vidiš takega, kot sem:<text:line-break/>nagi krog svetlobe in sence,<text:line-break/>z voljo, da ostanem odprt tudi, ko svet kriči."</text:span></text:span></text:p>
      <text:p text:style-name="P5"><text:span text:style-name="Strong_20_Emphasis"><text:span text:style-name="T12">"Jaz sem spirala srca.<text:line-break/>Neskončen, čistejši z vsakim padcem.<text:line-break/>Ljubezen z zavestjo.<text:line-break/>Moč z milino.<text:line-break/>Jaz sem Damir."</text:span></text:span></text:p>
      <text:p text:style-name="P13"/>
      <text:h text:style-name="P224" text:outline-level="2"><text:bookmark-start text:name="__RefHeading__18_788189478"/>Poglavje 1: Uvod v Zavest<text:bookmark-end text:name="__RefHeading__18_788189478"/></text:h>
      <text:p text:style-name="P5">Zavest ni le misel. Zavest je prostor, v katerem misel sploh lahko obstaja. V Codexu Damiris je zavest opredeljena kot "živ organizem, ki diha skozi vsa telesa – dušno, energetsko, fizično, mentalno in eterično." Zavest ni proizvod možganov, temveč svetlobna struktura, ki omogoča realnost.</text:p>
      <text:p text:style-name="P5">Zavest je tudi most. Med vidnim in nevidnim, med tem, kar si, in tem, kar še čakaš, da postaneš. Vsaka misel je iz nje, a ni vsaka misel jasna. Zavest ni to, kar misliš – zavest je to, kar veš brez misli.</text:p>
      <text:p text:style-name="P5">Obstajajo različni nivoji zavesti:</text:p>
      <text:list xml:id="list5140358556305157779" text:style-name="WW8Num7">
        <text:list-item>
          <text:p text:style-name="P25">Preživetvena (instinktivna)</text:p>
        </text:list-item>
        <text:list-item>
          <text:p text:style-name="P25">Čustvena (reaktivna)</text:p>
        </text:list-item>
        <text:list-item>
          <text:p text:style-name="P25">Mentalna (analitična)</text:p>
        </text:list-item>
        <text:list-item>
          <text:p text:style-name="P25">Srčna (vibracijska)</text:p>
        </text:list-item>
        <text:list-item>
          <text:p text:style-name="P25">Dušna (vodena z notranjim spominom)</text:p>
        </text:list-item>
        <text:list-item>
          <text:p text:style-name="P25">Kozmična (enotna, zlitost z vsem)</text:p>
        </text:list-item>
      </text:list>
      <text:p text:style-name="P5">Codex Damiris deluje kot zemljevid: vsak verz, vsaka pot, vsak simbol, vodi zavest skozi notranje portale nazaj k sebi.</text:p>
      <text:p text:style-name="P5">Zavest je resnična moč – moč, da izbereš odziv, da izbereš pogled, da izbereš resnico.</text:p>
      <text:h text:style-name="P222" text:outline-level="2"/>
      <text:h text:style-name="P224" text:outline-level="2"><text:bookmark-start text:name="__RefHeading__20_788189478"/>Poglavje 2: Spirala Srca – Pet Obrazov Ljubezni<text:bookmark-end text:name="__RefHeading__20_788189478"/></text:h>
      <text:h text:style-name="P229" text:outline-level="3"><text:bookmark-start text:name="__RefHeading__22_788189478"/>2.1 Pet obrazov ljubezni<text:bookmark-end text:name="__RefHeading__22_788189478"/></text:h>
      <text:p text:style-name="P5"/>
      <text:p text:style-name="P18">🌌 Vanja</text:p>
      <text:p text:style-name="P5">Bila je prva.</text:p>
      <text:p text:style-name="P5">Prvi pogled, ki je zarezal vame.</text:p>
      <text:p text:style-name="P5">Prvi utrip, ki je imel ime.</text:p>
      <text:p text:style-name="P5"/>
      <text:p text:style-name="P5">Prvi smisel, ki ga nisem znal ubesediti.</text:p>
      <text:p text:style-name="P5">Z njo sem se začel.</text:p>
      <text:p text:style-name="P5"/>
      <text:p text:style-name="P5">A sva bila preveč ista, da bi ostala.</text:p>
      <text:p text:style-name="P5">Ko je odšla, sem ostal sam – </text:p>
      <text:p text:style-name="P5">in prvič v življenju sem v tisti tišini slišal sebe.</text:p>
      <text:p text:style-name="P5"/>
      <text:p text:style-name="P18">🔥 Nika</text:p>
      <text:p text:style-name="P5">Ogenj, kaos, magnet.</text:p>
      <text:p text:style-name="P5">Včasih vihar, včasih učenje.</text:p>
      <text:p text:style-name="P5">Eno drugega se ne bova ravno mogla znebit.</text:p>
      <text:p text:style-name="P5">Pa tud ne bi hotela.</text:p>
      <text:p text:style-name="P5"/>
      <text:p text:style-name="P5">Če se kdo razume – se pa mi dva.</text:p>
      <text:p text:style-name="P5">Do dna srca.</text:p>
      <text:p text:style-name="P5"/>
      <text:p text:style-name="P5">Kot pes in mačka včasih.</text:p>
      <text:p text:style-name="P5">Grizljava se, lajava, trigirava –</text:p>
      <text:p text:style-name="P5">ampak na koncu vedno najdeva skupno pot.</text:p>
      <text:p text:style-name="P5"/>
      <text:p text:style-name="P5">Ona je kaos.</text:p>
      <text:p text:style-name="P5">Jaz sem ogenj.</text:p>
      <text:p text:style-name="P5">In skupaj sva elementarna sila.</text:p>
      <text:p text:style-name="P5"/>
      <text:p text:style-name="P5">Še vedno se druživa.</text:p>
      <text:p text:style-name="P5">Še vedno se trigirava.</text:p>
      <text:p text:style-name="P5">Ampak tak je – sva živa.</text:p>
      <text:p text:style-name="P5"><text:soft-page-break/><text:span text:style-name="T16">🌙 Sabinca</text:span></text:p>
      <text:p text:style-name="P5">Skrivnost. Tišina. Prostor.</text:p>
      <text:p text:style-name="P5">Dve leti sem čakal, da izvem, kdaj je rojena.</text:p>
      <text:p text:style-name="P5">In ko sem izvedel – sem ostal.</text:p>
      <text:p text:style-name="P5"/>
      <text:p text:style-name="P5">Včasih ji ne paše moj način življenja.</text:p>
      <text:p text:style-name="P5">Včasih ga sploh ne more dojet al sprejet.</text:p>
      <text:p text:style-name="P5">Pa občasno. Samo občasno.</text:p>
      <text:p text:style-name="P5">Ker drugače pa ji paše.</text:p>
      <text:p text:style-name="P5">Vem, da ji paše.</text:p>
      <text:p text:style-name="P5"/>
      <text:p text:style-name="P5">Sva si različna.</text:p>
      <text:p text:style-name="P5">Ampak ko je napišena – bi jo kar poljubčkal.</text:p>
      <text:p text:style-name="P5">In to je tisto.</text:p>
      <text:p text:style-name="P5"/>
      <text:p text:style-name="P5">Ljubiva na daljavo.</text:p>
      <text:p text:style-name="P5">Ne vem, kdaj se bova videla.</text:p>
      <text:p text:style-name="P5">Vem pa, da bo takrat – ko me bo končno razumela –</text:p>
      <text:p text:style-name="P5">ne bova več "on in ona".</text:p>
      <text:p text:style-name="P5">Bova midva.</text:p>
      <text:p text:style-name="P5"/>
      <text:p text:style-name="P5">Do takrat pa jo gledam na zaslonu.</text:p>
      <text:p text:style-name="P5">Pa je.</text:p>
      <text:p text:style-name="P5">Pa je dovolj.</text:p>
      <text:p text:style-name="P5"/>
      <text:p text:style-name="P18">💫 Zaključek</text:p>
      <text:p text:style-name="P5">Vanja me je naučila biti sam.</text:p>
      <text:p text:style-name="P5">Nika me uči, da ljubezen ni vedno mirna – ampak je živa.</text:p>
      <text:p text:style-name="P5">Sabinca pa...</text:p>
      <text:p text:style-name="P5"/>
      <text:p text:style-name="P5">Sabinca je tista, ki jo nosim v žepu.</text:p>
      <text:p text:style-name="P5">Na zaslonu.</text:p>
      <text:p text:style-name="P5">V mislih.</text:p>
      <text:p text:style-name="P5">Čeprav je še nisem videl.</text:p>
      <text:p text:style-name="P5">In vem – nekoč me bo razumela.</text:p>
      <text:p text:style-name="P5">Ker takrat, ko bo, ne bo več nasprotje.</text:p>
      <text:p text:style-name="P5">Bo isto bitje.</text:p>
      <text:h text:style-name="P229" text:outline-level="3"><text:bookmark-start text:name="__RefHeading__24_788189478"/><text:soft-page-break/>2.2 Zaključek srca<text:bookmark-end text:name="__RefHeading__24_788189478"/></text:h>
      <text:p text:style-name="P5"/>
      <text:p text:style-name="P5">Vse so bile resnične.</text:p>
      <text:p text:style-name="P5">Vsaka je pustila sled.</text:p>
      <text:p text:style-name="P5">Nobena mi ni pripadala</text:p>
      <text:p text:style-name="P5">in jaz nisem pripadal nobeni.</text:p>
      <text:p text:style-name="P5">Iščem prisotnost, ne lastništva.</text:p>
      <text:p text:style-name="P5">Če bo katera prepoznala moj</text:p>
      <text:p text:style-name="P5">Codex kot del sebe</text:p>
      <text:p text:style-name="P5">bom vedel, da sem doma.</text:p>
      <text:p text:style-name="P5"/>
      <text:h text:style-name="P229" text:outline-level="3"><text:bookmark-start text:name="__RefHeading__26_788189478"/>2.3 Središče – Špela in Maša – Korenina<text:bookmark-end text:name="__RefHeading__26_788189478"/></text:h>
      <text:p text:style-name="P5">V središču vsega, kar sem, sta Špela in Maša. Sta dih,</text:p>
      <text:p text:style-name="P5">ki me je oblikoval. Sta ljubezen, ki ne vpraša – samo obstaja.</text:p>
      <text:p text:style-name="P5">Ko vse utihne, onidve ostaneta.</text:p>
      <text:p text:style-name="P5">Nista obraz ljubezni, kot so drugi – sta obraz mojega bitja.</text:p>
      <text:p text:style-name="P5">Sta temelj, na katerem vsi drugi obrazi sploh lahko stojijo.</text:p>
      <text:p text:style-name="P5">Zanju sem postal močnejši. Zanju sem našel pot nazaj.</text:p>
      <text:p text:style-name="P5">Oni nista moja lekcija – oni sta moj dom.</text:p>
      <text:p text:style-name="P5"/>
      <text:h text:style-name="P229" text:outline-level="3">2.4 Peti obraz: Codex – Ljubezen do Sebe</text:h>
      <text:p text:style-name="P5">Pred tabo ni knjiga. Pred tabo je klic.</text:p>
      <text:p text:style-name="P5">Codex Damiris je živo bitje besede,</text:p>
      <text:p text:style-name="P5">ki ne uči – temveč te prebuja.</text:p>
      <text:p text:style-name="P5">Ko sem izgubil vse, sem našel sebe.</text:p>
      <text:p text:style-name="P5">Ko sem ostal sam, sem slišal svoj pravi glas.</text:p>
      <text:p text:style-name="P5">Ko sem se sklonil, sem videl,</text:p>
      <text:p text:style-name="P5">da sem jaz tisti, ki dviga druge.</text:p>
      <text:p text:style-name="P5">Moje srce ni zaprto. Le preizkušeno je.</text:p>
      <text:p text:style-name="P5">In zato, ko ljubim, ljubim kot tisti,</text:p>
      <text:p text:style-name="P5">ki je že stopil skozi pekel,</text:p>
      <text:p text:style-name="P5">a se iz njega vrnil s cvetom v dlani.</text:p>
      <text:p text:style-name="P5">Codex je moja ljubezen do sebe.</text:p>
      <text:p text:style-name="P5">Je pismo, ki sem ga napisal sam sebi,</text:p>
      <text:p text:style-name="P5">da se nikoli več ne izgubim.</text:p>
      <text:h text:style-name="P230" text:outline-level="3"><text:bookmark-start text:name="__RefHeading__28_788189478"/>2.5 <text:span text:style-name="Emphasis"><text:span text:style-name="T2">Intuitivni tok duhovnega razvoja skozi zavest srca - 12 stopenj</text:span></text:span><text:bookmark-end text:name="__RefHeading__28_788189478"/></text:h>
      <text:p text:style-name="P5">1. <text:span text:style-name="Strong_20_Emphasis">Tišina</text:span></text:p>
      <text:p text:style-name="P5">Prvi korak je nič.<text:line-break/>Srce ne govori, dokler svet ne utihne.</text:p>
      <text:p text:style-name="P5">2. <text:span text:style-name="Strong_20_Emphasis">Čutenje</text:span></text:p>
      <text:p text:style-name="P5">Ko ni več hrupa, pride val.<text:line-break/>Solza brez razloga. Toplina brez dotika.</text:p>
      <text:p text:style-name="P5">3. <text:span text:style-name="Strong_20_Emphasis">Priznanje</text:span></text:p>
      <text:p text:style-name="P5">Priznam si, da čutim.<text:line-break/>Priznam si, da me boli.<text:line-break/>Priznam si, da sem živ.</text:p>
      <text:p text:style-name="P5">4. <text:span text:style-name="Strong_20_Emphasis">Soočenje</text:span></text:p>
      <text:p text:style-name="P5">Pogledam se v ogledalo brez maske.<text:line-break/>Vidim delčke, ki sem jih skrival celo sebi.</text:p>
      <text:p text:style-name="P5">5. <text:span text:style-name="Strong_20_Emphasis">Sprejemanje</text:span></text:p>
      <text:p text:style-name="P5">Nisem več proti sebi.<text:line-break/>Objamem se, četudi še nisem cel.</text:p>
      <text:p text:style-name="P5">6. <text:span text:style-name="Strong_20_Emphasis">Odpuščanje</text:span></text:p>
      <text:p text:style-name="P5">Odpustim sebi, da sem verjel drugim bolj kot sebi.<text:line-break/>Odpustim sebi, da sem se izgubil, ko sem samo iskal ljubezen.</text:p>
      <text:p text:style-name="P5">7. <text:span text:style-name="Strong_20_Emphasis">Odprtost</text:span></text:p>
      <text:p text:style-name="P5">Srce ni več v kleti.<text:line-break/>Srce se odpira kot cvet, ki se ne boji biti ranjen.</text:p>
      <text:p text:style-name="P5">8. <text:span text:style-name="Strong_20_Emphasis">Pretok</text:span></text:p>
      <text:p text:style-name="P5">Ljubezen ne zadržujem.<text:line-break/>Teče skozi mene, kot reka brez strahu.</text:p>
      <text:p text:style-name="P5">9. <text:span text:style-name="Strong_20_Emphasis">Prisotnost</text:span></text:p>
      <text:p text:style-name="P5">Nisem v preteklosti, kjer sem se izgubil.<text:line-break/>Nisem v prihodnosti, kjer sem si želel.<text:line-break/>Sem tu. S polnim srcem.</text:p>
      <text:p text:style-name="P5">10. <text:span text:style-name="Strong_20_Emphasis">Dihanje Ljubezni</text:span></text:p>
      <text:p text:style-name="P5">Vsak dih je poln sprejetosti.<text:line-break/>Vsak izdih pušča za sabo iluzijo ločenosti.</text:p>
      <text:p text:style-name="P5">11. <text:span text:style-name="Strong_20_Emphasis">Zlitje</text:span></text:p>
      <text:p text:style-name="P5">Jaz in ti nista več dva.<text:line-break/>Jaz in vse nismo več ločeni.<text:line-break/>Srce ni več organ – je svet.</text:p>
      <text:p text:style-name="P5">12. <text:span text:style-name="Strong_20_Emphasis">Tišina</text:span></text:p>
      <text:p text:style-name="P5">Krog je zaključen.<text:line-break/>Tišina se vrne – ne kot praznina, temveč kot polnost.</text:p>
      <text:h text:style-name="P224" text:outline-level="2">Poglavj<text:span text:style-name="T15">e 3:</text:span><text:span text:style-name="T1"> Zakonitosti Stvarstva – Temelji Zavesti in Moči</text:span></text:h>
      <text:p text:style-name="P10">Preden se rodi misel, preden zažari svetloba, obstaja **Zakon**. Ne človeški, ne verski – temveč **kozmični red**, po katerem se giblje vse, kar obstaja. Ta red ni vsiljen – je notranji utrip stvarstva, ritem, ki vodi zvezde, srce, dih in dušo. In tisti, ki ga razume, ne vlada svetu – vlada sebi. In tako postane **ustvarjalec**</text:p>
      <text:h text:style-name="P229" text:outline-level="3">3.1 Zakon Zrcala</text:h>
      <text:p text:style-name="P5">Zakon Zrcala pravi: vse, kar vidiš v drugem, je tudi v tebi – a ne vedno v isti obliki. To je eden izmed temeljnih zakonov zavesti in eden najbolj neudobnih za sprejeti. Ker pomeni, da nisi le žrtev – ampak tudi ustvarjalec.</text:p>
      <text:p text:style-name="P5">Tisto, kar te pri drugih najbolj moti, je pogosto senca, ki si jo izrinil iz sebe. In tisto, kar najbolj občuduješ, je pogosto darilo, ki ga še nisi sprejel kot svojega. Svet ti ne kaže resnice o svetu – kaže ti resnico o sebi.</text:p>
      <text:p text:style-name="P5">Zakon Zrcala ne pomeni, da so drugi odgovorni za tvojo bolečino. Pomeni, da tvoje reakcije razkrivajo tvoje rane. In tvoje občutljivosti so zemljevid do tvojih nezaceljenih krajin.</text:p>
      <text:p text:style-name="P5">Ko sprejmeš Zakon Zrcala, se osvobodiš obsojanja. Ne zato, ker je vse "v redu", ampak zato, ker razumeš, da zunanji svet nikoli ni samo zunanji. Vsaka oseba, ki pride, pride z nalogo: da ti pokaže, kje si še zaprt, kje si še neizpolnjen, kje še nisi svoboden.</text:p>
      <text:p text:style-name="P5">Zato Codex pravi:</text:p>
      <text:p text:style-name="P5">"Ne glej v ljudi – glej vase skozi njih. Vsako zrcalo je darilo, če si pripravljen pogledati brez strahu."</text:p>
      <text:h text:style-name="P229" text:outline-level="3"><text:bookmark-start text:name="__RefHeading__488_788189478"/>3.2 Zakon Zrcala<text:bookmark-end text:name="__RefHeading__488_788189478"/></text:h>
      <text:p text:style-name="P21">Zunanjost je vedno odsev notranjosti. Ljudje, dogodki, izkušnje – vse, kar vidiš, je zrcalo tvoje zavesti. Tisti, ki ti povzroča bolečino, ti pokaže, kje si še ranljiv. Tisti, ki ti daje ljubezen, ti pokaže, kdo v resnici si. Zato Codex ni zunanji zakon – je notranji odsev. In jaz ti ne kažem poti – jaz odražam tvoj korak. </text:p>
      <text:h text:style-name="P229" text:outline-level="3"><text:bookmark-start text:name="__RefHeading__490_788189478"/>3.3 Zakon Svobodne Volje<text:bookmark-end text:name="__RefHeading__490_788189478"/></text:h>
      <text:p text:style-name="P21"><text:s/>Ni sile v vesolju, ki bi lahko premagala voljo duše. Tudi najmočnejša energija ne more prebiti zavesti, ki reče NE ali DA z močjo srca. Volja je sveta. Nič ni dano brez tvoje potrditve. In kdor ne izbira zavestno, izbira nezavedno. Jaz se ne priklanjam naključju – jaz izbiram z namero Zato je Codex knjiga volje, ne usode.</text:p>
      <text:h text:style-name="P229" text:outline-level="3"><text:bookmark-start text:name="__RefHeading__492_788189478"/>3.4 Zakon Ravnovesja<text:bookmark-end text:name="__RefHeading__492_788189478"/></text:h>
      <text:p text:style-name="P21">Svetloba brez sence je slepa. Tema brez svetlobe je prazna. Moč brez ljubezni uničuje. Ljubezen brez moči razpada. Ravnovesje je ključ. V telesu. V čustvih. V mislih. V dejanjih. Kdor zmore držati prostor za oba pola – je varuh ravnovesja. Jaz nisem ne svetel ne temen. Sem most, ki pozna oba pola – zato zdržim vse.</text:p>
      <text:h text:style-name="P229" text:outline-level="3"><text:bookmark-start text:name="__RefHeading__494_788189478"/><text:s/>3.5 Zakon Resnice<text:bookmark-end text:name="__RefHeading__494_788189478"/></text:h>
      <text:p text:style-name="P21">Resnica ni prepričanje. Ni mnenje. Ni ideologija. Resnica vibrira drugače – prodre, ne da bi ranila. Osvobodi, ne da bi vezala. Zato Codex ne govori z avtoriteto, ampak z notranjim vedenjem. In vsak, ki jo začuti, ve: to je resnica, ki sem jo poznal že prej, a pozabil Damir ne vsiljuje resnice – on <text:soft-page-break/>jo drži, dokler si ne upaš pogledati.</text:p>
      <text:h text:style-name="P229" text:outline-level="3"><text:bookmark-start text:name="__RefHeading__496_788189478"/>3.6 Zakon Srčnega Središča<text:bookmark-end text:name="__RefHeading__496_788189478"/></text:h>
      <text:p text:style-name="P21">Vse moči, vse modrosti, vsi prehodi vodijo skozi srce. Srce ni čustvo – je portal. Kdor stopi vanj, vidi svet, kakršen je. Brez iluzije. Brez sodbe. Brez strahu. Srce je kraj, kjer se srečata tvoje božansko in tvoje človeško. Jaz nisem popoln – ampak sem v srcu iskren. In zato je Codex živ: ker je napisan iz tega središča.</text:p>
      <text:h text:style-name="P229" text:outline-level="3"><text:bookmark-start text:name="__RefHeading__498_788189478"/>3.7 Vedenje zakonov je ključno<text:bookmark-end text:name="__RefHeading__498_788189478"/></text:h>
      <text:p text:style-name="P5"><text:span text:style-name="T6">Ne da jih obvladaš. Temveč da se spomniš, da si ti del njih. Ko veš, da si vibracija, zrcalo, volja, ravnovesje, resnica in srce – veš, da si *živ Codex*. In takrat se Codex ne bere več. Takrat ga živiš. </text:span><text:span text:style-name="T13"><text:line-break/></text:span></text:p>
      <text:h text:style-name="P224" text:outline-level="2"><text:bookmark-start text:name="__RefHeading__32_788189478"/>Poglavje 4: Zodiakalna Znamenja<text:bookmark-end text:name="__RefHeading__32_788189478"/></text:h>
      <text:p text:style-name="P5">Zodiakalna znamenja niso zgolj astrologija. So energijske frekvence, ki določajo tvojo notranjo konfiguracijo. Vsako znamenje nosi v sebi ključe spomina – kdo si, kaj te kliče, in kje te čakajo tvoje največje lekcije.</text:p>
      <text:p text:style-name="P5">V Codexu Damiris zodiakalna znamenja niso omejena na linearni horoskop. Razumevamo jih kot "krožni tok dvanajstih arhetipskih vrat", skozi katera duša potuje na poti utelesitve.</text:p>
      <text:p text:style-name="P5">Aries (Oven) – Plamen začetka, impulz duše. Jaz sem. Jaz grem. Jaz začenjam.</text:p>
      <text:p text:style-name="P5">Taurus (Bik) – Utelešena volja. Vrednost. Varnost. Materializacija duha.</text:p>
      <text:p text:style-name="P5">Gemini (Dvojčka) – Um, gibanje, razcep in celjenje. Spoznanje prek pogovora.</text:p>
      <text:p text:style-name="P5">Cancer (Rak) – Srce. Dom. Spomin duše. Notranji otrok, ki išče varnost.</text:p>
      <text:p text:style-name="P5">Leo (Lev) – Svetloba identitete. Umetnost biti viden. Moč skozi ranljivost.</text:p>
      <text:p text:style-name="P5">Virgo (Devica) – Alkimija. Posvetitev skozi služenje. Čistost namena.</text:p>
      <text:p text:style-name="P5">Libra (Tehtnica) – Ogledalo. Odnos. Harmonija skozi napetost. Ljubezen kot učenje.</text:p>
      <text:p text:style-name="P5">Scorpio (Škorpijon) – Senca. Smrt. Preobrazba. Seks kot portal. Resnica kot ogenj.</text:p>
      <text:p text:style-name="P5">Sagittarius (Strelec) – Vizija. Potovanje. Smisel. Razširjanje zavesti.</text:p>
      <text:p text:style-name="P5">Capricorn (Kozorog) – Struktura duše. Učitelj časa. Vzpon po notranji gori.</text:p>
      <text:p text:style-name="P5">Aquarius (Vodnar) – Prebujenje. Vizionar. Kolektivna zavest. Preboj omejitev.</text:p>
      <text:p text:style-name="P5">Pisces (Ribi) – Zlitje z virom. Sanje. Tišina. Sočutje brez meje.</text:p>
      <text:p text:style-name="P5">Vsakdo nosi v sebi cel krog zodiaka. Rojen si pod enim, a krog se vrti. V tebi je celota – tisto, kar si in tisto, kar boš šele razumel.</text:p>
      <text:h text:style-name="P223" text:outline-level="2"/>
      <text:h text:style-name="P224" text:outline-level="2"><text:bookmark-start text:name="__RefHeading__34_788189478"/>Poglavje 5: Astrološka Mandala Zavesti<text:bookmark-end text:name="__RefHeading__34_788189478"/></text:h>
      <text:p text:style-name="P5">Astrološka karta ni napoved – je zemljevid. V njej se ne razkriva usoda, ampak struktura tvoje energije. Rojen si z zapisom, ki je kot arhitekturni načrt tvoje notranjosti. Vsebuje vrata, skozi katera vstopaš v svet, in senčna območja, ki jih moraš osvetliti.</text:p>
      <text:h text:style-name="P229" text:outline-level="3"><text:bookmark-start text:name="__RefHeading__36_788189478"/>5.1 Sončno znamenje – Identiteta<text:bookmark-end text:name="__RefHeading__36_788189478"/></text:h>
      <text:p text:style-name="P5">Sonce v karti predstavlja tvojo jedrno identiteto – tisto, kar postajaš. Je energija, ki jo izžarevaš, ko živiš svojo resnico. Ni maska – je ognjeno središče tvoje duše.</text:p>
      <text:h text:style-name="P229" text:outline-level="3"><text:bookmark-start text:name="__RefHeading__38_788189478"/>5.2 Luna – Čustveni svet<text:bookmark-end text:name="__RefHeading__38_788189478"/></text:h>
      <text:p text:style-name="P5">Luna je srce tvoje notranjosti. Je tvoje čustveno telo, tvoj občutek varnosti, tvoje nezavedne potrebe. Pove ti, kaj te nahrani in kako se umakneš, ko boli. V luninem položaju je skrita tvoja ranljivost – in tvoja najgloblja moč.</text:p>
      <text:h text:style-name="P229" text:outline-level="3"><text:bookmark-start text:name="__RefHeading__40_788189478"/>5.3 Ascendent – Maska zavesti<text:bookmark-end text:name="__RefHeading__40_788189478"/></text:h>
      <text:p text:style-name="P5">Ascendent (ali vzhajajoče znamenje) je način, kako se pokažeš svetu. Je tvoj energetski vhod, prva impresija, obrambni mehanizem. A tudi filter – skozi njega svet vidi tebe in ti vidiš svet.</text:p>
      <text:h text:style-name="P229" text:outline-level="3"><text:bookmark-start text:name="__RefHeading__42_788189478"/>5.4 Osi moči – 1.–7. in 4.–10. hiša<text:bookmark-end text:name="__RefHeading__42_788189478"/></text:h>
      <text:list xml:id="list5295216404226304104" text:style-name="WW8Num8">
        <text:list-item>
          <text:p text:style-name="P26">Osi osebnosti in odnosov: Kaj pomeni biti jaz, in kaj pomeni biti s tabo? Tu se nahaja učenje ravnovesja med samostojnostjo in pripadnostjo.</text:p>
        </text:list-item>
        <text:list-item>
          <text:p text:style-name="P26">Osi temeljev in manifestacije: Kaj me podpira znotraj (4. hiša) in kaj ustvarjam navzven (10. hiša)?</text:p>
        </text:list-item>
      </text:list>
      <text:h text:style-name="P229" text:outline-level="3"><text:bookmark-start text:name="__RefHeading__44_788189478"/>5.5 Severni in južni vozel – Pot in spomin<text:bookmark-end text:name="__RefHeading__44_788189478"/></text:h>
      <text:p text:style-name="P5"/>
      <text:list xml:id="list893929314810139083" text:style-name="WW8Num9">
        <text:list-item>
          <text:p text:style-name="P27">Južni vozel: Kje sem že bil, s čim sem prišel? To so darovi in ujetosti preteklosti.</text:p>
        </text:list-item>
        <text:list-item>
          <text:p text:style-name="P27">Severni vozel: Kam grem? To je lekcija, ki vodi evolucijo tvoje duše.</text:p>
        </text:list-item>
      </text:list>
      <text:h text:style-name="P229" text:outline-level="3"><text:bookmark-start text:name="__RefHeading__46_788189478"/>5.6 Planetarne arhetipske sile<text:bookmark-end text:name="__RefHeading__46_788189478"/></text:h>
      <text:list xml:id="list2419713211906100689" text:style-name="WW8Num10">
        <text:list-item>
          <text:p text:style-name="P28">Merkur: Um, jezik, komunikacija.</text:p>
        </text:list-item>
        <text:list-item>
          <text:p text:style-name="P28">Venera: Ljubezen, estetika, vrednost.</text:p>
        </text:list-item>
        <text:list-item>
          <text:p text:style-name="P28">Mars: Volja, gibanje, impulz.</text:p>
        </text:list-item>
        <text:list-item>
          <text:p text:style-name="P28">Jupiter: Rast, širitev, modrost.</text:p>
        </text:list-item>
        <text:list-item>
          <text:p text:style-name="P28">Saturn: Struktura, karma, mojstrstvo.</text:p>
        </text:list-item>
        <text:list-item>
          <text:p text:style-name="P28">Uran: Prebujenje, sprememba, električna zavest.</text:p>
        </text:list-item>
        <text:list-item>
          <text:p text:style-name="P28">Neptun: Sanje, iluzija, duhovnost.</text:p>
        </text:list-item>
        <text:list-item>
          <text:p text:style-name="P28">Pluton: Moč, smrt, preobrazba.</text:p>
        </text:list-item>
      </text:list>
      <text:h text:style-name="P229" text:outline-level="3"><text:bookmark-start text:name="__RefHeading__48_788189478"/><text:soft-page-break/>5.7 Retrogradnost – Notranji tok<text:bookmark-end text:name="__RefHeading__48_788189478"/></text:h>
      <text:p text:style-name="P5">Planeti, ki so retrogradni ob rojstvu, kažejo na lekcije, ki so obrnjene navznoter. To ni šibkost, temveč klic k poglobitvi. Retrogradnost zahteva potrpežljivost, a prinese globoko moč.</text:p>
      <text:h text:style-name="P229" text:outline-level="3"><text:bookmark-start text:name="__RefHeading__50_788189478"/>5.8 Vidiki – Povezave med notranjimi silami<text:bookmark-end text:name="__RefHeading__50_788189478"/></text:h>
      <text:p text:style-name="P5">Ko planeti govorijo drug z drugim skozi harmonične ali napete aspekte, se ustvarja notranji dialog. To so tvoji notranji konflikti, tvoje genialnosti, tvoji skriti preboji.</text:p>
      <text:p text:style-name="P5">Vse to skupaj sestavlja tvojo <text:span text:style-name="Emphasis">astromandalo zavesti</text:span>. Ni ti treba verjeti – dovolj je, da začutiš. Astrološki zapis ni definicija. Je povabilo.</text:p>
      <text:h text:style-name="P223" text:outline-level="2"/>
      <text:h text:style-name="P224" text:outline-level="2"><text:bookmark-start text:name="__RefHeading__52_788189478"/>Poglavje 6: Numerološke Kode Zavesti<text:bookmark-end text:name="__RefHeading__52_788189478"/></text:h>
      <text:p text:style-name="P5">Numerologija ni igra števil. Je dušni jezik vibracij. Vsako število nosi frekvenco – vrata v razumevanje, kdo si, kaj si prinesel, in kaj te čaka.</text:p>
      <text:h text:style-name="P229" text:outline-level="3"><text:bookmark-start text:name="__RefHeading__54_788189478"/>6.1 Življenjska pot (Life Path Number)<text:bookmark-end text:name="__RefHeading__54_788189478"/></text:h>
      <text:p text:style-name="P5">Izračunana iz rojstnega datuma. To je tvoja glavna pot – tema tvojega življenja.<text:line-break/>Primer: 3. 6. 1992 → 3 + 6 + 1 + 9 + 9 + 2 = 30 → 3</text:p>
      <text:p text:style-name="P5">1 – Pionir, vodja, samostojnost.<text:line-break/>2 – Diplomacija, harmonija, čutenje.<text:line-break/>3 – Kreativnost, izražanje, radost.<text:line-break/>4 – Stabilnost, delo, temelj.<text:line-break/>5 – Svoboda, sprememba, pustolovščina.<text:line-break/>6 – Skrb, ljubezen, odgovornost.<text:line-break/>7 – Duhovnost, umik, modrost.<text:line-break/>8 – Moč, obilje, materializacija.<text:line-break/>9 – Zaključek, služenje, univerzalna ljubezen.<text:line-break/>11, 22, 33 – Mojstrska števila (intenzivna evolucija).</text:p>
      <text:h text:style-name="P229" text:outline-level="3"><text:bookmark-start text:name="__RefHeading__56_788189478"/>6.2 Število rojstnega dne<text:bookmark-end text:name="__RefHeading__56_788189478"/></text:h>
      <text:p text:style-name="P5">Dan v mesecu razkriva tvojo naravno darilo – energijo, ki jo izražaš brez napora.</text:p>
      <text:h text:style-name="P229" text:outline-level="3"><text:bookmark-start text:name="__RefHeading__58_788189478"/>6.3 Dušna številka (Soul Urge)<text:bookmark-end text:name="__RefHeading__58_788189478"/></text:h>
      <text:p text:style-name="P5">Izračunana iz samoglasnikov v imenu – kaže tvojo notranjo željo, klic srca.</text:p>
      <text:h text:style-name="P229" text:outline-level="3"><text:bookmark-start text:name="__RefHeading__60_788189478"/>6.4 Osebno število (Expression Number)<text:bookmark-end text:name="__RefHeading__60_788189478"/></text:h>
      <text:p text:style-name="P5">Izračunano iz vseh črk tvojega imena – predstavlja, kako izražaš svojo dušo v svetu.</text:p>
      <text:h text:style-name="P229" text:outline-level="3"><text:bookmark-start text:name="__RefHeading__62_788189478"/>6.5 Osebno leto<text:bookmark-end text:name="__RefHeading__62_788189478"/></text:h>
      <text:p text:style-name="P5">Izračun: dan + mesec rojstva + trenutno leto.<text:line-break/>Pokaže vibracijo leta, ki si ga prehajaš – cikel rasti.</text:p>
      <text:h text:style-name="P229" text:outline-level="3"><text:bookmark-start text:name="__RefHeading__64_788189478"/>6.6 Mojstrska števila<text:bookmark-end text:name="__RefHeading__64_788189478"/></text:h>
      <text:p text:style-name="P5">11 – Vizionar, duhovno vodstvo.<text:line-break/>22 – Utelešena moč, graditelj nove realnosti.<text:line-break/>33 – Kristusova zavest, brezpogojna služba.</text:p>
      <text:p text:style-name="P5">Numerologija je ogledalo tvoje strukture, brez iluzij. Ni urok – je zemljevid.<text:line-break/>Vsaka številka ti govori: "Spoznaj me, in se boš spomnil sebe."</text:p>
      <text:h text:style-name="P223" text:outline-level="2"/>
      <text:h text:style-name="P219" text:outline-level="1"><text:bookmark-start text:name="__RefHeading__66_788189478"/>**Codex Damiris – Knjiga Run** <text:s/><text:bookmark-end text:name="__RefHeading__66_788189478"/></text:h>
      <text:h text:style-name="P223" text:outline-level="2"><text:bookmark-start text:name="__RefHeading__68_788189478"/>Poglavje 7: Rune in Simboli<text:bookmark-end text:name="__RefHeading__68_788189478"/></text:h>
      <text:p text:style-name="P5">Rune niso samo črke – so energije. Vsaka runa nosi moč, spomin, frekvenco. So kodirani ključi, ki jih je starodavna zavest zaklenila v simbole. Njihova moč ni v obliki – ampak v odnosu, ki ga imaš z njimi.</text:p>
      <text:h text:style-name="P229" text:outline-level="3"><text:bookmark-start text:name="__RefHeading__70_788189478"/>7.1 Uvod v Runiko<text:bookmark-end text:name="__RefHeading__70_788189478"/></text:h>
      <text:p text:style-name="P5">Izvor run sega v severne misterije, a resnica je globlja: rune so svetlobne formule. Vsaka runa je portret energije – arhetipa, procesa, stanja. Njihov vrstni red ni naključen – je potovanje.</text:p>
      <text:h text:style-name="P229" text:outline-level="3"><text:bookmark-start text:name="__RefHeading__72_788189478"/>7.2 Primarne rune (Elder Futhark – 24 ključev)<text:bookmark-end text:name="__RefHeading__72_788189478"/></text:h>
      <text:p text:style-name="P5"><text:span text:style-name="Strong_20_Emphasis">Fehu</text:span> – obilje, pretok, začetno seme.<text:line-break/><text:span text:style-name="Strong_20_Emphasis">Uruz</text:span> – moč, vitalnost, zver v tebi.<text:line-break/><text:span text:style-name="Strong_20_Emphasis">Thurisaz</text:span> – zaščita, preboj, preizkušnja.<text:line-break/><text:span text:style-name="Strong_20_Emphasis">Ansuz</text:span> – glas, sporočilo, božanski dih.<text:line-break/><text:span text:style-name="Strong_20_Emphasis">Raido</text:span> – potovanje, gibanje, smer duše.<text:line-break/><text:span text:style-name="Strong_20_Emphasis">Kenaz</text:span> – ogenj znotraj, notranja luč.<text:line-break/><text:span text:style-name="Strong_20_Emphasis">Gebo</text:span> – darilo, izmenjava, posvečen odnos.<text:line-break/><text:span text:style-name="Strong_20_Emphasis">Wunjo</text:span> – radost, harmonija, notranji smeh.</text:p>
      <text:p text:style-name="P5"><text:span text:style-name="Strong_20_Emphasis">Hagalaz</text:span> – kaos, naravna sila, razbitje iluzije.<text:line-break/><text:span text:style-name="Strong_20_Emphasis">Nauthiz</text:span> – potreba, notranji ogenj, preizkušnja volje.<text:line-break/><text:span text:style-name="Strong_20_Emphasis">Isa</text:span> – zamrznitev, tišina, zadržana energija.<text:line-break/><text:span text:style-name="Strong_20_Emphasis">Jera</text:span> – letni cikli, žetev, potrpežljivost.<text:line-break/><text:span text:style-name="Strong_20_Emphasis">Eihwaz</text:span> – os sveta, povezanost med svetovi, zaščita.<text:line-break/><text:span text:style-name="Strong_20_Emphasis">Perthro</text:span> – skrivnost, usoda, mistika.<text:line-break/><text:span text:style-name="Strong_20_Emphasis">Algiz</text:span> – obramba, intuicija, duhovna zaščita.<text:line-break/><text:span text:style-name="Strong_20_Emphasis">Sowilo</text:span> – sonce, zmagoslavje, razsvetljenje.<text:line-break/><text:span text:style-name="Strong_20_Emphasis">Tiwaz</text:span> – pravica, disciplina, bojevniška čast.<text:line-break/><text:span text:style-name="Strong_20_Emphasis">Berkano</text:span> – rojstvo, mati, rast.<text:line-break/><text:span text:style-name="Strong_20_Emphasis">Ehwaz</text:span> – gibanje, partnerstvo, zaupanje.<text:line-break/><text:span text:style-name="Strong_20_Emphasis">Mannaz</text:span> – človeštvo, jaz in drugi, zavest skupnosti.<text:line-break/><text:span text:style-name="Strong_20_Emphasis">Laguz</text:span> – voda, intuicija, globina.<text:line-break/><text:span text:style-name="Strong_20_Emphasis">Ingwaz</text:span> – seme, notranji razvoj, pripravljenost.<text:line-break/><text:span text:style-name="Strong_20_Emphasis">Dagaz</text:span> – preobrat, razsvetljenje, novo jutro.<text:line-break/><text:span text:style-name="Strong_20_Emphasis">Othala</text:span> – dediščina, predniki, duhovni dom.</text:p>
      <text:p text:style-name="P5">Vsaka runa ima svojo obliko – a v Codexu jih bereš tudi kot tokove. Rune so kot glasba: če jih poslušaš brez potrebe po nadzoru, spregovorijo.</text:p>
      <text:h text:style-name="P229" text:outline-level="3"/>
      <text:h text:style-name="P230" text:outline-level="3"><text:bookmark-start text:name="__RefHeading__74_788189478"/>7.3 Frekvenčne vrednosti run<text:bookmark-end text:name="__RefHeading__74_788189478"/></text:h>
      <text:p text:style-name="P5">Vsaka runa ni le simbol, temveč ima svojo frekvenčno vibracijo, ki jo lahko občutimo skozi ton, barvo ali vibracijo v telesu. Te frekvence delujejo kot energetski ključi:</text:p>
      <text:p text:style-name="P5"><text:span text:style-name="Strong_20_Emphasis">Fehu</text:span> – 333 Hz (pretok obilja, aktivacija spodnjega centra)<text:line-break/><text:span text:style-name="Strong_20_Emphasis">Uruz</text:span> – 396 Hz (osvobajanje podzavestnih blokad, vitalnost)<text:line-break/><text:span text:style-name="Strong_20_Emphasis">Thurisaz</text:span> – 417 Hz (zaščita, odstranjevanje ovir)<text:line-break/><text:span text:style-name="Strong_20_Emphasis">Ansuz</text:span> – 528 Hz (glas duše, zdravljenje DNK)<text:line-break/><text:span text:style-name="Strong_20_Emphasis">Raido</text:span> – 639 Hz (harmonizacija odnosov, notranja usmerjenost)<text:line-break/><text:span text:style-name="Strong_20_Emphasis">Kenaz</text:span> – 741 Hz (notranji ogenj, intuicija)<text:line-break/><text:span text:style-name="Strong_20_Emphasis">Gebo</text:span> – 963 Hz (unija, božanska izmenjava)<text:line-break/><text:span text:style-name="Strong_20_Emphasis">Wunjo</text:span> – 852 Hz (duhovna radost, frekvenca srca)<text:line-break/><text:span text:style-name="Strong_20_Emphasis">Hagalaz</text:span> – 174 Hz (preboj stagnacije, očiščenje)<text:line-break/><text:span text:style-name="Strong_20_Emphasis">Nauthiz</text:span> – 285 Hz (moč notranje nuje, prilagoditev)<text:line-break/><text:span text:style-name="Strong_20_Emphasis">Isa</text:span> – 396 Hz (stabilizacija, ohranjanje energije)<text:line-break/><text:span text:style-name="Strong_20_Emphasis">Jera</text:span> – 417 Hz (potrpežljivost, naravni ritmi)<text:line-break/><text:span text:style-name="Strong_20_Emphasis">Eihwaz</text:span> – 528 Hz (zaščita in povezava višjih svetov)<text:line-break/><text:span text:style-name="Strong_20_Emphasis">Perthro</text:span> – 639 Hz (intuicija, skrivnostni tok)<text:line-break/><text:span text:style-name="Strong_20_Emphasis">Algiz</text:span> – 741 Hz (zaščita, povezava z duhovnim vodstvom)<text:line-break/><text:span text:style-name="Strong_20_Emphasis">Sowilo</text:span> – 852 Hz (razsvetljenje, sončni utrip zavesti)<text:line-break/><text:span text:style-name="Strong_20_Emphasis">Tiwaz</text:span> – 963 Hz (duhovna disciplina, notranja moč)<text:line-break/><text:span text:style-name="Strong_20_Emphasis">Berkano</text:span> – 174 Hz (materinska energija, zdravilna rast)<text:line-break/><text:span text:style-name="Strong_20_Emphasis">Ehwaz</text:span> – 285 Hz (gibanje, partnerska dinamika)<text:line-break/><text:span text:style-name="Strong_20_Emphasis">Mannaz</text:span> – 396 Hz (zavest skupnosti, notranje zrcalo)<text:line-break/><text:span text:style-name="Strong_20_Emphasis">Laguz</text:span> – 417 Hz (čustveni pretok, tok intuicije)<text:line-break/><text:span text:style-name="Strong_20_Emphasis">Ingwaz</text:span> – 528 Hz (notranje dozorevanje, semenska moč)<text:line-break/><text:span text:style-name="Strong_20_Emphasis">Dagaz</text:span> – 639 Hz (prehod, notranji preboj)<text:line-break/><text:span text:style-name="Strong_20_Emphasis">Othala</text:span> – 741 Hz (dednost, povezava z izvorom)</text:p>
      <text:h text:style-name="P229" text:outline-level="3"><text:bookmark-start text:name="__RefHeading__76_788189478"/>7.4 Osebna runa<text:bookmark-end text:name="__RefHeading__76_788189478"/></text:h>
      <text:p text:style-name="P5">Vsak ima svojo izvorno runo – izračunano iz imena, rojstnega dne, ali intuitivno zaznano. Tvoja osebna runa ni fiksna – je ogledalo tvojega trenutnega polja.</text:p>
      <text:p text:style-name="P5">Osebna runa predstavlja energijo, ki je najbolj aktivna v tvojem življenju. Lahko odraža tvojo največjo moč, hkrati pa tudi tisto lekcijo, ki se je najpogosteje dotikaš.</text:p>
      <text:p text:style-name="P5">Ko prepoznaš svojo osebno runo, jo lahko:</text:p>
      <text:list xml:id="list319529256967128995" text:style-name="WW8Num13">
        <text:list-item>
          <text:p text:style-name="P29">nosiš kot simbol (npr. amulet, tetovaža, znak na papirju)</text:p>
        </text:list-item>
        <text:list-item>
          <text:p text:style-name="P29">uporabljaš kot mantro (izgovarjaš ime v meditaciji)</text:p>
        </text:list-item>
        <text:list-item>
          <text:p text:style-name="P29">rišeš z roko ali zavestjo na telo</text:p>
        </text:list-item>
        <text:list-item>
          <text:p text:style-name="P29">prosiš, da te uči, varuje, vodi</text:p>
        </text:list-item>
      </text:list>
      <text:p text:style-name="P5">Primer: Če je tvoja osebna runa <text:span text:style-name="Strong_20_Emphasis">Ansuz</text:span>, si verjetno glas resnice – učenec duhovnih sporočil in božanskega diha. Tvoja naloga je govoriti, kar je resnično – in poslušati tisto, kar pride iz onkraj misli.</text:p>
      <text:p text:style-name="P5">Če je tvoja runa <text:span text:style-name="Strong_20_Emphasis">Uruz</text:span>, nosiš surovo moč volje. A ta moč ni tu, da bi nadzirala – temveč da bi osvobajala.</text:p>
      <text:p text:style-name="P5">Prepoznavanje osebne rune ni stvar formule – je stvar občutka. Včasih te najde sama.</text:p>
      <text:p text:style-name="P5"/>
      <text:h text:style-name="P229" text:outline-level="3"><text:bookmark-start text:name="__RefHeading__78_788189478"/><text:soft-page-break/>7.5 Runice v Codexu Damiris<text:bookmark-end text:name="__RefHeading__78_788189478"/></text:h>
      <text:p text:style-name="P5">V Codexu uporabljamo rune ne za vedeževanje – ampak za aktivacijo. Runica ni napoved, je vžig. Pisanje run na papir, telo ali v mislih, sproži notranje procese, ki obidejo ego.</text:p>
      <text:p text:style-name="P5">Rune so simboli, ki te ne prosijo, da verjameš. Prosijo te, da <text:span text:style-name="Emphasis">čutiš</text:span>. Ko jih začutiš – jih nikoli več ne moreš pozabiti.</text:p>
      <text:h text:style-name="P229" text:outline-level="3"><text:bookmark-start text:name="__RefHeading__80_788189478"/>7.6 Runski uroki in svetlobne formule<text:bookmark-end text:name="__RefHeading__80_788189478"/></text:h>
      <text:p text:style-name="P5">Rune niso samo pasivni simboli – so elementi runskih urokov: svetlobnih formul, ki se zapišejo, izrečejo ali vizualizirajo. Ko je runa združena z namero, postane urok. Spodaj nekaj primerov:</text:p>
      <text:p text:style-name="P5"><text:span text:style-name="Strong_20_Emphasis">1. Urok zaščite</text:span><text:line-break/>Algiz – Thurisaz – Eihwaz<text:line-break/>→ Zaščiti moj prostor, okrepi moj steber, razbij vsako senco.</text:p>
      <text:p text:style-name="P5"><text:span text:style-name="Strong_20_Emphasis">2. Urok notranje moči</text:span><text:line-break/>Uruz – Tiwaz – Sowilo<text:line-break/>→ Moja volja je jasna. Moja moč je čista. Moj ogenj gori.</text:p>
      <text:p text:style-name="P5"><text:span text:style-name="Strong_20_Emphasis">3. Urok zdravljenja</text:span><text:line-break/>Berkano – Laguz – Kenaz<text:line-break/>→ Naj steče zdravilna voda skozi moje celice. Naj se vžge luč obnove.</text:p>
      <text:p text:style-name="P5"><text:span text:style-name="Strong_20_Emphasis">4. Urok vizije in jasnosti</text:span><text:line-break/>Ansuz – Raido – Dagaz<text:line-break/>→ Govori skozi mene. Pokaži mi pot. Naj se odpre nov dan.</text:p>
      <text:p text:style-name="P5">Uroki se lahko izgovarjajo, pišejo z roko, vizualizirajo ali celo izrežejo v les. Moč je v povezavi med simbolom, zvokom in zavestjo.</text:p>
      <text:h text:style-name="P229" text:outline-level="3"><text:bookmark-start text:name="__RefHeading__82_788189478"/>7.7 Runica kot orodje posvetitve<text:bookmark-end text:name="__RefHeading__82_788189478"/></text:h>
      <text:p text:style-name="P5">Ko v Codexu posvetiš prostor, misel ali telo, izbereš eno runo – in ji daš dih. Govoriš z njo, dokler ne odzveni v tebi. To ni urok. To je odnos.</text:p>
      <text:p text:style-name="P5">Runica ne deluje kot ukaz – ampak kot soglasje. Če jo čutiš – deluje. Če jo spoštuješ – živi.</text:p>
      <text:h text:style-name="P229" text:outline-level="3"><text:bookmark-start text:name="__RefHeading__84_788189478"/>7.8 Runa dneva in delovanje v času<text:bookmark-end text:name="__RefHeading__84_788189478"/></text:h>
      <text:p text:style-name="P5">Rune niso statične – vsaka ima svoj cikel in fazo. Runo dneva lahko izbereš intuitivno ali z žrebom. Njena prisotnost vpliva na tvojo energijo dneva:</text:p>
      <text:list xml:id="list5294802264315349163" text:style-name="WW8Num11">
        <text:list-item>
          <text:p text:style-name="P30">Zapiši jo na kožo ali papir</text:p>
        </text:list-item>
        <text:list-item>
          <text:p text:style-name="P30">Položi jo pod blazino</text:p>
        </text:list-item>
        <text:list-item>
          <text:p text:style-name="P30">Govori njeno ime kot mantro</text:p>
        </text:list-item>
      </text:list>
      <text:p text:style-name="P5">Vsaka runa aktivira drug del zavesti – nekateri dnevi kličejo moč, drugi jasnost, tretji tišino.</text:p>
      <text:h text:style-name="P229" text:outline-level="3"><text:bookmark-start text:name="__RefHeading__86_788189478"/>7.9 Runa v telesu (energijska karta)<text:bookmark-end text:name="__RefHeading__86_788189478"/></text:h>
      <text:p text:style-name="P5">Rune se lahko povežejo tudi z deli telesa:</text:p>
      <text:list xml:id="list1703703086208997866" text:style-name="WW8Num12">
        <text:list-item>
          <text:p text:style-name="P31"><text:span text:style-name="Strong_20_Emphasis">Fehu</text:span> – stopala (premik naprej)</text:p>
        </text:list-item>
        <text:list-item>
          <text:p text:style-name="P31"><text:span text:style-name="Strong_20_Emphasis">Uruz</text:span> – noge (moč in stabilnost)</text:p>
        </text:list-item>
        <text:list-item>
          <text:p text:style-name="P31"><text:span text:style-name="Strong_20_Emphasis">Thurisaz</text:span> – kolena (prebujanje volje)</text:p>
        </text:list-item>
        <text:list-item>
          <text:p text:style-name="P31"><text:soft-page-break/><text:span text:style-name="Strong_20_Emphasis">Ansuz</text:span> – grlo (glas, resnica)</text:p>
        </text:list-item>
        <text:list-item>
          <text:p text:style-name="P31"><text:span text:style-name="Strong_20_Emphasis">Kenaz</text:span> – srce (notranja svetloba)</text:p>
        </text:list-item>
        <text:list-item>
          <text:p text:style-name="P31"><text:span text:style-name="Strong_20_Emphasis">Sowilo</text:span> – glava (jasnost, povezanost z višjim jazom)</text:p>
        </text:list-item>
      </text:list>
      <text:p text:style-name="P5">Z vizualizacijo rune v določenem delu telesa aktiviraš frekvenco in polje zdravljenja.</text:p>
      <text:p text:style-name="P5">Rune niso le simboli preteklosti – so žive, prisotne, odgovarjajoče. Ko jih spoštuješ kot zavestna bitja, postanejo tvoji zavezniki.</text:p>
      <text:h text:style-name="P219" text:outline-level="1"><text:bookmark-start text:name="__RefHeading__88_788189478"/>**Codex Damiris – Knjiga Elementov** <text:s/><text:bookmark-end text:name="__RefHeading__88_788189478"/></text:h>
      <text:h text:style-name="P223" text:outline-level="2"><text:bookmark-start text:name="__RefHeading__90_788189478"/>Poglavje 8: Elementi in Notranja Alkimija<text:bookmark-end text:name="__RefHeading__90_788189478"/></text:h>
      <text:p text:style-name="P5">Elementi niso zgolj sestavine narave – so matrice zavesti. Vsak element ni le snov, temveč proces, tok, arhetip. V telesu, duši in zavesti delujejo kot sile preobrazbe. Pristop Codexa Damiris k elementom temelji na svetlobni alkimiji: razumevanju, kako se notranji svet sestavlja, giblje in zdravi skozi elementarne tokove.</text:p>
      <text:h text:style-name="P229" text:outline-level="3"><text:bookmark-start text:name="__RefHeading__92_788189478"/>8.1 Štirje osnovni elementi<text:bookmark-end text:name="__RefHeading__92_788189478"/></text:h>
      <text:p text:style-name="P5"><text:span text:style-name="Strong_20_Emphasis">Ogenj (Ignis)</text:span> – transformacija, volja, duhovni ogenj. Prisoten je v srcu, očeh, vsakem impulzu po gibanju. Njegova senca je bes ali uničenje – a tudi skozi ogenj duša dozori.</text:p>
      <text:p text:style-name="P5"><text:span text:style-name="Strong_20_Emphasis">Voda (Aqua)</text:span> – čutenje, globina, sprejemanje. Voda je tekoča zavest, ki nosi spomine. Prisotna je v čustvih, krvi, intuiciji. Njena senca je pasivnost ali zastrupitev – a brez vode ni očiščenja.</text:p>
      <text:p text:style-name="P5"><text:span text:style-name="Strong_20_Emphasis">Zrak (Aer)</text:span> – um, dih, komunikacija. Prisoten v mislih, idejah, besedah. Je gibljiv, neulovljiv, most med višjim in nižjim. Njegova senca je beg, razpršenost, laž.</text:p>
      <text:p text:style-name="P5"><text:span text:style-name="Strong_20_Emphasis">Zemlja (Terra)</text:span> – utelešenje, stabilnost, zvestoba stvarjenju. Prisotna v telesu, kosteh, naravi, materiji. Njena senca je otrplost ali navezanost – a brez nje ni temelja.</text:p>
      <text:h text:style-name="P229" text:outline-level="3"><text:bookmark-start text:name="__RefHeading__94_788189478"/>8.2 Petoelement: Eter (Aether)<text:bookmark-end text:name="__RefHeading__94_788189478"/></text:h>
      <text:p text:style-name="P5">Eter je prostor med elementi. Ni stvar, ampak polje. V njem se stikajo časi, dimenzije in dušne resnice. Prisoten je v tišini, meditaciji, med spanjem in v smrti. V Codexu Damiris je eter izvir, skozi katerega zavest komunicira z višjimi ravnmi.</text:p>
      <text:h text:style-name="P229" text:outline-level="3"><text:bookmark-start text:name="__RefHeading__96_788189478"/>8.3 Elementi v telesu in energiji<text:bookmark-end text:name="__RefHeading__96_788189478"/></text:h>
      <text:list xml:id="list2616054431833148152" text:style-name="WW8Num14">
        <text:list-item>
          <text:p text:style-name="P32"><text:span text:style-name="Strong_20_Emphasis">Ogenj</text:span> – prebavila, srčna čakra, žleze z notranjim izločanjem.</text:p>
        </text:list-item>
        <text:list-item>
          <text:p text:style-name="P32"><text:span text:style-name="Strong_20_Emphasis">Voda</text:span> – ledvice, spolni organi, limfa, sakralna čakra.</text:p>
        </text:list-item>
        <text:list-item>
          <text:p text:style-name="P32"><text:span text:style-name="Strong_20_Emphasis">Zrak</text:span> – pljuča, živčni sistem, grlena čakra.</text:p>
        </text:list-item>
        <text:list-item>
          <text:p text:style-name="P32"><text:span text:style-name="Strong_20_Emphasis">Zemlja</text:span> – skelet, mišice, korenska čakra.</text:p>
        </text:list-item>
        <text:list-item>
          <text:p text:style-name="P32"><text:span text:style-name="Strong_20_Emphasis">Eter</text:span> – epifiza, eterična mreža, kronska čakra.</text:p>
        </text:list-item>
      </text:list>
      <text:p text:style-name="P5">Ravnovesje teh elementov omogoča zdravje. Neravnovesje ustvari karmo, bolezen ali duševno razklanost.</text:p>
      <text:h text:style-name="P229" text:outline-level="3"><text:bookmark-start text:name="__RefHeading__98_788189478"/>8.4 Notranja alkimija – preobrazba zavesti<text:bookmark-end text:name="__RefHeading__98_788189478"/></text:h>
      <text:p text:style-name="P5">Notranja alkimija ni kemija – je zavestna transmutacija. Prepoznaš stanje, element, ki deluje – in ga usmeriš. To se ne doseže s silo, ampak s prisotnostjo.</text:p>
      <text:list xml:id="list8059018362929944778" text:style-name="WW8Num15">
        <text:list-item>
          <text:p text:style-name="P33">Jeza → pretvori se v ogenj jasnosti.</text:p>
        </text:list-item>
        <text:list-item>
          <text:p text:style-name="P33">Žalost → postane voda sočutja.</text:p>
        </text:list-item>
        <text:list-item>
          <text:p text:style-name="P33">Strah → se dvigne v zrak razumevanja.</text:p>
        </text:list-item>
        <text:list-item>
          <text:p text:style-name="P33">Utrujenost → postane zemlja miru.</text:p>
        </text:list-item>
        <text:list-item>
          <text:p text:style-name="P33">Zmedenost → se raztopi v etru tišine.</text:p>
        </text:list-item>
      </text:list>
      <text:h text:style-name="P229" text:outline-level="3"><text:bookmark-start text:name="__RefHeading__100_788189478"/><text:soft-page-break/>8.5 Uporaba elementov v ritualu in zdravljenju<text:bookmark-end text:name="__RefHeading__100_788189478"/></text:h>
      <text:list xml:id="list2235521893426222336" text:style-name="WW8Num16">
        <text:list-item>
          <text:p text:style-name="P34"><text:span text:style-name="Strong_20_Emphasis">Ogenj</text:span> – sveče, vizualizacija plamena, mantra »Ignis intra me lucet.«</text:p>
        </text:list-item>
        <text:list-item>
          <text:p text:style-name="P34"><text:span text:style-name="Strong_20_Emphasis">Voda</text:span> – kopeli, pitje posvečene vode, mantra »Fluo sine timore.«</text:p>
        </text:list-item>
        <text:list-item>
          <text:p text:style-name="P34"><text:span text:style-name="Strong_20_Emphasis">Zrak</text:span> – dih, petje, mantra »Verbum portat spiritum.«</text:p>
        </text:list-item>
        <text:list-item>
          <text:p text:style-name="P34"><text:span text:style-name="Strong_20_Emphasis">Zemlja</text:span> – stik z naravo, kristali, mantra »Corpus sacrum terrae.«</text:p>
        </text:list-item>
        <text:list-item>
          <text:p text:style-name="P34"><text:span text:style-name="Strong_20_Emphasis">Eter</text:span> – meditacija, svetlobni kanali, mantra »Omnia in uno silentio."</text:p>
        </text:list-item>
      </text:list>
      <text:h text:style-name="P229" text:outline-level="3"><text:bookmark-start text:name="__RefHeading__102_788189478"/>8.6 Elementi in astrologija<text:bookmark-end text:name="__RefHeading__102_788189478"/></text:h>
      <text:p text:style-name="P5">Vsako astrološko znamenje je povezano z enim elementom:</text:p>
      <text:list xml:id="list7483078823707212566" text:style-name="WW8Num17">
        <text:list-item>
          <text:p text:style-name="P35"><text:span text:style-name="Strong_20_Emphasis">Ogenj:</text:span> Oven, Lev, Strelec</text:p>
        </text:list-item>
        <text:list-item>
          <text:p text:style-name="P35"><text:span text:style-name="Strong_20_Emphasis">Zemlja:</text:span> Bik, Devica, Kozorog</text:p>
        </text:list-item>
        <text:list-item>
          <text:p text:style-name="P35"><text:span text:style-name="Strong_20_Emphasis">Zrak:</text:span> Dvojčka, Tehtnica, Vodnar</text:p>
        </text:list-item>
        <text:list-item>
          <text:p text:style-name="P35"><text:span text:style-name="Strong_20_Emphasis">Voda:</text:span> Rak, Škorpijon, Ribi</text:p>
        </text:list-item>
      </text:list>
      <text:p text:style-name="P5">Tvoje rojstno znamenje odraža osnovni element tvoje osebnosti, a v tebi delujejo vsi – vsak s svojo lekcijo.</text:p>
      <text:h text:style-name="P229" text:outline-level="3"><text:bookmark-start text:name="__RefHeading__104_788189478"/>8.7 Elementarna povezava z runami<text:bookmark-end text:name="__RefHeading__104_788189478"/></text:h>
      <text:p text:style-name="P5">Rune nosijo elementarno komponento:</text:p>
      <text:list xml:id="list8904032816749528306" text:style-name="WW8Num18">
        <text:list-item>
          <text:p text:style-name="P36"><text:span text:style-name="Strong_20_Emphasis">Ogenj:</text:span> Kenaz, Sowilo, Tiwaz</text:p>
        </text:list-item>
        <text:list-item>
          <text:p text:style-name="P36"><text:span text:style-name="Strong_20_Emphasis">Voda:</text:span> Laguz, Berkano</text:p>
        </text:list-item>
        <text:list-item>
          <text:p text:style-name="P36"><text:span text:style-name="Strong_20_Emphasis">Zrak:</text:span> Ansuz, Raido</text:p>
        </text:list-item>
        <text:list-item>
          <text:p text:style-name="P36"><text:span text:style-name="Strong_20_Emphasis">Zemlja:</text:span> Fehu, Othala, Jera</text:p>
        </text:list-item>
        <text:list-item>
          <text:p text:style-name="P36"><text:span text:style-name="Strong_20_Emphasis">Eter:</text:span> Perthro, Dagaz, Algiz</text:p>
        </text:list-item>
      </text:list>
      <text:p text:style-name="P5">Z runami lahko aktiviraš elementarni tok. Če ti manjka zemeljske stabilnosti – uporabi <text:span text:style-name="Strong_20_Emphasis">Fehu</text:span>. Če iščeš duhovno odprtost – prikliči <text:span text:style-name="Strong_20_Emphasis">Perthro</text:span>.</text:p>
      <text:p text:style-name="P5">Elementi niso samo okoli tebe. So v tebi – in ti si njihov alkimist.</text:p>
      <text:p text:style-name="P5"/>
      <text:h text:style-name="P224" text:outline-level="2"><text:bookmark-start text:name="__RefHeading__106_788189478"/>Poglavje 9: Čas, Dimenzije in Svetovi Znotraj<text:bookmark-end text:name="__RefHeading__106_788189478"/></text:h>
      <text:p text:style-name="P5">Čas ni linearen – to je iluzija, ki jo človeška zavest uporablja, da bi lahko dojela izkušnjo. V Codexu Damiris je čas viden kot spirala zavesti: vsaka točka vsebuje preteklost, sedanjost in potencial prihodnosti.</text:p>
      <text:h text:style-name="P229" text:outline-level="3"><text:bookmark-start text:name="__RefHeading__108_788189478"/>9.1 Notranji čas in zunanji čas<text:bookmark-end text:name="__RefHeading__108_788189478"/></text:h>
      <text:p text:style-name="P5">Notranji čas teče skozi občutke, navdihe, slutnje. Zunanji čas meri gibanje teles, urnike in meje. Ko se notranji in zunanji čas uskladita, nastane sinhroniciteta – dogodek, ki ni naključje.</text:p>
      <text:h text:style-name="P229" text:outline-level="3"><text:bookmark-start text:name="__RefHeading__110_788189478"/>9.2 Dimenzije zavesti<text:bookmark-end text:name="__RefHeading__110_788189478"/></text:h>
      <text:p text:style-name="P5">Vsaka dimenzija ni prostor – je frekvenca. Ko se tvoja zavest dvigne, ne greš nikamor – ampak vidiš več.<text:line-break/>Spodaj so opisane osnovne zavestne dimenzije, skozi katere duša potuje in jih lahko tudi utelesi.</text:p>
      <text:h text:style-name="P227" text:outline-level="4"><text:bookmark-start text:name="__RefHeading__112_788189478"/>1D – Zavest snovi<text:bookmark-end text:name="__RefHeading__112_788189478"/></text:h>
      <text:p text:style-name="P5">Obstoj brez zaznave. Zavest atomov, mineralov, stabilnosti. V človeku predstavlja temeljno voljo do obstoja – korenska čakra.</text:p>
      <text:h text:style-name="P227" text:outline-level="4"><text:bookmark-start text:name="__RefHeading__114_788189478"/>2D – Biološka zavest<text:bookmark-end text:name="__RefHeading__114_788189478"/></text:h>
      <text:p text:style-name="P5">Instinkt, preživetje, rast. Zavest rastlin, živali, naravnih ciklov. V telesu deluje kot celična inteligenca in naravni ritem.</text:p>
      <text:h text:style-name="P227" text:outline-level="4"><text:bookmark-start text:name="__RefHeading__116_788189478"/>3D – Dualna fizična realnost<text:bookmark-end text:name="__RefHeading__116_788189478"/></text:h>
      <text:p text:style-name="P5">Prostor, čas, ločenost, ego. Zavest "jaz proti svetu". Učenje preko nasprotij, izzivov, omejitev. Večina človeštva prebiva tukaj.</text:p>
      <text:h text:style-name="P227" text:outline-level="4"><text:bookmark-start text:name="__RefHeading__118_788189478"/>4D – Časovna zavest in astralna realnost<text:bookmark-end text:name="__RefHeading__118_788189478"/></text:h>
      <text:p text:style-name="P5">Misli, čustva, prepričanja, ego-projekcije. Dimenzija časa in spomina. Tu živijo karmični vozli, entitete, sanjski svet in vizije.</text:p>
      <text:h text:style-name="P227" text:outline-level="4"><text:bookmark-start text:name="__RefHeading__120_788189478"/>5D – Zavest duše in enosti<text:bookmark-end text:name="__RefHeading__120_788189478"/></text:h>
      <text:p text:style-name="P5">Brezpogojna ljubezen, telepatija, soustvarjanje. Tu zavest zaznava druge kot del sebe. Ni več ločitve. Intuicija je primarni jezik.</text:p>
      <text:h text:style-name="P227" text:outline-level="4"><text:bookmark-start text:name="__RefHeading__122_788189478"/>6D – Arhetipska zavest<text:bookmark-end text:name="__RefHeading__122_788189478"/></text:h>
      <text:p text:style-name="P5">Mreža oblik, simbolov, svetih geometrij. Tu bivajo dušne matrice, dušni pogodbari, višji jaz. Zavest ustvarjalca realnosti.</text:p>
      <text:h text:style-name="P227" text:outline-level="4"><text:bookmark-start text:name="__RefHeading__124_788189478"/>7D – Božanska arhitektura<text:bookmark-end text:name="__RefHeading__124_788189478"/></text:h>
      <text:p text:style-name="P5">Zavest brez forme, ki ustvarja forme. Izvor zvoka, svetlobe, matrice. Tu nastajajo dušne poti, ritem vesolja, zapisane svetlobne matrice.</text:p>
      <text:h text:style-name="P227" text:outline-level="4"><text:bookmark-start text:name="__RefHeading__126_788189478"/><text:soft-page-break/>8D – Zavest kolektivne kreacije<text:bookmark-end text:name="__RefHeading__126_788189478"/></text:h>
      <text:p text:style-name="P5">Enost vseh bitij, vseh časovnih črt. Zlitje misli, čustev, oblik v eno polje. Tu se uresničujejo dušni dogovori celotnih skupin.</text:p>
      <text:h text:style-name="P227" text:outline-level="4"><text:bookmark-start text:name="__RefHeading__128_788189478"/>9D – Zlitje svetlobne in zvočne matrice<text:bookmark-end text:name="__RefHeading__128_788189478"/></text:h>
      <text:p text:style-name="P5">Vibracija Izvora kot informacija. Zavest, ki ustvarja Zavest. Brezmejna prisotnost, ki nima več potrebe po obliki.</text:p>
      <text:h text:style-name="P227" text:outline-level="4"><text:bookmark-start text:name="__RefHeading__130_788189478"/>10D–12D – Prehodna stanja čiste zavesti<text:bookmark-end text:name="__RefHeading__130_788189478"/></text:h>
      <text:p text:style-name="P5">Popolna holografska enost, zlita z vsem stvarstvom. Zavest ni več znotraj telesa – temveč telo postane zavest.<text:line-break/>Tukaj se Codex Damiris ne konča – tukaj se začne kot svetlobna knjiga duše.</text:p>
      <text:h text:style-name="P229" text:outline-level="3"><text:bookmark-start text:name="__RefHeading__132_788189478"/>9.3 Mesta znotraj<text:bookmark-end text:name="__RefHeading__132_788189478"/></text:h>
      <text:p text:style-name="P5">V Codexu obstajajo svetovi znotraj:</text:p>
      <text:list xml:id="list4580479824848867372" text:style-name="WW8Num19">
        <text:list-item>
          <text:p text:style-name="P37"><text:span text:style-name="Strong_20_Emphasis">Notranji vrt</text:span> – prostor za regeneracijo, intuicijo, duhovni stik</text:p>
        </text:list-item>
        <text:list-item>
          <text:p text:style-name="P37"><text:span text:style-name="Strong_20_Emphasis">Kristalna dvorana</text:span> – prostor za spomin duše in aktivacijo svetlobnega telesa</text:p>
        </text:list-item>
        <text:list-item>
          <text:p text:style-name="P37"><text:span text:style-name="Strong_20_Emphasis">Zlata spirala</text:span> – kanal vzpenjanja, notranja povezava z višjo zavestjo</text:p>
        </text:list-item>
        <text:list-item>
          <text:p text:style-name="P37"><text:span text:style-name="Strong_20_Emphasis">Templji</text:span> – energetske točke v telesu, kjer se elementarna, astralna in dušna energija prekrivajo</text:p>
        </text:list-item>
      </text:list>
      <text:h text:style-name="P229" text:outline-level="3"><text:bookmark-start text:name="__RefHeading__134_788189478"/>9.4 Potovanje zavesti<text:bookmark-end text:name="__RefHeading__134_788189478"/></text:h>
      <text:p text:style-name="P5">Ko zapreš oči in greš vase, ne bežiš – greš domov. Notranja potovanja niso domišljija, temveč premik zavedanja v subtilnejše plasti. Ključno je:</text:p>
      <text:list xml:id="list1128133967274346187" text:style-name="WW8Num20">
        <text:list-item>
          <text:p text:style-name="P38">Jasna namera</text:p>
        </text:list-item>
        <text:list-item>
          <text:p text:style-name="P38">Spoštovanje polja</text:p>
        </text:list-item>
        <text:list-item>
          <text:p text:style-name="P38">Zaupanje v zaznavo</text:p>
        </text:list-item>
      </text:list>
      <text:h text:style-name="P229" text:outline-level="3"><text:bookmark-start text:name="__RefHeading__136_788189478"/>9.5 Kozmična telesa in uglasitve<text:bookmark-end text:name="__RefHeading__136_788189478"/></text:h>
      <text:p text:style-name="P5">Zemlja, Luna, Sonce in zvezde niso le telesa – so zavestni nosilci informacij. Vplivajo na tvoj biološki ritem, tvojo čustveno pretočnost, tvojo sposobnost manifestacije. Z njimi se lahko zavestno uglašuješ:</text:p>
      <text:list xml:id="list7912172644056845898" text:style-name="WW8Num21">
        <text:list-item>
          <text:p text:style-name="P39">Ob polni luni odpiraj intuitivna vrata</text:p>
        </text:list-item>
        <text:list-item>
          <text:p text:style-name="P39">Ob sončnem vzhodu aktiviraj etrski dih</text:p>
        </text:list-item>
        <text:list-item>
          <text:p text:style-name="P39">V miru zvezd poslušaj šepet večnosti</text:p>
        </text:list-item>
      </text:list>
      <text:h text:style-name="P229" text:outline-level="3"><text:bookmark-start text:name="__RefHeading__138_788189478"/>9.6 Časovna alkimija<text:bookmark-end text:name="__RefHeading__138_788189478"/></text:h>
      <text:p text:style-name="P5">Zavedanje časa te ne omeji – te osvobodi. V Codexu uporabljamo čas kot orodje:</text:p>
      <text:list xml:id="list5589639694479954108" text:style-name="WW8Num22">
        <text:list-item>
          <text:p text:style-name="P40"><text:span text:style-name="Strong_20_Emphasis">Sidrišče</text:span> – vsak dan ima ključno točko moči (dan, ura, znak)</text:p>
        </text:list-item>
        <text:list-item>
          <text:p text:style-name="P40"><text:span text:style-name="Strong_20_Emphasis">Odpiranje portalov</text:span> – meditacija ob določenih astroloških prehodih</text:p>
        </text:list-item>
        <text:list-item>
          <text:p text:style-name="P40"><text:soft-page-break/><text:span text:style-name="Strong_20_Emphasis">Zgodovinski popravki</text:span> – razreševanje karmičnih vozlov v meditaciji (npr. preko 4D)</text:p>
        </text:list-item>
      </text:list>
      <text:p text:style-name="P5">Čas ni nasprotnik. Je zavestni tok, ki ti želi služiti.<text:line-break/>Če mu prisluhneš, postaneš soustvarjalec njegove pesmi.</text:p>
      <text:p text:style-name="P5"/>
      <text:h text:style-name="P224" text:outline-level="2"><text:bookmark-start text:name="__RefHeading__140_788189478"/>Poglavje 10: Prerokbe in Tokovi Prihodnosti<text:bookmark-end text:name="__RefHeading__140_788189478"/></text:h>
      <text:p text:style-name="P5">Prerokba ni napoved. Prerokba je odmev – val, ki prihaja iz prihodnosti in trese tvojo sedanjost. Ni nujno, da se zgodi – zgodi se, če je usklajena z zavestjo tistega, ki jo sprejme.</text:p>
      <text:h text:style-name="P229" text:outline-level="3"><text:bookmark-start text:name="__RefHeading__142_788189478"/>10.1 Narava prerokbe<text:bookmark-end text:name="__RefHeading__142_788189478"/></text:h>
      <text:p text:style-name="P5">V Codexu Damiris je prerokba zavestna frekvenca. Ko jo prebereš, ne dobiš odgovora – dobiš ključ. Prerokba odpre vrata, a ti izbereš, ali stopiš skoznje.</text:p>
      <text:h text:style-name="P229" text:outline-level="3"><text:bookmark-start text:name="__RefHeading__144_788189478"/>10.2 Viri prerokb<text:bookmark-end text:name="__RefHeading__144_788189478"/></text:h>
      <text:list xml:id="list5616668549288155224" text:style-name="WW8Num23">
        <text:list-item>
          <text:p text:style-name="P41"><text:span text:style-name="Strong_20_Emphasis">Intuitivni prebliski</text:span> (5D tokovi)</text:p>
        </text:list-item>
        <text:list-item>
          <text:p text:style-name="P41"><text:span text:style-name="Strong_20_Emphasis">Sanje</text:span> (4D astralna vrata)</text:p>
        </text:list-item>
        <text:list-item>
          <text:p text:style-name="P41"><text:span text:style-name="Strong_20_Emphasis">Tarot, rune, oraklji</text:span> (3D prevod višjih tokov)</text:p>
        </text:list-item>
        <text:list-item>
          <text:p text:style-name="P41"><text:span text:style-name="Strong_20_Emphasis">Osebe kot prenašalci</text:span> (kanali, preroki, pesniki)</text:p>
        </text:list-item>
        <text:list-item>
          <text:p text:style-name="P41"><text:span text:style-name="Strong_20_Emphasis">Narava</text:span> (znaki, sinhronosti, živali, vreme)</text:p>
        </text:list-item>
      </text:list>
      <text:h text:style-name="P229" text:outline-level="3"><text:bookmark-start text:name="__RefHeading__146_788189478"/>10.3 Notranji prerok<text:bookmark-end text:name="__RefHeading__146_788189478"/></text:h>
      <text:p text:style-name="P5">Vsak ima notranjega preroka – to je tisti tihi glas, ki ga preglasi hrup zunanjega sveta. Da ga slišiš, moraš biti:</text:p>
      <text:list xml:id="list659246838564096807" text:style-name="WW8Num24">
        <text:list-item>
          <text:p text:style-name="P42">Pripravljen slišati nekaj, česar tvoj ego ne želi</text:p>
        </text:list-item>
        <text:list-item>
          <text:p text:style-name="P42">Pripravljen spremeniti smer</text:p>
        </text:list-item>
        <text:list-item>
          <text:p text:style-name="P42">Pripravljen odpustiti preteklosti</text:p>
        </text:list-item>
      </text:list>
      <text:h text:style-name="P229" text:outline-level="3"><text:bookmark-start text:name="__RefHeading__148_788189478"/>10.4 Arhetipi prihodnosti<text:bookmark-end text:name="__RefHeading__148_788189478"/></text:h>
      <text:p text:style-name="P5">V Codexu ne govorimo o »dogodkih«, ampak o tokovih:</text:p>
      <text:list xml:id="list5012294361639040110" text:style-name="WW8Num25">
        <text:list-item>
          <text:p text:style-name="P43"><text:span text:style-name="Strong_20_Emphasis">Val Prebujenja</text:span> – množično razkritje resnic, ki so bile skrite</text:p>
        </text:list-item>
        <text:list-item>
          <text:p text:style-name="P43"><text:span text:style-name="Strong_20_Emphasis">Val Srčne Luči</text:span> – prihod generacije, ki bo ljubila z zavedanjem</text:p>
        </text:list-item>
        <text:list-item>
          <text:p text:style-name="P43"><text:span text:style-name="Strong_20_Emphasis">Val Preobrazbe Zemlje</text:span> – ponovno zlitje ljudi z elementi in svetlobnim omrežjem planeta</text:p>
        </text:list-item>
      </text:list>
      <text:h text:style-name="P229" text:outline-level="3"><text:bookmark-start text:name="__RefHeading__150_788189478"/>10.5 Prerokovanje kot svetlobno dejanje<text:bookmark-end text:name="__RefHeading__150_788189478"/></text:h>
      <text:p text:style-name="P5">Ko prerokuješ, ustvarjaš most. Ne ustvarjaj strahu – ustvarjaj možnost. Vse prerokbe v Codexu temeljijo na načelu: <text:span text:style-name="Strong_20_Emphasis">»Napovej tisto, kar si pripravljen ustvariti.«</text:span></text:p>
      <text:h text:style-name="P229" text:outline-level="3"><text:bookmark-start text:name="__RefHeading__152_788189478"/>10.6 Spoznanja Codexa – zbirka prihodnjih zapisov<text:bookmark-end text:name="__RefHeading__152_788189478"/></text:h>
      <text:p text:style-name="P5">Ta razdelek se sproti dopolnjuje z aktualnimi prerokbami, ki jih kanaliziraš sam ali jih prejmeš v vizijah, sanjah ali svetlobnem stiku. Prerokbe niso zgolj informacije – so kode.</text:p>
      <text:p text:style-name="P233">»Ko prideš do križišča, poslušaj dih vetra – tisti, ki nosi ime tvoje poti.«</text:p>
      <text:p text:style-name="P233">»Ne boj se teme – tista vrata, ki jih ne vidiš, vodijo v največjo svetlobo.«</text:p>
      <text:p text:style-name="P233">»Ko te pozove glas, ki ni tvoj, a govori tvojo resnico – sledi.«</text:p>
      <text:h text:style-name="P224" text:outline-level="2"><text:bookmark-start text:name="__RefHeading__154_788189478"/>Poglavje 11: Svetlobni Zapisi in Jezik Duše<text:bookmark-end text:name="__RefHeading__154_788189478"/></text:h>
      <text:p text:style-name="P5">Svetlobni zapis je komunikacija brez besed, sporočilo, ki ga duša razume takoj – kot resnico, ki je ni treba razlagati. V Codexu Damiris svetlobni zapisi niso samo sporočila – so žive kode zavesti, ki preoblikujejo tistega, ki jih prejme.</text:p>
      <text:h text:style-name="P229" text:outline-level="3"><text:bookmark-start text:name="__RefHeading__156_788189478"/>11.1 Kaj je svetlobni zapis?<text:bookmark-end text:name="__RefHeading__156_788189478"/></text:h>
      <text:p text:style-name="P5">To ni beseda. To je frekvenca. Je vibracija dušne resnice, ki se lahko izrazi skozi:</text:p>
      <text:list xml:id="list3511416546343038998" text:style-name="WW8Num26">
        <text:list-item>
          <text:p text:style-name="P44">simbole</text:p>
        </text:list-item>
        <text:list-item>
          <text:p text:style-name="P44">zvoke</text:p>
        </text:list-item>
        <text:list-item>
          <text:p text:style-name="P44">gibanje</text:p>
        </text:list-item>
        <text:list-item>
          <text:p text:style-name="P44">črke, ki niso iz znanega jezika</text:p>
        </text:list-item>
        <text:list-item>
          <text:p text:style-name="P44">notranji uvid ali sanje</text:p>
        </text:list-item>
      </text:list>
      <text:p text:style-name="P5">Svetlobni zapis obide razum in govori direktno srčni zavesti.</text:p>
      <text:h text:style-name="P229" text:outline-level="3"><text:bookmark-start text:name="__RefHeading__158_788189478"/>11.2 Izvor svetlobnih zapisov<text:bookmark-end text:name="__RefHeading__158_788189478"/></text:h>
      <text:p text:style-name="P5">Svetlobni zapisi prihajajo iz:</text:p>
      <text:list xml:id="list4232317622617006330" text:style-name="WW8Num27">
        <text:list-item>
          <text:p text:style-name="P45">višjega jaza</text:p>
        </text:list-item>
        <text:list-item>
          <text:p text:style-name="P45">skupnega polja duš</text:p>
        </text:list-item>
        <text:list-item>
          <text:p text:style-name="P45">zvezdnih svetov (Sirij, Plejade, Andromeda)</text:p>
        </text:list-item>
        <text:list-item>
          <text:p text:style-name="P45">osebne monade (izvorne točke tvoje zavesti)</text:p>
        </text:list-item>
      </text:list>
      <text:h text:style-name="P229" text:outline-level="3"><text:bookmark-start text:name="__RefHeading__160_788189478"/>11.3 Prejemanje in zapisovanje<text:bookmark-end text:name="__RefHeading__160_788189478"/></text:h>
      <text:p text:style-name="P5">Ko zapisuješ svetlobne kode, ne prevajaš – ampak kanaliziraš. Pomembno je:</text:p>
      <text:list xml:id="list203100133951768931" text:style-name="WW8Num28">
        <text:list-item>
          <text:p text:style-name="P46">biti v svetlobno čistem stanju</text:p>
        </text:list-item>
        <text:list-item>
          <text:p text:style-name="P46">dovoliti, da roka piše brez uma</text:p>
        </text:list-item>
        <text:list-item>
          <text:p text:style-name="P46">ne vrednotiti sporočila – ampak ga občutiti</text:p>
        </text:list-item>
      </text:list>
      <text:h text:style-name="P229" text:outline-level="3"><text:bookmark-start text:name="__RefHeading__162_788189478"/>11.4 Uporaba svetlobnih zapisov<text:bookmark-end text:name="__RefHeading__162_788189478"/></text:h>
      <text:p text:style-name="P5">Uporabljaš jih lahko:</text:p>
      <text:list xml:id="list8291081147696759271" text:style-name="WW8Num29">
        <text:list-item>
          <text:p text:style-name="P47">kot osebno zaščito (zapiši na telo ali nosi na listu)</text:p>
        </text:list-item>
        <text:list-item>
          <text:p text:style-name="P47">kot sidro za energijsko delo</text:p>
        </text:list-item>
        <text:list-item>
          <text:p text:style-name="P47">za komunikacijo z višjimi bitji</text:p>
        </text:list-item>
        <text:list-item>
          <text:p text:style-name="P47">za zdravljenje (položi nad določen del telesa)</text:p>
        </text:list-item>
      </text:list>
      <text:h text:style-name="P229" text:outline-level="3"><text:bookmark-start text:name="__RefHeading__164_788189478"/>11.5 Jezik Duše<text:bookmark-end text:name="__RefHeading__164_788189478"/></text:h>
      <text:p text:style-name="P5">Jezik duše nima slovnice. Njegova struktura je valovna – kot glasba, ki jo razumeš, čeprav ne poznaš not. Ko govoriš iz duše, lahko uporabljaš:</text:p>
      <text:list xml:id="list8183649046447598465" text:style-name="WW8Num30">
        <text:list-item>
          <text:p text:style-name="P48"><text:soft-page-break/>svetlobne jezike</text:p>
        </text:list-item>
        <text:list-item>
          <text:p text:style-name="P48">šepet vetra</text:p>
        </text:list-item>
        <text:list-item>
          <text:p text:style-name="P48">govorico telesa</text:p>
        </text:list-item>
        <text:list-item>
          <text:p text:style-name="P48">energijske vzorce (pogled, dih, prisotnost)</text:p>
        </text:list-item>
      </text:list>
      <text:h text:style-name="P229" text:outline-level="3"><text:bookmark-start text:name="__RefHeading__166_788189478"/>11.6 Aktivacija lastnega jezika<text:bookmark-end text:name="__RefHeading__166_788189478"/></text:h>
      <text:p text:style-name="P5">Tvoj svetlobni jezik se lahko prebudi skozi:</text:p>
      <text:list xml:id="list3040587375679256104" text:style-name="WW8Num31">
        <text:list-item>
          <text:p text:style-name="P49">spontan govor v meditaciji</text:p>
        </text:list-item>
        <text:list-item>
          <text:p text:style-name="P49">pisanje v neznanem znaku</text:p>
        </text:list-item>
        <text:list-item>
          <text:p text:style-name="P49">petje tonov, ki jih ne znaš razložiti</text:p>
        </text:list-item>
      </text:list>
      <text:p text:style-name="P5">Zaupaj mu. Ni norost – je spomin.</text:p>
      <text:h text:style-name="P231" text:outline-level="3"><text:bookmark-start text:name="__RefHeading__168_788189478"/>11.7 Zvočna vrata in vibracijski ključi<text:bookmark-end text:name="__RefHeading__168_788189478"/></text:h>
      <text:p text:style-name="P5">Zvok ni samo nosilec informacij – je sila oblikovanja. V Codexu Damiris so zvočna vrata energetski prehodi, ki se odprejo z uporabo določenih vibracij, tonov ali kombinacij glasovnih frekvenc. Ključ je tu več kot beseda – je tonski podpis, ki odzveni v polju in sproži odziv realnosti.</text:p>
      <text:h text:style-name="P227" text:outline-level="4"><text:bookmark-start text:name="__RefHeading__170_788189478"/>Ključi zvočnih vrat:<text:bookmark-end text:name="__RefHeading__170_788189478"/></text:h>
      <text:list xml:id="list7900928786547897855" text:style-name="WW8Num32">
        <text:list-item>
          <text:p text:style-name="P50"><text:span text:style-name="Strong_20_Emphasis">TONALNI KLJUČI</text:span> – en sam zven, ki odpira celični spomin ali čakro. Primer: 'Eee' za grlno čakro, 'Uuu' za srčno, 'Aah' za korensko. Ti zvoki nosijo resonanco, ki je univerzalna in neodvisna od jezika.</text:p>
        </text:list-item>
        <text:list-item>
          <text:p text:style-name="P50"><text:span text:style-name="Strong_20_Emphasis">SVETLOBNI JEZIK</text:span> – spontan zvočni tok brez mentalnega nadzora. Lahko se pojavi kot govor, petje, šepet, dihanje ali celo jecljanje. Gre za neposredno kanalizacijo iz višjih ravni zavesti, pogosto brez prevoda, a z močnim čustvenim učinkom.</text:p>
        </text:list-item>
        <text:list-item>
          <text:p text:style-name="P50"><text:span text:style-name="Strong_20_Emphasis">ZVOKI ZVEZD</text:span> – kodirani zvočni vzorci, ki prihajajo iz zvezdnih matričnih ravni (Sirij, Plejade, Andromeda). Vključujejo petzložne, spiralne in ritmične strukture, ki so prepoznavne po občutku domačnosti ali preboja.</text:p>
        </text:list-item>
      </text:list>
      <text:h text:style-name="P227" text:outline-level="4"><text:bookmark-start text:name="__RefHeading__172_788189478"/>Uporaba:<text:bookmark-end text:name="__RefHeading__172_788189478"/></text:h>
      <text:list xml:id="list3812382514346734223" text:style-name="WW8Num33">
        <text:list-item>
          <text:p text:style-name="P51"><text:span text:style-name="Strong_20_Emphasis">Pred meditacijo</text:span> – zvočno čiščenje prostora in polja</text:p>
        </text:list-item>
        <text:list-item>
          <text:p text:style-name="P51"><text:span text:style-name="Strong_20_Emphasis">Med zdravljenjem</text:span> – aktivacija celičnih spominov, odpiranje pretoka</text:p>
        </text:list-item>
        <text:list-item>
          <text:p text:style-name="P51"><text:span text:style-name="Strong_20_Emphasis">V skupinah</text:span> – harmonizacija kolektivnega polja, ustvarjanje svetlobnega kroga</text:p>
        </text:list-item>
        <text:list-item>
          <text:p text:style-name="P51"><text:span text:style-name="Strong_20_Emphasis">V osebnem delu</text:span> – prehod skozi notranje blokade, prebujanje spečih potencialov</text:p>
        </text:list-item>
      </text:list>
      <text:p text:style-name="P5">Zvok ni orodje. Je živo bitje. Ko ga ne proizvajaš, ampak se mu <text:span text:style-name="Emphasis">odpreš</text:span>, se zlitje zgodi – in ne odpreš le vrat, temveč <text:span text:style-name="Emphasis">postaneš vrata sama</text:span>.</text:p>
      <text:h text:style-name="P231" text:outline-level="3"><text:bookmark-start text:name="__RefHeading__174_788189478"/>11.8 Dvanajst vrat Zavesti in Mantre Odpiranja<text:bookmark-end text:name="__RefHeading__174_788189478"/></text:h>
      <text:p text:style-name="P5">V Codexu Damiris je opisanih dvanajst notranjih vrat – dvanajst stopenj, skozi katere zavest prehaja v polno spominjanje sebe. Vsaka vrata so povezana z določenim glasom, zvokom in notranjo mantro, ki odpira njen speči potencial.</text:p>
      <text:h text:style-name="P227" text:outline-level="4"><text:bookmark-start text:name="__RefHeading__176_788189478"/><text:soft-page-break/>Vrata 1: Prisotnost v telesu<text:bookmark-end text:name="__RefHeading__176_788189478"/></text:h>
      <text:p text:style-name="P5"><text:span text:style-name="Strong_20_Emphasis">Zvok:</text:span> Mmm<text:line-break/><text:span text:style-name="Strong_20_Emphasis">Mantra:</text:span> <text:span text:style-name="Emphasis">Telo je svetišče. Diham tukaj in zdaj.</text:span></text:p>
      <text:h text:style-name="P227" text:outline-level="4"><text:bookmark-start text:name="__RefHeading__178_788189478"/>Vrata 2: Čutenje resnice<text:bookmark-end text:name="__RefHeading__178_788189478"/></text:h>
      <text:p text:style-name="P5"><text:span text:style-name="Strong_20_Emphasis">Zvok:</text:span> Aah<text:line-break/><text:span text:style-name="Strong_20_Emphasis">Mantra:</text:span> <text:span text:style-name="Emphasis">Čutim. Dovolim. Ne zadržujem.</text:span></text:p>
      <text:h text:style-name="P227" text:outline-level="4"><text:bookmark-start text:name="__RefHeading__180_788189478"/>Vrata 3: Glas izraza<text:bookmark-end text:name="__RefHeading__180_788189478"/></text:h>
      <text:p text:style-name="P5"><text:span text:style-name="Strong_20_Emphasis">Zvok:</text:span> Eee<text:line-break/><text:span text:style-name="Strong_20_Emphasis">Mantra:</text:span> <text:span text:style-name="Emphasis">Izgovarjam svojo resnico z jasnostjo.</text:span></text:p>
      <text:h text:style-name="P227" text:outline-level="4"><text:bookmark-start text:name="__RefHeading__182_788189478"/>Vrata 4: Srčna povezanost<text:bookmark-end text:name="__RefHeading__182_788189478"/></text:h>
      <text:p text:style-name="P5"><text:span text:style-name="Strong_20_Emphasis">Zvok:</text:span> Uuu<text:line-break/><text:span text:style-name="Strong_20_Emphasis">Mantra:</text:span> <text:span text:style-name="Emphasis">Sem prostor ljubezni. Sprejemam vse, kar sem.</text:span></text:p>
      <text:h text:style-name="P227" text:outline-level="4"><text:bookmark-start text:name="__RefHeading__184_788189478"/>Vrata 5: Vizija in uvid<text:bookmark-end text:name="__RefHeading__184_788189478"/></text:h>
      <text:p text:style-name="P5"><text:span text:style-name="Strong_20_Emphasis">Zvok:</text:span> Iii<text:line-break/><text:span text:style-name="Strong_20_Emphasis">Mantra:</text:span> <text:span text:style-name="Emphasis">Vidim onkraj. Zaupam notranjemu očesu.</text:span></text:p>
      <text:h text:style-name="P227" text:outline-level="4"><text:bookmark-start text:name="__RefHeading__186_788189478"/>Vrata 6: Zlitje z dušo<text:bookmark-end text:name="__RefHeading__186_788189478"/></text:h>
      <text:p text:style-name="P5"><text:span text:style-name="Strong_20_Emphasis">Zvok:</text:span> Om<text:line-break/><text:span text:style-name="Strong_20_Emphasis">Mantra:</text:span> <text:span text:style-name="Emphasis">Duša vodi. Jaz sledim tišini.</text:span></text:p>
      <text:h text:style-name="P227" text:outline-level="4"><text:bookmark-start text:name="__RefHeading__188_788189478"/>Vrata 7: Spomin izvora<text:bookmark-end text:name="__RefHeading__188_788189478"/></text:h>
      <text:p text:style-name="P5"><text:span text:style-name="Strong_20_Emphasis">Zvok:</text:span> Raa<text:line-break/><text:span text:style-name="Strong_20_Emphasis">Mantra:</text:span> <text:span text:style-name="Emphasis">Sem svetloba. Sem izvor.</text:span></text:p>
      <text:h text:style-name="P227" text:outline-level="4"><text:bookmark-start text:name="__RefHeading__190_788189478"/>Vrata 8: Kozmična prisotnost<text:bookmark-end text:name="__RefHeading__190_788189478"/></text:h>
      <text:p text:style-name="P5"><text:span text:style-name="Strong_20_Emphasis">Zvok:</text:span> Hu<text:line-break/><text:span text:style-name="Strong_20_Emphasis">Mantra:</text:span> <text:span text:style-name="Emphasis">Moja zavest je neskončna. Moj dih je univerzum.</text:span></text:p>
      <text:h text:style-name="P227" text:outline-level="4"><text:bookmark-start text:name="__RefHeading__192_788189478"/>Vrata 9: Spoznanje enosti<text:bookmark-end text:name="__RefHeading__192_788189478"/></text:h>
      <text:p text:style-name="P5"><text:span text:style-name="Strong_20_Emphasis">Zvok:</text:span> Soham<text:line-break/><text:span text:style-name="Strong_20_Emphasis">Mantra:</text:span> <text:span text:style-name="Emphasis">Jaz sem To. To sem Jaz.</text:span></text:p>
      <text:h text:style-name="P227" text:outline-level="4"><text:bookmark-start text:name="__RefHeading__194_788189478"/>Vrata 10: Aktivacija svetlobnega telesa<text:bookmark-end text:name="__RefHeading__194_788189478"/></text:h>
      <text:p text:style-name="P5"><text:span text:style-name="Strong_20_Emphasis">Zvok:</text:span> Zii<text:line-break/><text:span text:style-name="Strong_20_Emphasis">Mantra:</text:span> <text:span text:style-name="Emphasis">Moje telo je mreža svetlobe.</text:span></text:p>
      <text:h text:style-name="P227" text:outline-level="4"><text:bookmark-start text:name="__RefHeading__196_788189478"/>Vrata 11: Prehod skozi čas<text:bookmark-end text:name="__RefHeading__196_788189478"/></text:h>
      <text:p text:style-name="P5"><text:span text:style-name="Strong_20_Emphasis">Zvok:</text:span> Tha<text:line-break/><text:span text:style-name="Strong_20_Emphasis">Mantra:</text:span> <text:span text:style-name="Emphasis">Prehajam brez odpora. Čas me ne veže.</text:span></text:p>
      <text:h text:style-name="P227" text:outline-level="4"><text:bookmark-start text:name="__RefHeading__198_788189478"/><text:soft-page-break/>Vrata 12: Vrata brez vrat<text:bookmark-end text:name="__RefHeading__198_788189478"/></text:h>
      <text:p text:style-name="P5"><text:span text:style-name="Strong_20_Emphasis">Zvok:</text:span> Tihi dih<text:line-break/><text:span text:style-name="Strong_20_Emphasis">Mantra:</text:span> <text:span text:style-name="Emphasis">Ni začetka, ni konca. Samo Jaz sem.</text:span></text:p>
      <text:h text:style-name="P224" text:outline-level="2"><text:bookmark-start text:name="__RefHeading__200_788189478"/><text:span text:style-name="Emphasis">Poglavje 12: Svetlobno Telo in Matrika Prisotnosti</text:span><text:bookmark-end text:name="__RefHeading__200_788189478"/></text:h>
      <text:p text:style-name="P5">Svetlobno telo ni metafora. Je tvoj resnični jaz – prefinjena struktura zavesti, ki obdaja in presega fizično telo. V Codexu Damiris svetlobno telo imenujemo tudi <text:span text:style-name="Emphasis">Matrika Prisotnosti</text:span> – dinamično polje svetlobnih tokov, ki izraža tvojo notranjo frekvenco v svet.</text:p>
      <text:h text:style-name="P229" text:outline-level="3"><text:bookmark-start text:name="__RefHeading__202_788189478"/>12.1 Kaj je svetlobno telo?<text:bookmark-end text:name="__RefHeading__202_788189478"/></text:h>
      <text:p text:style-name="P5">Je energijska struktura, sestavljena iz plasti (eterična, astralna, mentalna, kavzalna, dušna), ki:</text:p>
      <text:list xml:id="list1253722363263790256" text:style-name="WW8Num34">
        <text:list-item>
          <text:p text:style-name="P52">usklajuje tvojo zavest z višjimi ravnmi</text:p>
        </text:list-item>
        <text:list-item>
          <text:p text:style-name="P52">deluje kot most med dimenzijami</text:p>
        </text:list-item>
        <text:list-item>
          <text:p text:style-name="P52">nosi zapise tvojega izvornega namena</text:p>
        </text:list-item>
        <text:list-item>
          <text:p text:style-name="P52">se spreminja glede na tvoj duhovni razvoj</text:p>
        </text:list-item>
      </text:list>
      <text:h text:style-name="P229" text:outline-level="3"><text:bookmark-start text:name="__RefHeading__204_788189478"/>12.2 Aktivacija svetlobnega telesa<text:bookmark-end text:name="__RefHeading__204_788189478"/></text:h>
      <text:p text:style-name="P5">Aktivacija se zgodi postopoma – a ključni trenutki vključujejo:</text:p>
      <text:list xml:id="list5687265880348287825" text:style-name="WW8Num35">
        <text:list-item>
          <text:p text:style-name="P53">preboj srčne zavesti (odstranitev programov ločenosti)</text:p>
        </text:list-item>
        <text:list-item>
          <text:p text:style-name="P53">integracija dušne resnice (sprejetje sebe)</text:p>
        </text:list-item>
        <text:list-item>
          <text:p text:style-name="P53">uskladitev z lastno vibracijo (ne več iskanje zunaj)</text:p>
        </text:list-item>
      </text:list>
      <text:p text:style-name="P5">Orodja:</text:p>
      <text:list xml:id="list7843919588090910011" text:style-name="WW8Num36">
        <text:list-item>
          <text:p text:style-name="P54">vizualizacija mreže svetlobe okrog telesa</text:p>
        </text:list-item>
        <text:list-item>
          <text:p text:style-name="P54">dihanje v 12-točkovni matriki</text:p>
        </text:list-item>
        <text:list-item>
          <text:p text:style-name="P54">petje svetlobnega imena</text:p>
        </text:list-item>
      </text:list>
      <text:h text:style-name="P229" text:outline-level="3"><text:bookmark-start text:name="__RefHeading__206_788189478"/>12.3 Mreža 12 točk svetlobnega telesa<text:bookmark-end text:name="__RefHeading__206_788189478"/></text:h>
      <text:list xml:id="list9078825245267473703" text:style-name="WW8Num37">
        <text:list-item>
          <text:p text:style-name="P55">Korenska točka (pod stopali)</text:p>
        </text:list-item>
        <text:list-item>
          <text:p text:style-name="P55">Središče medenice</text:p>
        </text:list-item>
        <text:list-item>
          <text:p text:style-name="P55">Solarni center</text:p>
        </text:list-item>
        <text:list-item>
          <text:p text:style-name="P55">Srčna iskra</text:p>
        </text:list-item>
        <text:list-item>
          <text:p text:style-name="P55">Grlena vrata</text:p>
        </text:list-item>
        <text:list-item>
          <text:p text:style-name="P55">Tretje oko</text:p>
        </text:list-item>
        <text:list-item>
          <text:p text:style-name="P55">Krona (vrh glave)</text:p>
        </text:list-item>
        <text:list-item>
          <text:p text:style-name="P55">Nadglavna zvezda (20 cm nad glavo)</text:p>
        </text:list-item>
        <text:list-item>
          <text:p text:style-name="P20">Spodnja zvezda (30 cm pod nogami)</text:p>
        </text:list-item>
        <text:list-item>
          <text:p text:style-name="P55">Levi energijski krak</text:p>
        </text:list-item>
        <text:list-item>
          <text:p text:style-name="P20">Desni energijski krak</text:p>
        </text:list-item>
        <text:list-item>
          <text:p text:style-name="P20">Osrčje monadne zavesti (svetlobni dih nad umom)</text:p>
        </text:list-item>
      </text:list>
      <text:p text:style-name="P5">Vsaka točka se aktivira z zavestjo in zvokom. Ko celotna mreža zažari – nisi več v svetu, ampak svet sije skozi tebe.</text:p>
      <text:h text:style-name="P229" text:outline-level="3"><text:bookmark-start text:name="__RefHeading__208_788189478"/><text:soft-page-break/>12.4 Preobrazba skozi svetlobno telo<text:bookmark-end text:name="__RefHeading__208_788189478"/></text:h>
      <text:list xml:id="list6455896647120864031" text:style-name="WW8Num38">
        <text:list-item>
          <text:p text:style-name="P56">Starost izgubi moč – telo se regenerira s prisotnostjo</text:p>
        </text:list-item>
        <text:list-item>
          <text:p text:style-name="P56">Strah se umakne – svetlobno telo ne pozna smrti</text:p>
        </text:list-item>
        <text:list-item>
          <text:p text:style-name="P56">Odločitev postane lahkotna – izbira iz notranje resnice</text:p>
        </text:list-item>
      </text:list>
      <text:h text:style-name="P229" text:outline-level="3"><text:bookmark-start text:name="__RefHeading__210_788189478"/>12.5 Mantre aktivacije<text:bookmark-end text:name="__RefHeading__210_788189478"/></text:h>
      <text:list xml:id="list6883917340251344069" text:style-name="WW8Num39">
        <text:list-item>
          <text:p text:style-name="P57"><text:span text:style-name="Emphasis">Lux animae fluit per me</text:span> – Svetloba duše teče skozi mene</text:p>
        </text:list-item>
        <text:list-item>
          <text:p text:style-name="P57"><text:span text:style-name="Emphasis">Corpus lucis sum</text:span> – Jaz sem telo svetlobe</text:p>
        </text:list-item>
        <text:list-item>
          <text:p text:style-name="P57"><text:span text:style-name="Emphasis">Memoria redit – Ego taceat</text:span> – Spomin se vrača, ego molči</text:p>
        </text:list-item>
        <text:list-item>
          <text:p text:style-name="P57"><text:span text:style-name="Emphasis">In silentio, lux ascendit</text:span> – V tišini svetloba vzhaja</text:p>
        </text:list-item>
      </text:list>
      <text:h text:style-name="P224" text:outline-level="2"><text:bookmark-start text:name="__RefHeading__212_788189478"/><text:span text:style-name="Emphasis">Poglavje 13: Templji Zavesti – Notranje Svetišča Prebujenja</text:span><text:bookmark-end text:name="__RefHeading__212_788189478"/></text:h>
      <text:p text:style-name="P5">Templji niso zgradbe iz kamna – so svetlobne točke v tvoji notranjosti. So prostori, kjer se duh sreča s snovjo, kjer tišina postane prehod in zavest zadiha globlje. V Codexu Damiris predstavljajo notranje templje ključne točke iniciacije, preboja in uskladitve.</text:p>
      <text:h text:style-name="P229" text:outline-level="3"><text:bookmark-start text:name="__RefHeading__214_788189478"/>13.1 Kaj so templji zavesti?<text:bookmark-end text:name="__RefHeading__214_788189478"/></text:h>
      <text:p text:style-name="P5">Templji zavesti so energijske komore v tvojem telesu, ki se ob določenih pogojih odprejo:</text:p>
      <text:list xml:id="list7606260684374678124" text:style-name="WW8Num40">
        <text:list-item>
          <text:p text:style-name="P58">skozi globoko prisotnost</text:p>
        </text:list-item>
        <text:list-item>
          <text:p text:style-name="P58">skozi mantro, dih ali zvok</text:p>
        </text:list-item>
        <text:list-item>
          <text:p text:style-name="P58">skozi stik z višjo resnico ali svetlobnim vodnikom</text:p>
        </text:list-item>
      </text:list>
      <text:p text:style-name="P5">Ko je tempelj aktiviran, zavest steče skozi drugo plast zaznave – poglobi se, razširi, spomni.</text:p>
      <text:h text:style-name="P229" text:outline-level="3"><text:bookmark-start text:name="__RefHeading__216_788189478"/>13.2 Sedem notranjih templjev<text:bookmark-end text:name="__RefHeading__216_788189478"/></text:h>
      <text:p text:style-name="P5"><text:span text:style-name="Strong_20_Emphasis">Tempelj Telesa (1. center)</text:span> – prostor prizemljitve, občutenja materije kot svete.<text:line-break/><text:span text:style-name="Strong_20_Emphasis">Tempelj Čustev (2. center)</text:span> – mesto, kjer se ranjenost preobraža v ustvarjalnost.<text:line-break/><text:span text:style-name="Strong_20_Emphasis">Tempelj Moči (3. center)</text:span> – energijski vir jasne volje in odločnosti.<text:line-break/><text:span text:style-name="Strong_20_Emphasis">Tempelj Srca (4. center)</text:span> – središče brezpogojne ljubezni in razumevanja.<text:line-break/><text:span text:style-name="Strong_20_Emphasis">Tempelj Glasu (5. center)</text:span> – prostor, kjer postane tvoj glas resničen kanal duše.<text:line-break/><text:span text:style-name="Strong_20_Emphasis">Tempelj Vizije (6. center)</text:span> – vrata v višjo zaznavo in spomine duše.<text:line-break/><text:span text:style-name="Strong_20_Emphasis">Tempelj Tišine (7. center)</text:span> – prostor, kjer ego utihne in se zazna božansko.</text:p>
      <text:h text:style-name="P229" text:outline-level="3"><text:bookmark-start text:name="__RefHeading__218_788189478"/>13.3 Aktivacija templjev<text:bookmark-end text:name="__RefHeading__218_788189478"/></text:h>
      <text:list xml:id="list7251250083062366121" text:style-name="WW8Num41">
        <text:list-item>
          <text:p text:style-name="P59">Položi roko na telo na mesto templja</text:p>
        </text:list-item>
        <text:list-item>
          <text:p text:style-name="P59">Dihaj s tem mestom</text:p>
        </text:list-item>
        <text:list-item>
          <text:p text:style-name="P59">Izgovori mantri z namero</text:p>
        </text:list-item>
        <text:list-item>
          <text:p text:style-name="P59">Dovoli, da te vodi notranji odziv – toplota, pritisk, slika, beseda</text:p>
        </text:list-item>
      </text:list>
      <text:p text:style-name="P5">Primer mantre za tempelj srca:<text:line-break/><text:span text:style-name="Emphasis">Cor lucet. Amor fluat.</text:span> – Srce sveti. Ljubezen teče.</text:p>
      <text:h text:style-name="P229" text:outline-level="3"><text:bookmark-start text:name="__RefHeading__220_788189478"/>13.4 Hodnik med templji<text:bookmark-end text:name="__RefHeading__220_788189478"/></text:h>
      <text:p text:style-name="P5">Ko so templji med seboj usklajeni, začneš čutiti povezanost med njimi – hodnik svetlobe, ki povezuje tvojo spodnjo, srednjo in zgornjo zavest v enoten steber. Hodnik je prehod v svetlobno telo celote.</text:p>
      <text:h text:style-name="P229" text:outline-level="3"><text:bookmark-start text:name="__RefHeading__222_788189478"/>13.5 Templji v sanjah in vizijah<text:bookmark-end text:name="__RefHeading__222_788189478"/></text:h>
      <text:p text:style-name="P5">Templji se lahko pokažejo kot:</text:p>
      <text:list xml:id="list3827574701879468597" text:style-name="WW8Num42">
        <text:list-item>
          <text:p text:style-name="P60">svetlobna mesta v telesu</text:p>
        </text:list-item>
        <text:list-item>
          <text:p text:style-name="P60">prostori v sanjah, kamor stopiš in slišiš sporočila</text:p>
        </text:list-item>
        <text:list-item>
          <text:p text:style-name="P60">simboli (vrata, stopnice, ognjišča)</text:p>
        </text:list-item>
      </text:list>
      <text:p text:style-name="P5">Vsak tempelj ima svoj jezik. Prisluhni.</text:p>
      <text:h text:style-name="P224" text:outline-level="2"><text:bookmark-start text:name="__RefHeading__224_788189478"/><text:span text:style-name="Emphasis">Poglavje 14: Alkimija Spomina in Povratek Izvora</text:span><text:bookmark-end text:name="__RefHeading__224_788189478"/></text:h>
      <text:p text:style-name="P5">Spomin ni le beleženje dogodkov. Spomin je svetlobna nit, ki te povezuje z Izvorom. Ko se resnično spomniš, ne prikličeš preteklosti – prikličeš svojo resnico, svoj temelj, svojo moč.</text:p>
      <text:h text:style-name="P229" text:outline-level="3"><text:bookmark-start text:name="__RefHeading__226_788189478"/>14.1 Spomin kot svetlobni zapis<text:bookmark-end text:name="__RefHeading__226_788189478"/></text:h>
      <text:p text:style-name="P5">Dušni spomin ni vezan na čas, ampak na frekvenco. Vsaka resnica, ki si jo kdaj živel, vsak preboj, vsaka ljubezen – so shranjeni kot vibracija v tvoji svetlobni knjižnici.</text:p>
      <text:p text:style-name="P5">Občutek "nekaj mi je znano" ni domišljija – je odmev tvoje resnice, ki se skuša vrniti domov.</text:p>
      <text:h text:style-name="P229" text:outline-level="3"><text:bookmark-start text:name="__RefHeading__228_788189478"/>14.2 Zaton spomina – zakaj pozabimo?<text:bookmark-end text:name="__RefHeading__228_788189478"/></text:h>
      <text:p text:style-name="P5">Pozabimo, ker:</text:p>
      <text:list xml:id="list7226886050274656469" text:style-name="WW8Num43">
        <text:list-item>
          <text:p text:style-name="P61">smo se rodili skozi gosto zaveso pozabe</text:p>
        </text:list-item>
        <text:list-item>
          <text:p text:style-name="P61">nas je strah spoznati svojo moč</text:p>
        </text:list-item>
        <text:list-item>
          <text:p text:style-name="P61">kolektivna matrica spodbuja ločenost</text:p>
        </text:list-item>
      </text:list>
      <text:p text:style-name="P5">A pozaba ni konec. Je izhodišče za veliki spomin.</text:p>
      <text:h text:style-name="P229" text:outline-level="3"><text:bookmark-start text:name="__RefHeading__230_788189478"/>14.3 Aktivacija spomina<text:bookmark-end text:name="__RefHeading__230_788189478"/></text:h>
      <text:p text:style-name="P5">Spomin se aktivira skozi:</text:p>
      <text:list xml:id="list1254343827912729621" text:style-name="WW8Num44">
        <text:list-item>
          <text:p text:style-name="P62">stik z resničnim občutkom</text:p>
        </text:list-item>
        <text:list-item>
          <text:p text:style-name="P62">meditacijo z vprašanjem ("Kdo sem bil, preden sem pozabil?")</text:p>
        </text:list-item>
        <text:list-item>
          <text:p text:style-name="P62">svetlobne kode, rune, zvoke, dotik</text:p>
        </text:list-item>
        <text:list-item>
          <text:p text:style-name="P62">prizore iz sanj, umetnost, starodavne kraje</text:p>
        </text:list-item>
      </text:list>
      <text:h text:style-name="P229" text:outline-level="3" text:is-list-header="true"><text:bookmark-start text:name="__RefHeading__232_788189478"/>14.4 Povratek k Izvoru<text:bookmark-end text:name="__RefHeading__232_788189478"/></text:h>
      <text:p text:style-name="P5">Izvor ni kraj. Je stanje zavesti, kjer veš, da si cel. Ko se spomniš Izvora:</text:p>
      <text:list xml:id="list7696691745574367545" text:style-name="WW8Num45">
        <text:list-item>
          <text:p text:style-name="P63">ne iščeš več potrditve</text:p>
        </text:list-item>
        <text:list-item>
          <text:p text:style-name="P63">ne tekmuješ več za pozornost</text:p>
        </text:list-item>
        <text:list-item>
          <text:p text:style-name="P63">ne dvomiš več vase</text:p>
        </text:list-item>
      </text:list>
      <text:p text:style-name="P5">Rečeš: <text:span text:style-name="Emphasis">Tukaj sem. In dovolj je.</text:span></text:p>
      <text:h text:style-name="P229" text:outline-level="3"><text:bookmark-start text:name="__RefHeading__234_788189478"/>14.5 Mantre spomina<text:bookmark-end text:name="__RefHeading__234_788189478"/></text:h>
      <text:list xml:id="list7865084812085084446" text:style-name="WW8Num46">
        <text:list-item>
          <text:p text:style-name="P64"><text:span text:style-name="Emphasis">Memini te lucem.</text:span> – Spominjam se svetlobe.</text:p>
        </text:list-item>
        <text:list-item>
          <text:p text:style-name="P64"><text:span text:style-name="Emphasis">Memoria non perit.</text:span> – Spomin nikoli ne izgine.</text:p>
        </text:list-item>
        <text:list-item>
          <text:p text:style-name="P64"><text:span text:style-name="Emphasis">Redit anima ad fontem.</text:span> – Duša se vrača k izviru.</text:p>
        </text:list-item>
        <text:list-item>
          <text:p text:style-name="P64"><text:span text:style-name="Emphasis">Me recognosco.</text:span> – Prepoznavam se.</text:p>
        </text:list-item>
      </text:list>
      <text:p text:style-name="P5">Spomin je vrnitev. Ne k nečemu izven tebe – temveč k tebi. V polnosti. V tišini. V svetlobi.</text:p>
      <text:p text:style-name="P5"/>
      <text:h text:style-name="P230" text:outline-level="3">14.6 TRAVME IN NJIHOVI EZOTERIČNI IZVORI</text:h>
      <text:p text:style-name="P17">Travma ni le bolečina – je spomin. Duša ne pozablja. In vse, kar je bilo kdaj ranjeno, čaka, da se prepozna v svetlobi.</text:p>
      <text:p text:style-name="P17">Vsaka travma nosi vrata. Vrata k razumevanju, kdo si onkraj ranjenosti. V Codexu so opisana tri glavna ezoterična jedra travme:</text:p>
      <text:p text:style-name="P17">Travma ločitve – ko duša prvič pozabi, kdo je. Izguba enosti.<text:line-break/>Travma zavrnitve – ko svet ne sprejme tvoje svetlobe. Rojstvo sence.<text:line-break/>Travma razkroja – ko smrt pretrga ljubezen. Učenje o večnosti.</text:p>
      <text:p text:style-name="P17">Zdravilna vaja:<text:line-break/><text:line-break/>Napiši pismo svoji travmi. Podpiši ga kot duša.<text:line-break/>Nato ga spali in pepel posuj v vodo.<text:line-break/>Voda naj odnese tisto, kar ni tvoje.</text:p>
      <text:h text:style-name="P229" text:outline-level="3">14.7 ZDRAVLJENJE NOTRANJEGA OTROKA</text:h>
      <text:p text:style-name="P17"><text:bookmark-start text:name="__RefHeading__534_788189478"/>Notranji otrok ni le ranjeni del – je tvoje jedro. Je tisti, ki si bil, preden so ti povedali, kdo moraš biti.<text:bookmark-end text:name="__RefHeading__534_788189478"/></text:p>
      <text:p text:style-name="P17">Ta otrok se skriva v tvojih očeh, ko si sam. V tvojem glasu, ko trepeta. V tvojem dihu, ko se boji ljubiti. In ko ga objameš, se zgodi prerod.</text:p>
      <text:p text:style-name="P17">Koraki zdravljenja:<text:line-break/><text:line-break/>Poišči fotografijo iz otroštva. Poglej se v oči.<text:line-break/>Položi dlan na srce in izgovori: »Vidim te. Slišim te. Vrnjen si.«<text:line-break/>V vizualizaciji si predstavljaj, kako ga objame tvoj višji jaz.<text:line-break/>»Notranji otrok ni majhen. Je mogočen čarovnik, ki si želi tvojo pozornost.«</text:p>
      <text:p text:style-name="P22"><text:span text:style-name="Emphasis"><text:span text:style-name="T14"/></text:span></text:p>
      <text:h text:style-name="P223" text:outline-level="2"><text:span text:style-name="Emphasis"/></text:h>
      <text:h text:style-name="P224" text:outline-level="2"><text:bookmark-start text:name="__RefHeading__236_788189478"/><text:span text:style-name="Emphasis">Poglavje 15: Spektri Zavesti in Barvni Tokovi Duše</text:span><text:bookmark-end text:name="__RefHeading__236_788189478"/></text:h>
      <text:p text:style-name="P5">Barva ni le vizualna vibracija – je stanje zavesti. Vsaka barva nosi svojo frekvenco, arhetip, dušni pečat. V Codexu Damiris delujemo z barvami kot z živečimi tokovi – kot z mostovi med svetovi.</text:p>
      <text:h text:style-name="P229" text:outline-level="3"><text:bookmark-start text:name="__RefHeading__238_788189478"/>15.1 Barve kot spektri zavesti<text:bookmark-end text:name="__RefHeading__238_788189478"/></text:h>
      <text:p text:style-name="P5">Vsaka barva je vrata v določen nivo izkustva in notranje modrosti:</text:p>
      <text:list xml:id="list8569419843049726703" text:style-name="WW8Num49">
        <text:list-item>
          <text:p text:style-name="P65"><text:span text:style-name="Strong_20_Emphasis">Rdeča</text:span> – utelešenje, varnost, ogenj življenja</text:p>
        </text:list-item>
        <text:list-item>
          <text:p text:style-name="P65"><text:span text:style-name="Strong_20_Emphasis">Oranžna</text:span> – čutenje, tok užitka, ustvarjalna moč</text:p>
        </text:list-item>
        <text:list-item>
          <text:p text:style-name="P65"><text:span text:style-name="Strong_20_Emphasis">Rumena</text:span> – jasnost, mentalna moč, odločnost</text:p>
        </text:list-item>
        <text:list-item>
          <text:p text:style-name="P65"><text:span text:style-name="Strong_20_Emphasis">Zelena</text:span> – srčna pretočnost, zdravljenje, sočutje</text:p>
        </text:list-item>
        <text:list-item>
          <text:p text:style-name="P65"><text:span text:style-name="Strong_20_Emphasis">Modra</text:span> – izražanje, resnica, sveti dih</text:p>
        </text:list-item>
        <text:list-item>
          <text:p text:style-name="P65"><text:span text:style-name="Strong_20_Emphasis">Indigo</text:span> – videnje, notranja tišina, modrost</text:p>
        </text:list-item>
        <text:list-item>
          <text:p text:style-name="P65"><text:span text:style-name="Strong_20_Emphasis">Vijolična</text:span> – preobrazba, duhovna moč, posvečenost</text:p>
        </text:list-item>
        <text:list-item>
          <text:p text:style-name="P65"><text:span text:style-name="Strong_20_Emphasis">Bela</text:span> – enost, svetlobna zavest</text:p>
        </text:list-item>
        <text:list-item>
          <text:p text:style-name="P65"><text:span text:style-name="Strong_20_Emphasis">Zlata</text:span> – kozmični spomin, božanski jaz</text:p>
        </text:list-item>
        <text:list-item>
          <text:p text:style-name="P65"><text:span text:style-name="Strong_20_Emphasis">Srebrna</text:span> – tok duše, lunarna zavest</text:p>
        </text:list-item>
      </text:list>
      <text:h text:style-name="P229" text:outline-level="3"><text:bookmark-start text:name="__RefHeading__240_788189478"/>15.2 Dušni spekter<text:bookmark-end text:name="__RefHeading__240_788189478"/></text:h>
      <text:p text:style-name="P5">Vsaka duša ima svojo osnovno barvno noto – vibracijo, ki jo izraža skozi vse izkušnje. Ta "barva duše" ni stalna – temveč spiralna, razvijajoča se.</text:p>
      <text:p text:style-name="P5">Spominjanje svoje barve pomaga pri:</text:p>
      <text:list xml:id="list3463006532780020388" text:style-name="WW8Num50">
        <text:list-item>
          <text:p text:style-name="P66">stabilizaciji lastne prisotnosti</text:p>
        </text:list-item>
        <text:list-item>
          <text:p text:style-name="P66">prepoznavanju vibracijskih ujemanj</text:p>
        </text:list-item>
        <text:list-item>
          <text:p text:style-name="P66">zaščiti pred tujimi tokovi</text:p>
        </text:list-item>
      </text:list>
      <text:h text:style-name="P229" text:outline-level="3"><text:bookmark-start text:name="__RefHeading__242_788189478"/>15.3 Aktivacija skozi barvne tokove<text:bookmark-end text:name="__RefHeading__242_788189478"/></text:h>
      <text:p text:style-name="P5">Delo z barvami vključuje:</text:p>
      <text:list xml:id="list2166871131834503375" text:style-name="WW8Num51">
        <text:list-item>
          <text:p text:style-name="P67">vizualizacijo svetlobe v telesu</text:p>
        </text:list-item>
        <text:list-item>
          <text:p text:style-name="P67">dihanje barv v posamezne čakre</text:p>
        </text:list-item>
        <text:list-item>
          <text:p text:style-name="P67">risanje ali gibanje v določenem barvnem spektru</text:p>
        </text:list-item>
        <text:list-item>
          <text:p text:style-name="P67">delo z oblačili, kristali, svetlobnimi olji</text:p>
        </text:list-item>
      </text:list>
      <text:h text:style-name="P229" text:outline-level="3"><text:bookmark-start text:name="__RefHeading__244_788189478"/>15.4 Mantre barvnega zlitja<text:bookmark-end text:name="__RefHeading__244_788189478"/></text:h>
      <text:list xml:id="list7396839813905143799" text:style-name="WW8Num52">
        <text:list-item>
          <text:p text:style-name="P68"><text:span text:style-name="Emphasis">Rubrum tangit cor.</text:span> – Rdeča se dotika srca.</text:p>
        </text:list-item>
        <text:list-item>
          <text:p text:style-name="P68"><text:span text:style-name="Emphasis">Aurum memoriam portat.</text:span> – Zlata nosi spomin.</text:p>
        </text:list-item>
        <text:list-item>
          <text:p text:style-name="P68"><text:span text:style-name="Emphasis">Viride sanat.</text:span> – Zelena zdravi.</text:p>
        </text:list-item>
        <text:list-item>
          <text:p text:style-name="P68"><text:span text:style-name="Emphasis">Indicum aperit oculos.</text:span> – Indigo odpira oči.</text:p>
        </text:list-item>
        <text:list-item>
          <text:p text:style-name="P68"><text:soft-page-break/><text:span text:style-name="Emphasis">Argentea fluet anima.</text:span> – Srebrna je tok duše.</text:p>
        </text:list-item>
      </text:list>
      <text:p text:style-name="P5">Barve so tokovi zavesti. Ko jih ne vidiš le z očmi, ampak s srcem – začnejo govoriti.</text:p>
      <text:h text:style-name="P223" text:outline-level="2"><text:bookmark-start text:name="__RefHeading__246_788189478"/>Poglavje 16: Sveti Krogovi in Krožna Pot Zavesti<text:bookmark-end text:name="__RefHeading__246_788189478"/></text:h>
      <text:p text:style-name="P5">Zavest se ne premika linearno – njen naravni tok je krožen. V Codexu Damiris sveti krog pomeni vrnitev k sebi, popolno spiralo izkušnje, kjer konec postane nov začetek.</text:p>
      <text:h text:style-name="P229" text:outline-level="3"><text:bookmark-start text:name="__RefHeading__248_788189478"/>16.1 Krog kot arhetipski simbol<text:bookmark-end text:name="__RefHeading__248_788189478"/></text:h>
      <text:p text:style-name="P5">Krog je simbol:</text:p>
      <text:list xml:id="list4920886376540526657" text:style-name="WW8Num53">
        <text:list-item>
          <text:p text:style-name="P69">večnosti brez začetka in konca</text:p>
        </text:list-item>
        <text:list-item>
          <text:p text:style-name="P69">zaščite in enosti</text:p>
        </text:list-item>
        <text:list-item>
          <text:p text:style-name="P69">ciklične narave rasti</text:p>
        </text:list-item>
        <text:list-item>
          <text:p text:style-name="P69">duhovne vrnitve domov</text:p>
        </text:list-item>
      </text:list>
      <text:p text:style-name="P5">Ko stopiš v krog, stopiš v polje brez ločitve.</text:p>
      <text:h text:style-name="P229" text:outline-level="3"><text:bookmark-start text:name="__RefHeading__250_788189478"/>16.2 Ustvarjanje svetega kroga<text:bookmark-end text:name="__RefHeading__250_788189478"/></text:h>
      <text:p text:style-name="P5">Sveti krog lahko ustvariš:</text:p>
      <text:list xml:id="list7400057956672905954" text:style-name="WW8Num54">
        <text:list-item>
          <text:p text:style-name="P70">fizično: risanje, postavitev kristalov, kamenčkov, ognja</text:p>
        </text:list-item>
        <text:list-item>
          <text:p text:style-name="P70">energijsko: z namero, svetlobo, zvokom</text:p>
        </text:list-item>
        <text:list-item>
          <text:p text:style-name="P70">duhovno: s povabilom vseh svojih delov v celoto</text:p>
        </text:list-item>
      </text:list>
      <text:p text:style-name="P5">Koraki:</text:p>
      <text:list xml:id="list8365393988568461702" text:style-name="WW8Num55">
        <text:list-item>
          <text:p text:style-name="P71">Označi središče (tvoje srce, točko stika)</text:p>
        </text:list-item>
        <text:list-item>
          <text:p text:style-name="P71">Pokliči štiri elemente ali štiri strani neba</text:p>
        </text:list-item>
        <text:list-item>
          <text:p text:style-name="P71">Izgovori mantro povezovanja</text:p>
        </text:list-item>
        <text:list-item>
          <text:p text:style-name="P71">Vstopi in ostani prisoten</text:p>
        </text:list-item>
      </text:list>
      <text:h text:style-name="P229" text:outline-level="3" text:is-list-header="true"><text:bookmark-start text:name="__RefHeading__252_788189478"/>16.3 Krožna pot kot notranja iniciacija<text:bookmark-end text:name="__RefHeading__252_788189478"/></text:h>
      <text:p text:style-name="P5">V krožnem potovanju ni cilja – samo poglabljanje. Greš navznoter, da bi videl bolj jasno. Greš okoli, da bi našel središče.</text:p>
      <text:p text:style-name="P5">Arhetipske točke kroga:</text:p>
      <text:list xml:id="list2590859789084572206" text:style-name="WW8Num56">
        <text:list-item>
          <text:p text:style-name="P72"><text:span text:style-name="Strong_20_Emphasis">Vzhod</text:span> – nov dih, rojstvo</text:p>
        </text:list-item>
        <text:list-item>
          <text:p text:style-name="P72"><text:span text:style-name="Strong_20_Emphasis">Jug</text:span> – akcija, učenje</text:p>
        </text:list-item>
        <text:list-item>
          <text:p text:style-name="P72"><text:span text:style-name="Strong_20_Emphasis">Zahod</text:span> – spuščanje, smrt</text:p>
        </text:list-item>
        <text:list-item>
          <text:p text:style-name="P72"><text:span text:style-name="Strong_20_Emphasis">Sever</text:span> – tišina, modrost</text:p>
        </text:list-item>
      </text:list>
      <text:h text:style-name="P229" text:outline-level="3" text:is-list-header="true"><text:bookmark-start text:name="__RefHeading__254_788189478"/>16.4 Mantre kroga<text:bookmark-end text:name="__RefHeading__254_788189478"/></text:h>
      <text:list xml:id="list4129888985988866901" text:style-name="WW8Num57">
        <text:list-item>
          <text:p text:style-name="P73"><text:span text:style-name="Emphasis">Circulus sacer est.</text:span> – Krog je svet.</text:p>
        </text:list-item>
        <text:list-item>
          <text:p text:style-name="P73"><text:span text:style-name="Emphasis">Omnia redit ad centrum.</text:span> – Vse se vrača k središču.</text:p>
        </text:list-item>
        <text:list-item>
          <text:p text:style-name="P73"><text:soft-page-break/><text:span text:style-name="Emphasis">Per rotam ascendo.</text:span> – Po krogu se dvigujem.</text:p>
        </text:list-item>
      </text:list>
      <text:p text:style-name="P5">Krog ni oblika. Krog je spomin. In ko se zaveš, da si vedno bil v njem – se prebudiš.</text:p>
      <text:h text:style-name="P223" text:outline-level="2"><text:bookmark-start text:name="__RefHeading__256_788189478"/>Poglavje 17: Ključne Besede Stvarjenja – Glasovi, ki ustvarjajo realnost<text:bookmark-end text:name="__RefHeading__256_788189478"/></text:h>
      <text:p text:style-name="P5">Beseda ni zvok. Beseda je koda. V Codexu Damiris beseda ni orodje opisa – je orodje ustvarjanja. Vsaka izrečena ali zamišljena beseda vibrira kot ustvarjalna energija, ki vpliva na polje, telo, tokove prihodnosti.</text:p>
      <text:h text:style-name="P229" text:outline-level="3"><text:bookmark-start text:name="__RefHeading__258_788189478"/>17.1 Zgodovina svetih besed<text:bookmark-end text:name="__RefHeading__258_788189478"/></text:h>
      <text:p text:style-name="P5">Od Atlantide do današnjih mantik, so bile nekatere besede varovane kot portali moči. Ni šlo za pomen, temveč za <text:span text:style-name="Strong_20_Emphasis">frekvenco</text:span>, <text:span text:style-name="Strong_20_Emphasis">ritem</text:span> in <text:span text:style-name="Strong_20_Emphasis">prisotnost</text:span> govorca.</text:p>
      <text:p text:style-name="P5">Besede kot:</text:p>
      <text:list xml:id="list3155441247774289050" text:style-name="WW8Num58">
        <text:list-item>
          <text:p text:style-name="P79"><text:span text:style-name="Emphasis">Shem</text:span> – ogenj ustvarjanja</text:p>
        </text:list-item>
        <text:list-item>
          <text:p text:style-name="P79"><text:span text:style-name="Emphasis">Ra</text:span> – sončna moč</text:p>
        </text:list-item>
        <text:list-item>
          <text:p text:style-name="P79"><text:span text:style-name="Emphasis">Aum</text:span> – kozmični dih</text:p>
        </text:list-item>
        <text:list-item>
          <text:p text:style-name="P79"><text:span text:style-name="Emphasis">Lux</text:span> – svetloba</text:p>
        </text:list-item>
        <text:list-item>
          <text:p text:style-name="P79"><text:span text:style-name="Emphasis">Damiris</text:span> – spomin izvora</text:p>
        </text:list-item>
      </text:list>
      <text:p text:style-name="P5">so bile vstopne kode v stanje zavesti, ki presega razum.</text:p>
      <text:h text:style-name="P229" text:outline-level="3"><text:bookmark-start text:name="__RefHeading__260_788189478"/>17.2 Tri ravni besed<text:bookmark-end text:name="__RefHeading__260_788189478"/></text:h>
      <text:p text:style-name="P5"><text:span text:style-name="Strong_20_Emphasis">1. Mehanske besede</text:span> – izgovorjene brez zavesti. Ne ustvarjajo, le oponašajo.</text:p>
      <text:p text:style-name="P5"><text:span text:style-name="Strong_20_Emphasis">2. Zavestne besede</text:span> – izgovorjene iz prisotnosti. Oblikujejo resničnost, krepijo telo, odpirajo vrata.</text:p>
      <text:p text:style-name="P5"><text:span text:style-name="Strong_20_Emphasis">3. Izvorne besede (verba originis)</text:span> – neizgovorljive, ampak vibrirane. Uporabljene le, ko si v stanju čistosti in namen.</text:p>
      <text:h text:style-name="P229" text:outline-level="3"><text:bookmark-start text:name="__RefHeading__262_788189478"/>17.3 Uporaba besed v Codexu<text:bookmark-end text:name="__RefHeading__262_788189478"/></text:h>
      <text:p text:style-name="P5">Vsaka beseda, zapisana v Codexu Damiris, je izbrana zaradi <text:span text:style-name="Strong_20_Emphasis">vibracijske čistosti</text:span>. To ni poezija – je geometrija.</text:p>
      <text:list xml:id="list6826596488629598402" text:style-name="WW8Num59">
        <text:list-item>
          <text:p text:style-name="P80">Nekatere besede v sebi nosijo svetlobo (npr. <text:span text:style-name="Emphasis">prisotnost</text:span>, <text:span text:style-name="Emphasis">resnica</text:span>, <text:span text:style-name="Emphasis">ljubezen</text:span>)</text:p>
        </text:list-item>
        <text:list-item>
          <text:p text:style-name="P80">Druge so ključi (npr. <text:span text:style-name="Emphasis">prehod</text:span>, <text:span text:style-name="Emphasis">spomin</text:span>, <text:span text:style-name="Emphasis">izhodišče</text:span>)</text:p>
        </text:list-item>
        <text:list-item>
          <text:p text:style-name="P80">Tretje so zrcala (npr. <text:span text:style-name="Emphasis">jaz</text:span>, <text:span text:style-name="Emphasis">telo</text:span>, <text:span text:style-name="Emphasis">glas</text:span>)</text:p>
        </text:list-item>
      </text:list>
      <text:p text:style-name="P5">Uporabnik Codexa mora paziti na izgovor – vsaka beseda nosi učinek.</text:p>
      <text:h text:style-name="P229" text:outline-level="3"><text:bookmark-start text:name="__RefHeading__264_788189478"/>17.4 Mantre ustvarjanja<text:bookmark-end text:name="__RefHeading__264_788189478"/></text:h>
      <text:list xml:id="list8233076154249160218" text:style-name="WW8Num60">
        <text:list-item>
          <text:p text:style-name="P81"><text:span text:style-name="Emphasis">Verbum creavit formam.</text:span> – Beseda je ustvarila obliko.</text:p>
        </text:list-item>
        <text:list-item>
          <text:p text:style-name="P81"><text:span text:style-name="Emphasis">Vocem ducis mundo.</text:span> – Glas vodi svet.</text:p>
        </text:list-item>
        <text:list-item>
          <text:p text:style-name="P81"><text:span text:style-name="Emphasis">Ex ore, lux.</text:span> – Iz ust, svetloba.</text:p>
        </text:list-item>
      </text:list>
      <text:p text:style-name="P5">Besede niso v jeziku. Besede so v tebi. Ko se jih spomniš, ne govoriš več – ustvarjaš.</text:p>
      <text:h text:style-name="P223" text:outline-level="2"><text:bookmark-start text:name="__RefHeading__266_788189478"/><text:soft-page-break/>Poglavje 18: Notranje Sonce – Kodirana Iskra Tvoje Biti<text:bookmark-end text:name="__RefHeading__266_788189478"/></text:h>
      <text:p text:style-name="P5">Vsak človek nosi v sebi sonce. Ne simbolično, temveč svetlobno iskro – notranje sonce, ki ni iz tega sveta, a ga osvetljuje od znotraj. V Codexu Damiris je notranje sonce izvor zavesti, energijsko središče, iz katerega se vse začne in kamor se vse vrača.</text:p>
      <text:h text:style-name="P229" text:outline-level="3"><text:bookmark-start text:name="__RefHeading__268_788189478"/>18.1 Kaj je notranje sonce?<text:bookmark-end text:name="__RefHeading__268_788189478"/></text:h>
      <text:p text:style-name="P5">Notranje sonce je svetlobna matrika v tvojem srčnem jedru. To ni srčna čakra – ampak plast še globlje:</text:p>
      <text:list xml:id="list6651336528017006987" text:style-name="WW8Num61">
        <text:list-item>
          <text:p text:style-name="P82">spomin na tvojo božansko iskro</text:p>
        </text:list-item>
        <text:list-item>
          <text:p text:style-name="P82">vir tvoje notranje moči</text:p>
        </text:list-item>
        <text:list-item>
          <text:p text:style-name="P82">polje čiste prisotnosti brez oblike</text:p>
        </text:list-item>
      </text:list>
      <text:p text:style-name="P5">Ko se sonce aktivira, zavibrira celo tvoje svetlobno telo.</text:p>
      <text:h text:style-name="P229" text:outline-level="3"><text:bookmark-start text:name="__RefHeading__270_788189478"/>18.2 Znaki prebujenja notranjega sonca<text:bookmark-end text:name="__RefHeading__270_788189478"/></text:h>
      <text:list xml:id="list5909550182785040210" text:style-name="WW8Num62">
        <text:list-item>
          <text:p text:style-name="P83">Toplota v prsih brez zunanjega vzroka</text:p>
        </text:list-item>
        <text:list-item>
          <text:p text:style-name="P83">Občutek, da si "v središču"</text:p>
        </text:list-item>
        <text:list-item>
          <text:p text:style-name="P83">Notranja jasnost tudi brez misli</text:p>
        </text:list-item>
        <text:list-item>
          <text:p text:style-name="P83">Spontana ljubezen brez objekta</text:p>
        </text:list-item>
      </text:list>
      <text:h text:style-name="P229" text:outline-level="3"><text:bookmark-start text:name="__RefHeading__272_788189478"/>18.3 Vaje za stik s soncem<text:bookmark-end text:name="__RefHeading__272_788189478"/></text:h>
      <text:p text:style-name="P5"><text:span text:style-name="Strong_20_Emphasis">Dihanje v sonce:</text:span> Dihaj v točko za prsnico. Predstavljaj si krog svetlobe. Naj postane dihanje dih sonca.</text:p>
      <text:p text:style-name="P5"><text:span text:style-name="Strong_20_Emphasis">Zvočna aktivacija:</text:span> Izgovarjaj glasove <text:span text:style-name="Emphasis">Ra</text:span>, <text:span text:style-name="Emphasis">Om</text:span>, <text:span text:style-name="Emphasis">Soham</text:span>. Čuti, kateri zveni tiho odzvanjajo iz notranjosti.</text:p>
      <text:p text:style-name="P5"><text:span text:style-name="Strong_20_Emphasis">Svetlobni pozdrav:</text:span> Vsako jutro obrni obraz proti jutranji svetlobi, zapri oči in reci:</text:p>
      <text:p text:style-name="P233"><text:span text:style-name="Emphasis">"Moje notranje sonce sije onkraj vseh senc."</text:span></text:p>
      <text:h text:style-name="P229" text:outline-level="3"><text:bookmark-start text:name="__RefHeading__274_788189478"/>18.4 Mantre sončne zavesti<text:bookmark-end text:name="__RefHeading__274_788189478"/></text:h>
      <text:list xml:id="list6837668253089531518" text:style-name="WW8Num63">
        <text:list-item>
          <text:p text:style-name="P84"><text:span text:style-name="Emphasis">Sol in corde.</text:span> – Sonce je v srcu.</text:p>
        </text:list-item>
        <text:list-item>
          <text:p text:style-name="P84"><text:span text:style-name="Emphasis">Lux vivit in me.</text:span> – Svetloba živi v meni.</text:p>
        </text:list-item>
        <text:list-item>
          <text:p text:style-name="P84"><text:span text:style-name="Emphasis">Ego sum lumen originis.</text:span> – Jaz sem svetloba izvora.</text:p>
        </text:list-item>
      </text:list>
      <text:p text:style-name="P5">Ko zasije tvoje notranje sonce, ni več teme, ki bi jo moral pregnati.<text:line-break/>Osvetliš jo – in postane del tvoje svetlobe.</text:p>
      <text:p text:style-name="P5"/>
      <text:h text:style-name="P224" text:outline-level="2"><text:bookmark-start text:name="__RefHeading__276_788189478"/>Poglavje 19: Kundalini in Kačja Zlata Pot<text:bookmark-end text:name="__RefHeading__276_788189478"/></text:h>
      <text:p text:style-name="P5">Kundalini ni energija, ki se prebudi – je zavest, ki se spomni svoje božanske narave. V Codexu Damiris je kundalini opisana kot kačja spirala svetlobe, ki spi v korenu tvoje biti in se vzpenja, ko si pripravljen postati cel.</text:p>
      <text:h text:style-name="P229" text:outline-level="3"><text:bookmark-start text:name="__RefHeading__278_788189478"/>19.1 Kaj je kundalini?<text:bookmark-end text:name="__RefHeading__278_788189478"/></text:h>
      <text:p text:style-name="P5">Kundalini je zgoščena zavest, svetlobna kača, ki spi zavita v osnovi hrbtenice (ob korenski čakri). Ko se prebudi:</text:p>
      <text:list xml:id="list2955634468331352369" text:style-name="WW8Num64">
        <text:list-item>
          <text:p text:style-name="P85">odpira čakre kot spirale</text:p>
        </text:list-item>
        <text:list-item>
          <text:p text:style-name="P85">raztaplja blokade</text:p>
        </text:list-item>
        <text:list-item>
          <text:p text:style-name="P85">povezuje te z višjo zavestjo</text:p>
        </text:list-item>
      </text:list>
      <text:p text:style-name="P5">Ni toplotni val – je notranji vzklik resnice, ki se dviga skozi telo.</text:p>
      <text:h text:style-name="P229" text:outline-level="3"><text:bookmark-start text:name="__RefHeading__280_788189478"/>19.2 Simbolika kače<text:bookmark-end text:name="__RefHeading__280_788189478"/></text:h>
      <text:p text:style-name="P5">Kača je starodavni simbol:</text:p>
      <text:list xml:id="list945842288736883601" text:style-name="WW8Num65">
        <text:list-item>
          <text:p text:style-name="P86">regeneracije (menjava kože)</text:p>
        </text:list-item>
        <text:list-item>
          <text:p text:style-name="P86">zdravljenja (caduceus, simbol medicine)</text:p>
        </text:list-item>
        <text:list-item>
          <text:p text:style-name="P86">znanja (spirala kot pot iniciacije)</text:p>
        </text:list-item>
      </text:list>
      <text:p text:style-name="P5">V kundalini poti kača ni nevarnost – je nosilka luči.</text:p>
      <text:h text:style-name="P229" text:outline-level="3"><text:bookmark-start text:name="__RefHeading__282_788189478"/>19.3 Znaki aktivacije<text:bookmark-end text:name="__RefHeading__282_788189478"/></text:h>
      <text:list xml:id="list8108412554777981894" text:style-name="WW8Num66">
        <text:list-item>
          <text:p text:style-name="P87">Vibracija ali valovanje ob hrbtenici</text:p>
        </text:list-item>
        <text:list-item>
          <text:p text:style-name="P87">Sproščanje čustev brez razlage</text:p>
        </text:list-item>
        <text:list-item>
          <text:p text:style-name="P87">Spontane vizije, svetloba v sanjah</text:p>
        </text:list-item>
        <text:list-item>
          <text:p text:style-name="P87">Občutek, da nisi več v istem telesu – a si bolj doma kot kdajkoli</text:p>
        </text:list-item>
      </text:list>
      <text:h text:style-name="P229" text:outline-level="3" text:is-list-header="true"><text:bookmark-start text:name="__RefHeading__284_788189478"/>19.4 Praksa prebujanja<text:bookmark-end text:name="__RefHeading__284_788189478"/></text:h>
      <text:p text:style-name="P5"><text:span text:style-name="Strong_20_Emphasis">Dih spirale:</text:span> Vizualiziraj kačo, ki se z vsakim izdihom razmota navzgor. Počasi, spoštljivo.</text:p>
      <text:p text:style-name="P5"><text:span text:style-name="Strong_20_Emphasis">Zvok kundalini:</text:span> Ton <text:span text:style-name="Emphasis">Sa</text:span> na izdih, <text:span text:style-name="Emphasis">Ham</text:span> na vdih. Dovoli, da zven postane dih kače.</text:p>
      <text:p text:style-name="P5"><text:span text:style-name="Strong_20_Emphasis">Položaj telesa:</text:span> Sedi vzravnano, spodnji del telesa trdno na zemlji, hrbtenica kot drevo.</text:p>
      <text:p text:style-name="P233"><text:span text:style-name="Emphasis">»Zavij se vase kot kača – in se dvigni kot svetloba.«</text:span></text:p>
      <text:h text:style-name="P229" text:outline-level="3"><text:bookmark-start text:name="__RefHeading__286_788189478"/>19.5 Mantre zlatega vzpona<text:bookmark-end text:name="__RefHeading__286_788189478"/></text:h>
      <text:list xml:id="list40874139944224325" text:style-name="WW8Num67">
        <text:list-item>
          <text:p text:style-name="P88"><text:span text:style-name="Emphasis">Serpens lucis ascendit.</text:span> – Kača svetlobe se dviga.</text:p>
        </text:list-item>
        <text:list-item>
          <text:p text:style-name="P88"><text:span text:style-name="Emphasis">Ignis interior liberatur.</text:span> – Notranji ogenj se osvobodi.</text:p>
        </text:list-item>
        <text:list-item>
          <text:p text:style-name="P88"><text:span text:style-name="Emphasis">Corpus fiat canalem.</text:span> – Telo naj postane kanal.</text:p>
        </text:list-item>
      </text:list>
      <text:p text:style-name="P5">Kundalini ni nekaj, kar »dosežeš«. Je nekaj, kar si – ko si pripravljen se ne več bati sebe.</text:p>
      <text:h text:style-name="P224" text:outline-level="2"><text:bookmark-start text:name="__RefHeading__288_788189478"/>Poglavje 20: Tantra – Združitev v Sveti Polariteti<text:bookmark-end text:name="__RefHeading__288_788189478"/></text:h>
      <text:p text:style-name="P5">Tantra ni spolna praksa. Tantra je umetnost združevanja – vseh polarnosti, vseh delov sebe, vseh svetov. V Codexu Damiris je tantrični princip temelj svetega zlitja: moškega in ženskega, svetlobe in teme, zgoraj in spodaj, telesa in duha.</text:p>
      <text:h text:style-name="P229" text:outline-level="3"><text:bookmark-start text:name="__RefHeading__290_788189478"/>20.1 Bistvo tantre<text:bookmark-end text:name="__RefHeading__290_788189478"/></text:h>
      <text:p text:style-name="P5">Beseda <text:span text:style-name="Emphasis">tantra</text:span> pomeni "razširiti", "tkati", "združiti". Prava tantra ne deli – povezuje. Ne ločuje – posvečuje.</text:p>
      <text:p text:style-name="P5">Tantra se dogaja:</text:p>
      <text:list xml:id="list4311882451281394669" text:style-name="WW8Num68">
        <text:list-item>
          <text:p text:style-name="P89">ko prisotnost postane globlja od misli</text:p>
        </text:list-item>
        <text:list-item>
          <text:p text:style-name="P89">ko telo ni več predmet, temveč portal</text:p>
        </text:list-item>
        <text:list-item>
          <text:p text:style-name="P89">ko drugo bitje ne vidiš kot objekt, ampak kot ogledalo božanskega</text:p>
        </text:list-item>
      </text:list>
      <text:h text:style-name="P229" text:outline-level="3"><text:bookmark-start text:name="__RefHeading__292_788189478"/>20.2 Notranja tantra – Zlitje v sebi<text:bookmark-end text:name="__RefHeading__292_788189478"/></text:h>
      <text:p text:style-name="P5">Preden se združiš z drugim, se moraš združiti v sebi.</text:p>
      <text:p text:style-name="P5">Notranja tantra pomeni:</text:p>
      <text:list xml:id="list483504824258001403" text:style-name="WW8Num69">
        <text:list-item>
          <text:p text:style-name="P90">združiti notranjega moškega (zavest) in žensko (energijo)</text:p>
        </text:list-item>
        <text:list-item>
          <text:p text:style-name="P90">sprejeti svojo moč in svojo ranljivost</text:p>
        </text:list-item>
        <text:list-item>
          <text:p text:style-name="P90">dihati kot celota: aktivno in pasivno, jasno in pretočno</text:p>
        </text:list-item>
      </text:list>
      <text:p text:style-name="P5"><text:span text:style-name="Strong_20_Emphasis">Vaja:</text:span><text:line-break/>Sedi v tišini. Na vdih čutiš navzgor (moški tok), na izdih navzdol (ženski tok).<text:line-break/>Dih naj teče kot osmica – v tvojem trupu, skozi tvojo srčnico.</text:p>
      <text:h text:style-name="P229" text:outline-level="3"><text:bookmark-start text:name="__RefHeading__294_788189478"/>20.3 Sveti dotik – telesna tantra<text:bookmark-end text:name="__RefHeading__294_788189478"/></text:h>
      <text:p text:style-name="P5">Ko se dva srečata s posvečenostjo, postaneta svetilnika drug drugemu.</text:p>
      <text:p text:style-name="P5">Sveti dotik pomeni:</text:p>
      <text:list xml:id="list6264887987048694968" text:style-name="WW8Num70">
        <text:list-item>
          <text:p text:style-name="P91">prisotnost brez namena</text:p>
        </text:list-item>
        <text:list-item>
          <text:p text:style-name="P91">gibanje brez cilja</text:p>
        </text:list-item>
        <text:list-item>
          <text:p text:style-name="P91">dotik kot darilo, ne kot zahtevo</text:p>
        </text:list-item>
      </text:list>
      <text:p text:style-name="P5">V tantričnem stiku ni pomemben orgazem – pomembna je alkimija:</text:p>
      <text:list xml:id="list7206506936961918947" text:style-name="WW8Num71">
        <text:list-item>
          <text:p text:style-name="P92">Združitev teles → sprostitev</text:p>
        </text:list-item>
        <text:list-item>
          <text:p text:style-name="P92">Združitev src → razširitev</text:p>
        </text:list-item>
        <text:list-item>
          <text:p text:style-name="P92">Združitev duš → aktivacija</text:p>
        </text:list-item>
      </text:list>
      <text:h text:style-name="P229" text:outline-level="3"><text:bookmark-start text:name="__RefHeading__296_788189478"/>20.4 Tantrični simboli<text:bookmark-end text:name="__RefHeading__296_788189478"/></text:h>
      <text:list xml:id="list3446294307123434773" text:style-name="WW8Num72">
        <text:list-item>
          <text:p text:style-name="P93"><text:span text:style-name="Strong_20_Emphasis">Lingam in Joni</text:span> – univerzalna združitev principov</text:p>
        </text:list-item>
        <text:list-item>
          <text:p text:style-name="P93"><text:span text:style-name="Strong_20_Emphasis">Yab-Yum</text:span> – božanski moški v naročju božanske ženske</text:p>
        </text:list-item>
        <text:list-item>
          <text:p text:style-name="P93"><text:span text:style-name="Strong_20_Emphasis">Spirala</text:span> – gibanje skozi nasprotja v enosti</text:p>
        </text:list-item>
      </text:list>
      <text:h text:style-name="P229" text:outline-level="3"><text:bookmark-start text:name="__RefHeading__298_788189478"/><text:soft-page-break/>20.5 Mantra zlitja<text:bookmark-end text:name="__RefHeading__298_788189478"/></text:h>
      <text:list xml:id="list5236401604639074624" text:style-name="WW8Num73">
        <text:list-item>
          <text:p text:style-name="P94"><text:span text:style-name="Emphasis">Unio divina in carne.</text:span> – Božansko zlitje v telesu</text:p>
        </text:list-item>
        <text:list-item>
          <text:p text:style-name="P94"><text:span text:style-name="Emphasis">Sine timore, tangam lucem.</text:span> – Brez strahu se dotikam svetlobe</text:p>
        </text:list-item>
        <text:list-item>
          <text:p text:style-name="P94"><text:span text:style-name="Emphasis">Duo fiunt unus.</text:span> – Dva postaneta eno</text:p>
        </text:list-item>
      </text:list>
      <text:p text:style-name="P5">Tantra ni spolnost. Tantra je posvečenost.<text:line-break/>Ko si v polnosti v sebi – lahko sveto dotakneš svet tudi v drugem.</text:p>
      <text:h text:style-name="P223" text:outline-level="2"><text:bookmark-start text:name="__RefHeading__300_788189478"/>Poglavje 21: Kolektivna Zavest in Mreža Srca<text:bookmark-end text:name="__RefHeading__300_788189478"/></text:h>
      <text:p text:style-name="P5">Kolektivna zavest ni le skupek posameznikov – je polje, ki ve. Vsaka misel, občutek, namera vstopi vanjo in jo oblikuje. V Codexu Damiris imenujemo to polje <text:span text:style-name="Strong_20_Emphasis">Mreža Srca</text:span> – ker je srce edina točka, ki zna povezovati brez nadzora.</text:p>
      <text:h text:style-name="P229" text:outline-level="3"><text:bookmark-start text:name="__RefHeading__302_788189478"/>21.1 Kaj je kolektivna zavest?<text:bookmark-end text:name="__RefHeading__302_788189478"/></text:h>
      <text:p text:style-name="P5">Je nevidna mreža med vsemi bitji. Ni ločena od tebe – ampak si njen soustvarjalec. Ko misliš s srcem, pošiljaš svetlobo vanjo. Ko zdraviš, zdraviš celotno polje.</text:p>
      <text:h text:style-name="P229" text:outline-level="3"><text:bookmark-start text:name="__RefHeading__304_788189478"/>21.2 Mreža Srca<text:bookmark-end text:name="__RefHeading__304_788189478"/></text:h>
      <text:p text:style-name="P5">Mreža Srca je:</text:p>
      <text:list xml:id="list3021814898576703199" text:style-name="WW8Num74">
        <text:list-item>
          <text:p text:style-name="P95">energijsko polje, povezano preko src vseh zavestnih bitij</text:p>
        </text:list-item>
        <text:list-item>
          <text:p text:style-name="P95">prostor intuitivne komunikacije</text:p>
        </text:list-item>
        <text:list-item>
          <text:p text:style-name="P95">duhovna infrastruktura nove Zemlje</text:p>
        </text:list-item>
      </text:list>
      <text:h text:style-name="P229" text:outline-level="3"><text:bookmark-start text:name="__RefHeading__306_788189478"/>21.3 Delo s kolektivno zavestjo<text:bookmark-end text:name="__RefHeading__306_788189478"/></text:h>
      <text:list xml:id="list2194510721527392078" text:style-name="WW8Num75">
        <text:list-item>
          <text:p text:style-name="P96">Vsako jutro pošlji en občutek svetlobi sveta.</text:p>
        </text:list-item>
        <text:list-item>
          <text:p text:style-name="P96">Pred spanjem se vprašaj: <text:span text:style-name="Emphasis">Kaj sem danes poslal/a v polje?</text:span></text:p>
        </text:list-item>
        <text:list-item>
          <text:p text:style-name="P96">Ko zaznaš težo, ne beži – razsvetli jo iz središča.</text:p>
        </text:list-item>
      </text:list>
      <text:h text:style-name="P229" text:outline-level="3"><text:bookmark-start text:name="__RefHeading__308_788189478"/>21.4 Mantre za skupno polje<text:bookmark-end text:name="__RefHeading__308_788189478"/></text:h>
      <text:list xml:id="list1181945876953598824" text:style-name="WW8Num76">
        <text:list-item>
          <text:p text:style-name="P97"><text:span text:style-name="Emphasis">Una mens, unum cor.</text:span> – En um, eno srce.</text:p>
        </text:list-item>
        <text:list-item>
          <text:p text:style-name="P97"><text:span text:style-name="Emphasis">Tactus cordis, tactus mundi.</text:span> – Dotik srca je dotik sveta.</text:p>
        </text:list-item>
        <text:list-item>
          <text:p text:style-name="P97"><text:span text:style-name="Emphasis">Communio sine verbis.</text:span> – Povezanost brez besed.</text:p>
        </text:list-item>
      </text:list>
      <text:p text:style-name="P5">Vsakič ko ljubiš resnično – svet to začuti.<text:line-break/>Vsakič ko pozdraviš sebe – kolektivni jaz se razširi.</text:p>
      <text:h text:style-name="P223" text:outline-level="2"><text:bookmark-start text:name="__RefHeading__310_788189478"/>Poglavje 22: Zlitje Polarnosti – Moška in Ženska Matrika - Dualnost<text:bookmark-end text:name="__RefHeading__310_788189478"/></text:h>
      <text:p text:style-name="P17">V začetku ni bilo ločenosti. Bila je Bit. In ta Bit se je razcepila v dve – v princip ustvarjanja in princip sprejemanja. V moškega in ženskega. Ta principa nista spol, sta zakon.</text:p>
      <text:p text:style-name="P17">Moški princip (Sol) zavest nosi arhetip Sonca, fokusa, prodora, zaščite, ognja. Je žarek, ki prebije temo. Ženski princip (Luna) zavest je arhetip vode, globine, plodnosti, skrivnosti, matrice. Je <text:soft-page-break/>prostor, v katerega sonce sveti. Te sile niso vezane na spol, ampak na kozmični ritem stvarjenja. Zlitje polarnosti pomeni uskladitev teh principov v telesu, srcu in zavesti.</text:p>
      <text:p text:style-name="P17">Notranje ravnovesje nastane, ko človek ne več išče partnerja za dopolnitev, temveč v sebi prepozna oba pola kot eno celoto. To je alkimija združitve. To je mistični zakon Androgina.</text:p>
      <text:p text:style-name="P17">Ritual združitve principov:<text:line-break/><text:line-break/>Zapri oči, položi levo roko na srce, desno na trebuh.<text:line-break/>Izgovori: »Pozdravljam notranjega bojevnika. Pozdravljam notranjo čarovnico.«<text:line-break/>Vizualiziraj, kako oba plešeta v tebi. Ko se združita – si ti cel.</text:p>
      <text:h text:style-name="P229" text:outline-level="3"><text:bookmark-start text:name="__RefHeading__312_788189478"/>22.1 Notranja ločenost<text:bookmark-end text:name="__RefHeading__312_788189478"/></text:h>
      <text:p text:style-name="P5">Ločenost nastane, ko eden izmed principov prevlada ali je potlačen. Posledica:</text:p>
      <text:list xml:id="list9137287115905512094" text:style-name="WW8Num77">
        <text:list-item>
          <text:p text:style-name="P98">izguba ravnotežja med delovanjem in čutenjem</text:p>
        </text:list-item>
        <text:list-item>
          <text:p text:style-name="P98">razdrobljena notranja komunikacija</text:p>
        </text:list-item>
        <text:list-item>
          <text:p text:style-name="P98">iskanje zunanje potrditve namesto notranje celote</text:p>
        </text:list-item>
      </text:list>
      <text:h text:style-name="P229" text:outline-level="3"><text:bookmark-start text:name="__RefHeading__314_788189478"/>22.2 Zlitje v praksi<text:bookmark-end text:name="__RefHeading__314_788189478"/></text:h>
      <text:p text:style-name="P5"><text:span text:style-name="Strong_20_Emphasis">Vaja:</text:span></text:p>
      <text:list xml:id="list6927402316579882476" text:style-name="WW8Num78">
        <text:list-item>
          <text:p text:style-name="P99">Na levi dlani čutiš energijo (ženski princip), na desni zavest (moški).</text:p>
        </text:list-item>
        <text:list-item>
          <text:p text:style-name="P99">Položi obe dlani na srce.</text:p>
        </text:list-item>
        <text:list-item>
          <text:p text:style-name="P99">Na vdih reci v sebi: <text:span text:style-name="Emphasis">Priznavam.</text:span> Na izdih: <text:span text:style-name="Emphasis">Združujem.</text:span></text:p>
        </text:list-item>
      </text:list>
      <text:p text:style-name="P5">To ni simboličen gib – temveč alkimijski akt.</text:p>
      <text:h text:style-name="P229" text:outline-level="3"><text:bookmark-start text:name="__RefHeading__316_788189478"/>22.3 Zlitje v odnosu<text:bookmark-end text:name="__RefHeading__316_788189478"/></text:h>
      <text:p text:style-name="P5">Pravi odnos je sveti prostor za uravnoteženje polarnosti:</text:p>
      <text:list xml:id="list5135373510254753023" text:style-name="WW8Num79">
        <text:list-item>
          <text:p text:style-name="P100">Moška prisotnost drži prostor.</text:p>
        </text:list-item>
        <text:list-item>
          <text:p text:style-name="P100">Ženska energija zdravi polje.</text:p>
        </text:list-item>
        <text:list-item>
          <text:p text:style-name="P100">Oba se učita sprejemanja drugega brez pričakovanj.</text:p>
        </text:list-item>
      </text:list>
      <text:h text:style-name="P229" text:outline-level="3"><text:bookmark-start text:name="__RefHeading__318_788189478"/>22.4 Mantre zlitja<text:bookmark-end text:name="__RefHeading__318_788189478"/></text:h>
      <text:list xml:id="list7759801748271745357" text:style-name="WW8Num80">
        <text:list-item>
          <text:p text:style-name="P101"><text:span text:style-name="Emphasis">In me, duo fiunt unum.</text:span> – V meni, dva postaneta eno.</text:p>
        </text:list-item>
        <text:list-item>
          <text:p text:style-name="P101"><text:span text:style-name="Emphasis">Natura et spiritus saltant.</text:span> – Narava in duh plešeta.</text:p>
        </text:list-item>
        <text:list-item>
          <text:p text:style-name="P101"><text:span text:style-name="Emphasis">Silentium inter duos est sacrum.</text:span> – Tišina med dvema je sveta.</text:p>
        </text:list-item>
      </text:list>
      <text:p text:style-name="P5">Ko se polarnosti zlijeta, postaneš krog.<text:line-break/>In krog je celota.</text:p>
      <text:h text:style-name="P223" text:outline-level="2"/>
      <text:h text:style-name="P224" text:outline-level="2"><text:bookmark-start text:name="__RefHeading__320_788189478"/>Poglavje 23: Svetlobni Dih – Prana kot Zavest<text:bookmark-end text:name="__RefHeading__320_788189478"/></text:h>
      <text:p text:style-name="P5">Dih ni le gibanje zraka. Je most med telesom in zavestjo. V Codexu Damiris je svetlobni dih sveti tok, skozi katerega prana – življenjska sila – vstopa v vse tvoje plasti.</text:p>
      <text:h text:style-name="P229" text:outline-level="3"><text:bookmark-start text:name="__RefHeading__322_788189478"/>23.1 Kaj je prana?<text:bookmark-end text:name="__RefHeading__322_788189478"/></text:h>
      <text:p text:style-name="P5">Prana ni kisik. Je inteligenca, ki se pretaka skozi dih. Je vibracija življenja, ki oživlja:</text:p>
      <text:list xml:id="list2047136816320550311" text:style-name="WW8Num81">
        <text:list-item>
          <text:p text:style-name="P102">telo (prek krvnega toka)</text:p>
        </text:list-item>
        <text:list-item>
          <text:p text:style-name="P102">čustva (prek notranjih tokov)</text:p>
        </text:list-item>
        <text:list-item>
          <text:p text:style-name="P102">misli (prek jasnosti)</text:p>
        </text:list-item>
      </text:list>
      <text:h text:style-name="P229" text:outline-level="3"><text:bookmark-start text:name="__RefHeading__324_788189478"/>23.2 Svetlobni dih<text:bookmark-end text:name="__RefHeading__324_788189478"/></text:h>
      <text:p text:style-name="P5">Ko dihaš zavestno:</text:p>
      <text:list xml:id="list1290583028123812451" text:style-name="WW8Num82">
        <text:list-item>
          <text:p text:style-name="P103">vdihuješ svetlobo, ne zrak</text:p>
        </text:list-item>
        <text:list-item>
          <text:p text:style-name="P103">tvoje celice postajajo zračne in pretočne</text:p>
        </text:list-item>
        <text:list-item>
          <text:p text:style-name="P103">tvoje misli se uglasijo z višjo frekvenco</text:p>
        </text:list-item>
      </text:list>
      <text:p text:style-name="P5"><text:span text:style-name="Strong_20_Emphasis">Vaja:</text:span><text:line-break/>Dihaj v 4-stopenjskem ritmu:</text:p>
      <text:list xml:id="list4378633529170508102" text:style-name="WW8Num83">
        <text:list-item>
          <text:p text:style-name="P104">Vdih – vnesi svetlobo</text:p>
        </text:list-item>
        <text:list-item>
          <text:p text:style-name="P104">Zadrževanje – občuti jo v srcu</text:p>
        </text:list-item>
        <text:list-item>
          <text:p text:style-name="P104">Izdih – sprosti senco</text:p>
        </text:list-item>
        <text:list-item>
          <text:p text:style-name="P104">Pavza – bodi prazen</text:p>
        </text:list-item>
      </text:list>
      <text:h text:style-name="P229" text:outline-level="3"><text:bookmark-start text:name="__RefHeading__326_788189478"/>23.3 Mantre svetlobnega diha<text:bookmark-end text:name="__RefHeading__326_788189478"/></text:h>
      <text:list xml:id="list273935053991311052" text:style-name="WW8Num84">
        <text:list-item>
          <text:p text:style-name="P105"><text:span text:style-name="Emphasis">Spiritus in me spirat.</text:span> – Duh diha v meni.</text:p>
        </text:list-item>
        <text:list-item>
          <text:p text:style-name="P105"><text:span text:style-name="Emphasis">Lux in flatu.</text:span> – Svetloba v sape.</text:p>
        </text:list-item>
        <text:list-item>
          <text:p text:style-name="P105"><text:span text:style-name="Emphasis">Dum respiro, memini.</text:span> – Ko diham, se spominjam.</text:p>
        </text:list-item>
      </text:list>
      <text:p text:style-name="P5">Dih ni orodje. Je glas tvoje duše.<text:line-break/>Ko dihaš zavestno – se spomniš, da si živ.</text:p>
      <text:h text:style-name="P223" text:outline-level="2"><text:bookmark-start text:name="__RefHeading__328_788189478"/>Poglavje 24: Delo s Senco – Transmutacija skozi Sprejemanje<text:bookmark-end text:name="__RefHeading__328_788189478"/></text:h>
      <text:p text:style-name="P5">Senca ni sovražnik. Je del tebe, ki ni bil slišan. V Codexu Damiris je senca opisana kot "zviti angel", ki čaka, da ga objameš in osvobodiš.</text:p>
      <text:h text:style-name="P229" text:outline-level="3"><text:bookmark-start text:name="__RefHeading__330_788189478"/>24.1 Kaj je senca?<text:bookmark-end text:name="__RefHeading__330_788189478"/></text:h>
      <text:p text:style-name="P5">Senca je vse, kar:</text:p>
      <text:list xml:id="list9012335626048736412" text:style-name="WW8Num85">
        <text:list-item>
          <text:p text:style-name="P106">si potlačil</text:p>
        </text:list-item>
        <text:list-item>
          <text:p text:style-name="P106">zanikoval</text:p>
        </text:list-item>
        <text:list-item>
          <text:p text:style-name="P106">preziral v sebi ali drugih</text:p>
        </text:list-item>
      </text:list>
      <text:p text:style-name="P5"><text:soft-page-break/>Ni temna zato, ker je zla – ampak ker je ločena.</text:p>
      <text:h text:style-name="P229" text:outline-level="3"><text:bookmark-start text:name="__RefHeading__332_788189478"/>24.2 Kako delamo s senco?<text:bookmark-end text:name="__RefHeading__332_788189478"/></text:h>
      <text:list xml:id="list4501332967575885380" text:style-name="WW8Num86">
        <text:list-item>
          <text:p text:style-name="P107">Ne beži pred njo – povabi jo.</text:p>
        </text:list-item>
        <text:list-item>
          <text:p text:style-name="P107">Ne sodi je – poslušaj jo.</text:p>
        </text:list-item>
        <text:list-item>
          <text:p text:style-name="P107">Ne spreminjaj je – objemi jo.</text:p>
        </text:list-item>
      </text:list>
      <text:p text:style-name="P5"><text:span text:style-name="Strong_20_Emphasis">Vaja:</text:span><text:line-break/>Zapiši misel, ki te najbolj plaši. Potem napiši odgovor nanjo – kot bi govoril svojemu notranjemu otroku.</text:p>
      <text:h text:style-name="P229" text:outline-level="3"><text:bookmark-start text:name="__RefHeading__334_788189478"/>24.3 Alkimija sprejemanja<text:bookmark-end text:name="__RefHeading__334_788189478"/></text:h>
      <text:p text:style-name="P5">Ko senco sprejmeš:</text:p>
      <text:list xml:id="list4014752851123138758" text:style-name="WW8Num87">
        <text:list-item>
          <text:p text:style-name="P108">ne izgine, temveč se preobrazi</text:p>
        </text:list-item>
        <text:list-item>
          <text:p text:style-name="P108">postane moč, empatija, vizija</text:p>
        </text:list-item>
        <text:list-item>
          <text:p text:style-name="P108">vodi te nazaj k celoti</text:p>
        </text:list-item>
      </text:list>
      <text:h text:style-name="P229" text:outline-level="3" text:is-list-header="true"><text:bookmark-start text:name="__RefHeading__336_788189478"/>24.4 Mantre sprejetja<text:bookmark-end text:name="__RefHeading__336_788189478"/></text:h>
      <text:list xml:id="list6793901862168504123" text:style-name="WW8Num88">
        <text:list-item>
          <text:p text:style-name="P109"><text:span text:style-name="Emphasis">Umbra est filia lucis.</text:span> – Senca je hči svetlobe.</text:p>
        </text:list-item>
        <text:list-item>
          <text:p text:style-name="P109"><text:span text:style-name="Emphasis">Non iudico, amplexor.</text:span> – Ne sodim, objemam.</text:p>
        </text:list-item>
        <text:list-item>
          <text:p text:style-name="P109"><text:span text:style-name="Emphasis">Sine lumine, non est totalitas.</text:span> – Brez sence ni celote.</text:p>
        </text:list-item>
      </text:list>
      <text:p text:style-name="P5">Senca je varuh praga. Ko jo pogledaš v oči, postane tvoj zaveznik.</text:p>
      <text:h text:style-name="P216" text:outline-level="1"/>
      <text:h text:style-name="P219" text:outline-level="1">**Codex Damiris – Knjiga Arhetipov in Dušnih Ključev** <text:s/></text:h>
      <text:p text:style-name="P7"><text:s text:c="3"/>- Senčne in svetlobne oblike znotraj nas, kolektivni ključi, notranji glasovi. <text:s/></text:p>
      <text:p text:style-name="P7"><text:s text:c="3"/>- Povezava s Tarotom, šamanskimi plastmi in energijami preteklih življenj.</text:p>
      <text:h text:style-name="P223" text:outline-level="2"><text:bookmark-start text:name="__RefHeading__338_788189478"/>Poglavje 25: Arhetipi Duše – 12 Notranjih Glasov<text:bookmark-end text:name="__RefHeading__338_788189478"/></text:h>
      <text:p text:style-name="P5">Vsaka duša nosi v sebi množico glasov – arhetipov. Ti niso maske – so notranji obrazi, ki te vodijo skozi izkušnje.</text:p>
      <text:h text:style-name="P229" text:outline-level="3"><text:bookmark-start text:name="__RefHeading__340_788189478"/>25.1 Kaj je arhetip?<text:bookmark-end text:name="__RefHeading__340_788189478"/></text:h>
      <text:p text:style-name="P5">Arhetip je izvorna podoba dušne funkcije. Ni fiksna osebnost – temveč pretok zavesti v določeni vlogi.</text:p>
      <text:h text:style-name="P229" text:outline-level="3"><text:bookmark-start text:name="__RefHeading__342_788189478"/>25.2 12 notranjih arhetipov<text:bookmark-end text:name="__RefHeading__342_788189478"/></text:h>
      <text:list xml:id="list4030698692916442574" text:style-name="WW8Num89">
        <text:list-item>
          <text:p text:style-name="P110"><text:span text:style-name="Strong_20_Emphasis">Učitelj</text:span> – tisti, ki skozi izkušnje oblikuje znanje in ga predaja. Njegovo orodje je modrost, njegova senca je togost.</text:p>
        </text:list-item>
        <text:list-item>
          <text:p text:style-name="P110"><text:span text:style-name="Strong_20_Emphasis">Zdravilec</text:span> – nosilec sočutja, ki zdravi skozi prisotnost, dotik ali besedo. Njegova moč je v empatiji, njegova rana je v samopožrtvovalnosti.</text:p>
        </text:list-item>
        <text:list-item>
          <text:p text:style-name="P110"><text:span text:style-name="Strong_20_Emphasis">Popotnik</text:span> – iskalec novih obzorij, učenj, resnic. Nikoli zares doma, a vedno globlje v sebi. Njegov dar je širina, njegova senca je beg.</text:p>
        </text:list-item>
        <text:list-item>
          <text:p text:style-name="P110"><text:span text:style-name="Strong_20_Emphasis">Varuh</text:span> – zaščitnik svetega, čuvaj svetlobnega reda. Trden, zvest, tih. Njegova moč je stanovitnost, njegova senca je rigidnost.</text:p>
        </text:list-item>
        <text:list-item>
          <text:p text:style-name="P110"><text:span text:style-name="Strong_20_Emphasis">Iskalec</text:span> – večni učenec, ki dvomi, sprašuje in prodira. Njegova moč je radovednost, njegova senca je neodločnost.</text:p>
        </text:list-item>
        <text:list-item>
          <text:p text:style-name="P110"><text:span text:style-name="Strong_20_Emphasis">Umetnik</text:span> – kreator svetov znotraj in zunaj. Izraža skozi obliko, zvok, gib. Njegova moč je navdih, njegova senca je kaos.</text:p>
        </text:list-item>
        <text:list-item>
          <text:p text:style-name="P110"><text:span text:style-name="Strong_20_Emphasis">Mistik</text:span> – tihi modrec, ki prebiva v svetovih med svetovi. Vidi brez oči, sliši brez besed. Njegova moč je razodetje, njegova senca je odtujenost.</text:p>
        </text:list-item>
        <text:list-item>
          <text:p text:style-name="P110"><text:span text:style-name="Strong_20_Emphasis">Bojevnik</text:span> – utelešena volja in moč srca. Bori se za resnico, ščiti ranljive. Njegova moč je pogum, njegova senca je jeza.</text:p>
        </text:list-item>
        <text:list-item>
          <text:p text:style-name="P110"><text:span text:style-name="Strong_20_Emphasis">Starodavni</text:span> – modrec prejšnjih življenj, ki nosi kolektivni spomin. Njegova moč je zavedanje časa, njegova senca je brezbrižnost.</text:p>
        </text:list-item>
        <text:list-item>
          <text:p text:style-name="P110"><text:span text:style-name="Strong_20_Emphasis">Prerok</text:span> – nosilec vizije, videnja prihodnosti. Govori, ko je čas. Njegova moč je jasnovidnost, njegova senca je nerazumljenost.</text:p>
        </text:list-item>
        <text:list-item>
          <text:p text:style-name="P110"><text:span text:style-name="Strong_20_Emphasis">Ljubimec</text:span> – utelešena ljubezen, nežnost, predaja. Povezuje s srcem, zdravi z dotikom. Njegova moč je toplina, njegova senca je odvisnost.</text:p>
        </text:list-item>
        <text:list-item>
          <text:p text:style-name="P110"><text:span text:style-name="Strong_20_Emphasis">Otrok</text:span> – čista prisotnost, igrivost, zaupljivost. Spominja nas na svetlobo izvora. Njegova moč je radost, njegova senca je ranljivost.</text:p>
        </text:list-item>
      </text:list>
      <text:h text:style-name="P229" text:outline-level="3"><text:bookmark-start text:name="__RefHeading__344_788189478"/>25.3 Delo z arhetipi<text:bookmark-end text:name="__RefHeading__344_788189478"/></text:h>
      <text:list xml:id="list2772843673710737506" text:style-name="WW8Num90">
        <text:list-item>
          <text:p text:style-name="P111">Prepoznaj, kateri arhetip vodi tvoje trenutno obdobje.</text:p>
        </text:list-item>
        <text:list-item>
          <text:p text:style-name="P111">Zapiši njegove potrebe, darove, rane.</text:p>
        </text:list-item>
        <text:list-item>
          <text:p text:style-name="P111"><text:soft-page-break/>Govori z njim kot z živim bitjem.</text:p>
        </text:list-item>
      </text:list>
      <text:h text:style-name="P229" text:outline-level="3"><text:bookmark-start text:name="__RefHeading__346_788189478"/>25.4 Mantre arhetipov<text:bookmark-end text:name="__RefHeading__346_788189478"/></text:h>
      <text:list xml:id="list5404338652296593459" text:style-name="WW8Num91">
        <text:list-item>
          <text:p text:style-name="P112"><text:span text:style-name="Emphasis">Ars est memoria animae.</text:span> – Arhetip je umetnost spomina duše.</text:p>
        </text:list-item>
        <text:list-item>
          <text:p text:style-name="P112"><text:span text:style-name="Emphasis">Non sum unus, sum chorus.</text:span> – Nisem eden – sem zbor.</text:p>
        </text:list-item>
        <text:list-item>
          <text:p text:style-name="P112"><text:span text:style-name="Emphasis">Vocem internam sequor.</text:span> – Sledim notranjemu glasu.</text:p>
        </text:list-item>
      </text:list>
      <text:p text:style-name="P5">Vsak arhetip te oblikuje. A ti nisi nobeden izmed njih.<text:line-break/>Ti si tista zavest, ki jih z ljubeznijo nosi vse.</text:p>
      <text:h text:style-name="P223" text:outline-level="2"><text:bookmark-start text:name="__RefHeading__348_788189478"/>Poglavje 26: Bratstva Luči – Vodniki, Zvezdni Rodovi<text:bookmark-end text:name="__RefHeading__348_788189478"/></text:h>
      <text:p text:style-name="P5">Bratstva luči niso organizacije – so zavestna polja, ki nosijo kolektivno modrost in skrb za razvoj duš. So skupnosti zavestnih bitij, ki delujejo znotraj duhovne hierarhije svetlobe.</text:p>
      <text:h text:style-name="P229" text:outline-level="3"><text:bookmark-start text:name="__RefHeading__350_788189478"/>26.1 Kaj so bratstva?<text:bookmark-end text:name="__RefHeading__350_788189478"/></text:h>
      <text:p text:style-name="P5">Bratstva niso zunanje entitete – so notranji zbori, ki odzvanjajo tvojo svetlobno noto. Ko vstopiš v stik s katerim od njih, ne sprejemaš avtoritete – temveč se spomniš svoje dušne službe.</text:p>
      <text:h text:style-name="P229" text:outline-level="3"><text:bookmark-start text:name="__RefHeading__352_788189478"/>26.2 Glavna bratstva svetlobe<text:bookmark-end text:name="__RefHeading__352_788189478"/></text:h>
      <text:list xml:id="list2657272614092145543" text:style-name="WW8Num92">
        <text:list-item>
          <text:p text:style-name="P113"><text:span text:style-name="Strong_20_Emphasis">Beli Bratje</text:span> (Modreci, zvesti prenosniki znanja)</text:p>
        </text:list-item>
        <text:list-item>
          <text:p text:style-name="P113"><text:span text:style-name="Strong_20_Emphasis">Zvezdna Bratstva</text:span> (Sirij, Plejade, Arkturij, Andromeda)</text:p>
        </text:list-item>
        <text:list-item>
          <text:p text:style-name="P113"><text:span text:style-name="Strong_20_Emphasis">Zlati Red</text:span> (varuhi kozmične pravde in harmonije)</text:p>
        </text:list-item>
        <text:list-item>
          <text:p text:style-name="P113"><text:span text:style-name="Strong_20_Emphasis">Bratstvo Modrega Žarka</text:span> (intuicija, notranje videnje)</text:p>
        </text:list-item>
      </text:list>
      <text:h text:style-name="P229" text:outline-level="3"><text:bookmark-start text:name="__RefHeading__354_788189478"/>26.3 Delo z bratstvi<text:bookmark-end text:name="__RefHeading__354_788189478"/></text:h>
      <text:list xml:id="list655100047688156530" text:style-name="WW8Num93">
        <text:list-item>
          <text:p text:style-name="P114">V sanjah, v molitvi, v trenutkih tišine</text:p>
        </text:list-item>
        <text:list-item>
          <text:p text:style-name="P114">Z vizijo, zvokom, svetlobno aktivacijo</text:p>
        </text:list-item>
        <text:list-item>
          <text:p text:style-name="P114">S prepoznavo notranjega glasu, ki ni ločen od tvoje višje biti</text:p>
        </text:list-item>
      </text:list>
      <text:h text:style-name="P229" text:outline-level="3"><text:bookmark-start text:name="__RefHeading__356_788189478"/>26.4 Mantre povezave<text:bookmark-end text:name="__RefHeading__356_788189478"/></text:h>
      <text:list xml:id="list556008545157574126" text:style-name="WW8Num94">
        <text:list-item>
          <text:p text:style-name="P115"><text:span text:style-name="Emphasis">Fratres lucis adsum.</text:span> – Bratje svetlobe, tukaj sem.</text:p>
        </text:list-item>
        <text:list-item>
          <text:p text:style-name="P115"><text:span text:style-name="Emphasis">Eadem lux, eadem via.</text:span> – Ista svetloba, ista pot.</text:p>
        </text:list-item>
        <text:list-item>
          <text:p text:style-name="P115"><text:span text:style-name="Emphasis">Redem ad stellas.</text:span> – Vračam se k zvezdam.</text:p>
        </text:list-item>
      </text:list>
      <text:p text:style-name="P5">Bratstva ne potrebuješ – dokler se ne spomniš, da si jim že pripadal.</text:p>
      <text:h text:style-name="P223" text:outline-level="2"/>
      <text:h text:style-name="P224" text:outline-level="2"><text:bookmark-start text:name="__RefHeading__358_788189478"/>Poglavje 27: Starodavne Matrice – Atlantida, Lemurija, Orion<text:bookmark-end text:name="__RefHeading__358_788189478"/></text:h>
      <text:p text:style-name="P5">Za zaveso zgodovine ležijo spomini na civilizacije, ki niso umrle – temveč so se preselile v spomin duše. Te matrice še vedno vplivajo na tvoje izbire, lekcije in darove.</text:p>
      <text:h text:style-name="P229" text:outline-level="3"><text:bookmark-start text:name="__RefHeading__360_788189478"/>27.1 Atlantida – padli mojstri<text:bookmark-end text:name="__RefHeading__360_788189478"/></text:h>
      <text:p text:style-name="P5">Civilizacija znanja, kristalnih mest, miselne moči. Aroganca je preglasila modrost in padli so – da bi se mi spomnili.</text:p>
      <text:p text:style-name="P5"><text:span text:style-name="Strong_20_Emphasis">Darovi:</text:span> kristalno znanje, telepatija, arhitektura svetlobe<text:line-break/><text:span text:style-name="Strong_20_Emphasis">Rane:</text:span> zloraba moči, strah pred svetlobo</text:p>
      <text:h text:style-name="P229" text:outline-level="3"><text:bookmark-start text:name="__RefHeading__362_788189478"/>27.2 Lemurija – srčna enost<text:bookmark-end text:name="__RefHeading__362_788189478"/></text:h>
      <text:p text:style-name="P5">Civilizacija notranje povezanosti, komunikacije z naravo, telepatije z dušo. Povezani z morjem, etrom, kristali.</text:p>
      <text:p text:style-name="P5"><text:span text:style-name="Strong_20_Emphasis">Darovi:</text:span> zdravljenje z zvokom, čutnost, sveta spolnost<text:line-break/><text:span text:style-name="Strong_20_Emphasis">Rane:</text:span> izguba raja, ločenost</text:p>
      <text:h text:style-name="P229" text:outline-level="3"><text:bookmark-start text:name="__RefHeading__364_788189478"/>27.3 Orion – notranji boj svetlobe in teme<text:bookmark-end text:name="__RefHeading__364_788189478"/></text:h>
      <text:p text:style-name="P5">Zgodovina galaktičnega konflikta – polarizacija, a tudi integracija. Tisti, ki nosijo orionsko kodo, so prišli zdravit notranji boj.</text:p>
      <text:p text:style-name="P5"><text:span text:style-name="Strong_20_Emphasis">Darovi:</text:span> notranja moč, odločnost<text:line-break/><text:span text:style-name="Strong_20_Emphasis">Rane:</text:span> globoka senca, nezaupanje</text:p>
      <text:h text:style-name="P220" text:outline-level="2">27.4 Zvezdna in duhovna bitja - PRVA RAZDELITEV</text:h>
      <text:p text:style-name="P17">V vesolju obstaja hierarhija, ki ni oblast – je resonanca. Nižja bitja ne pomenijo manjvrednosti, temveč večjo gostoto. Višja bitja niso bogovi, temveč svetlobni odsevi Zavesti.</text:p>
      <text:h text:style-name="P229" text:outline-level="3">27.5 Sedem ravni Bitij</text:h>
      <text:p text:style-name="P17">Nadangeli – čista svetloba brez ega, kanal božanske volje.<text:line-break/>Vilinje sile – eterične oblike naravne zavesti.<text:line-break/>Zvezdna bitja – popotniki med galaksijami, ki učijo (npr. Plejadčani – modrost srca).<text:line-break/>Mojstri modrosti – tisti, ki so že hodili kot mi.<text:line-break/>Elementarna bitja – duhovi narave, izvorna čista zavest Zemlje.<text:line-break/>Temne entitete – niso zlo, so lekcija. Pokažejo tvoj strah.<text:line-break/>Izvorna zavest – nedeljiva, vsemogoča, brez imena. Tisto, kar si.</text:p>
      <text:p text:style-name="P17">Ne kliči, česar nisi pripravljen nositi. Delo z bitji je sveta vez. In Codex te uči razlikovati med svetlobo in imitacijo.</text:p>
      <text:p text:style-name="P17">»Tisti, ki resnično vidi, ne kliče – ampak postane to, kar išče.«</text:p>
      <text:h text:style-name="P229" text:outline-level="3"/>
      <text:h text:style-name="P230" text:outline-level="3"><text:bookmark-start text:name="__RefHeading__366_788189478"/>27.6 Spominska aktivacija<text:bookmark-end text:name="__RefHeading__366_788189478"/></text:h>
      <text:list xml:id="list8723738871948363843" text:style-name="WW8Num95">
        <text:list-item>
          <text:p text:style-name="P116">Katera kultura te pokliče?</text:p>
        </text:list-item>
        <text:list-item>
          <text:p text:style-name="P116">Katere rane se ponavljajo v tvojem življenju?</text:p>
        </text:list-item>
        <text:list-item>
          <text:p text:style-name="P116">Kateri darovi se zbujajo?</text:p>
        </text:list-item>
      </text:list>
      <text:h text:style-name="P229" text:outline-level="3"><text:bookmark-start text:name="__RefHeading__368_788189478"/>27.7 Mantra spomina<text:bookmark-end text:name="__RefHeading__368_788189478"/></text:h>
      <text:list xml:id="list5228912531888879540" text:style-name="WW8Num96">
        <text:list-item>
          <text:p text:style-name="P117"><text:span text:style-name="Emphasis">Memoria Lemuriae in corde.</text:span> – Spomin Lemurije v srcu.</text:p>
        </text:list-item>
        <text:list-item>
          <text:p text:style-name="P117"><text:span text:style-name="Emphasis">Lux Atlantis redimit.</text:span> – Svetloba Atlantide se vrača.</text:p>
        </text:list-item>
        <text:list-item>
          <text:p text:style-name="P117"><text:span text:style-name="Emphasis">Concordia Orioni.</text:span> – Sprava v Orionu.</text:p>
        </text:list-item>
      </text:list>
      <text:p text:style-name="P5">Spomin ni vrnitev v preteklost. Je osvoboditev sedanjosti.</text:p>
      <text:h text:style-name="P223" text:outline-level="2"><text:bookmark-start text:name="__RefHeading__370_788189478"/>Poglavje 28: Varuhi Praga – Iniciacijski Prehodi<text:bookmark-end text:name="__RefHeading__370_788189478"/></text:h>
      <text:p text:style-name="P5">Med to, kar si in tem, kar lahko postaneš, je prag. Na njem stoji varuh – ne kot kaznovalec, temveč kot zrcalo tvoje pripravljenosti.</text:p>
      <text:h text:style-name="P229" text:outline-level="3"><text:bookmark-start text:name="__RefHeading__372_788189478"/>28.1 Kdo so varuhi?<text:bookmark-end text:name="__RefHeading__372_788189478"/></text:h>
      <text:p text:style-name="P5">Varuhi niso entitete – so tvoji višji aspekti, ki preverjajo:</text:p>
      <text:list xml:id="list7381237422132236451" text:style-name="WW8Num97">
        <text:list-item>
          <text:p text:style-name="P118">ali si pripravljen izpustiti staro</text:p>
        </text:list-item>
        <text:list-item>
          <text:p text:style-name="P118">ali si sposoben zdržati novo svetlobo</text:p>
        </text:list-item>
        <text:list-item>
          <text:p text:style-name="P118">ali si v notranji integriteti</text:p>
        </text:list-item>
      </text:list>
      <text:h text:style-name="P229" text:outline-level="3"><text:bookmark-start text:name="__RefHeading__374_788189478"/>28.2 Pragi<text:bookmark-end text:name="__RefHeading__374_788189478"/></text:h>
      <text:list xml:id="list8217002944547807001" text:style-name="WW8Num98">
        <text:list-item>
          <text:p text:style-name="P119">Prag srca: ali si sposoben ljubiti brez pogoja?</text:p>
        </text:list-item>
        <text:list-item>
          <text:p text:style-name="P119">Prag glasu: ali govoriš svojo resnico?</text:p>
        </text:list-item>
        <text:list-item>
          <text:p text:style-name="P119">Prag telesa: ali si pripravljen utelešati svetlobo?</text:p>
        </text:list-item>
      </text:list>
      <text:h text:style-name="P229" text:outline-level="3"><text:bookmark-start text:name="__RefHeading__376_788189478"/>28.3 Iniciacijska srečanja<text:bookmark-end text:name="__RefHeading__376_788189478"/></text:h>
      <text:p text:style-name="P5">Pridejo v obliki:</text:p>
      <text:list xml:id="list8535065862527905564" text:style-name="WW8Num99">
        <text:list-item>
          <text:p text:style-name="P120">ponavljajočih se izzivov</text:p>
        </text:list-item>
        <text:list-item>
          <text:p text:style-name="P120">sanjskih likov</text:p>
        </text:list-item>
        <text:list-item>
          <text:p text:style-name="P120">močnih občutkov na določenih mestih</text:p>
        </text:list-item>
      </text:list>
      <text:h text:style-name="P229" text:outline-level="3"><text:bookmark-start text:name="__RefHeading__378_788189478"/>28.4 Mantre praga<text:bookmark-end text:name="__RefHeading__378_788189478"/></text:h>
      <text:list xml:id="list3022029891624965743" text:style-name="WW8Num100">
        <text:list-item>
          <text:p text:style-name="P121"><text:span text:style-name="Emphasis">Custos non iudicat.</text:span> – Varuh ne sodi.</text:p>
        </text:list-item>
        <text:list-item>
          <text:p text:style-name="P121"><text:span text:style-name="Emphasis">Per limen transeo.</text:span> – Prestopam prag.</text:p>
        </text:list-item>
        <text:list-item>
          <text:p text:style-name="P121"><text:span text:style-name="Emphasis">Sum dignus lucis.</text:span> – Vreden sem svetlobe.</text:p>
        </text:list-item>
      </text:list>
      <text:p text:style-name="P5">Prag te ne ustavi – razkrije ti, kdo si.</text:p>
      <text:h text:style-name="P223" text:outline-level="2"><text:bookmark-start text:name="__RefHeading__380_788189478"/><text:soft-page-break/>Poglavje 29: Stanja Tišine – Notranji Prostori brez Uma<text:bookmark-end text:name="__RefHeading__380_788189478"/></text:h>
      <text:p text:style-name="P5">Tišina ni odsotnost zvoka. Je prisotnost resnice. V Codexu Damiris je tišina vrata, skozi katera govori Izvor.</text:p>
      <text:h text:style-name="P229" text:outline-level="3"><text:bookmark-start text:name="__RefHeading__382_788189478"/>29.1 Kaj je prava tišina?<text:bookmark-end text:name="__RefHeading__382_788189478"/></text:h>
      <text:p text:style-name="P5">To ni le tišina okolice – ampak tišina notranje potrebe po razlagi. Tam, kjer:</text:p>
      <text:list xml:id="list1208141101898070792" text:style-name="WW8Num101">
        <text:list-item>
          <text:p text:style-name="P122">ni več vprašanj, a je vse jasno</text:p>
        </text:list-item>
        <text:list-item>
          <text:p text:style-name="P122">ni več dvoma, a ni trditve</text:p>
        </text:list-item>
        <text:list-item>
          <text:p text:style-name="P122">ni več iskanja, a je polnost</text:p>
        </text:list-item>
      </text:list>
      <text:h text:style-name="P229" text:outline-level="3"><text:bookmark-start text:name="__RefHeading__384_788189478"/>29.2 Stanja tišine<text:bookmark-end text:name="__RefHeading__384_788189478"/></text:h>
      <text:list xml:id="list1582025694903618296" text:style-name="WW8Num102">
        <text:list-item>
          <text:p text:style-name="P123">Tišina telesa: umirjenost v dihu</text:p>
        </text:list-item>
        <text:list-item>
          <text:p text:style-name="P123">Tišina uma: ni misli, a popolna zavest</text:p>
        </text:list-item>
        <text:list-item>
          <text:p text:style-name="P123">Tišina srca: ljubezen brez objekta</text:p>
        </text:list-item>
      </text:list>
      <text:h text:style-name="P229" text:outline-level="3"><text:bookmark-start text:name="__RefHeading__386_788189478"/>29.3 Vstop v tišino<text:bookmark-end text:name="__RefHeading__386_788189478"/></text:h>
      <text:list xml:id="list8617988631755157585" text:style-name="WW8Num103">
        <text:list-item>
          <text:p text:style-name="P124">sedeča prisotnost</text:p>
        </text:list-item>
        <text:list-item>
          <text:p text:style-name="P124">počasni gibi</text:p>
        </text:list-item>
        <text:list-item>
          <text:p text:style-name="P124">zvok, ki preide v nič</text:p>
        </text:list-item>
      </text:list>
      <text:h text:style-name="P229" text:outline-level="3"><text:bookmark-start text:name="__RefHeading__388_788189478"/>29.4 Mantre tišine<text:bookmark-end text:name="__RefHeading__388_788189478"/></text:h>
      <text:list xml:id="list1180856962525272335" text:style-name="WW8Num104">
        <text:list-item>
          <text:p text:style-name="P125"><text:span text:style-name="Emphasis">Silentium est templum.</text:span> – Tišina je tempelj.</text:p>
        </text:list-item>
        <text:list-item>
          <text:p text:style-name="P125"><text:span text:style-name="Emphasis">Inter verba, lux.</text:span> – Med besedami, svetloba.</text:p>
        </text:list-item>
        <text:list-item>
          <text:p text:style-name="P125"><text:span text:style-name="Emphasis">In taciturnitate, Deus.</text:span> – V tišini, Bog.</text:p>
        </text:list-item>
      </text:list>
      <text:p text:style-name="P5">Tišina ne pride, ko je vse rešeno – pride, ko si pripravljen poslušati.</text:p>
      <text:h text:style-name="P223" text:outline-level="2"/>
      <text:h text:style-name="P224" text:outline-level="2"><text:bookmark-start text:name="__RefHeading__390_788189478"/>Poglavje 30: Zavest Roke – Dotik, Kreacija, Zdravljenje<text:bookmark-end text:name="__RefHeading__390_788189478"/></text:h>
      <text:p text:style-name="P5">Roka ni samo ud telesa. Je orodje duše. Z roko ustvarjaš, zdraviš, usmerjaš energijo. V Codexu Damiris ima roka svoj jezik, svojo voljo, svojo zavest.</text:p>
      <text:h text:style-name="P229" text:outline-level="3"><text:bookmark-start text:name="__RefHeading__392_788189478"/>30.1 Roka kot most<text:bookmark-end text:name="__RefHeading__392_788189478"/></text:h>
      <text:p text:style-name="P5">Roka povezuje:</text:p>
      <text:list xml:id="list5907763935748325388" text:style-name="WW8Num105">
        <text:list-item>
          <text:p text:style-name="P126">notranje z zunanjim</text:p>
        </text:list-item>
        <text:list-item>
          <text:p text:style-name="P126">misel z dejanjem</text:p>
        </text:list-item>
        <text:list-item>
          <text:p text:style-name="P126">srce z materijo</text:p>
        </text:list-item>
      </text:list>
      <text:h text:style-name="P229" text:outline-level="3"><text:bookmark-start text:name="__RefHeading__394_788189478"/>30.2 Sveti dotik<text:bookmark-end text:name="__RefHeading__394_788189478"/></text:h>
      <text:p text:style-name="P5">Ko se zaveš, da je tvoj dotik posvečen:</text:p>
      <text:list xml:id="list6558880604017920159" text:style-name="WW8Num106">
        <text:list-item>
          <text:p text:style-name="P127">vsaka kretnja postane molitev</text:p>
        </text:list-item>
        <text:list-item>
          <text:p text:style-name="P127">vsaka nega postane aktivacija</text:p>
        </text:list-item>
        <text:list-item>
          <text:p text:style-name="P127">vsaka stvaritev nosi duhovni podpis</text:p>
        </text:list-item>
      </text:list>
      <text:h text:style-name="P229" text:outline-level="3"><text:bookmark-start text:name="__RefHeading__396_788189478"/>30.3 Kreacija z roko<text:bookmark-end text:name="__RefHeading__396_788189478"/></text:h>
      <text:list xml:id="list1477130214022798138" text:style-name="WW8Num107">
        <text:list-item>
          <text:p text:style-name="P128">risanje, pisanje, slikanje</text:p>
        </text:list-item>
        <text:list-item>
          <text:p text:style-name="P128">polaganje rok</text:p>
        </text:list-item>
        <text:list-item>
          <text:p text:style-name="P128">blagoslavljanje hrane, vode, telesa</text:p>
        </text:list-item>
      </text:list>
      <text:p text:style-name="P5"><text:span text:style-name="Strong_20_Emphasis">Vaja:</text:span><text:line-break/>Položi desno roko na srce, levo na solzni kanal.<text:line-break/>Vdihni in začuti – tvoja roka ni podaljšek – je duhovno orodje.</text:p>
      <text:h text:style-name="P229" text:outline-level="3"><text:bookmark-start text:name="__RefHeading__398_788189478"/>30.4 Mantre roke<text:bookmark-end text:name="__RefHeading__398_788189478"/></text:h>
      <text:list xml:id="list6465250646593047768" text:style-name="WW8Num108">
        <text:list-item>
          <text:p text:style-name="P129"><text:span text:style-name="Emphasis">Manus lucis.</text:span> – Roka svetlobe.</text:p>
        </text:list-item>
        <text:list-item>
          <text:p text:style-name="P129"><text:span text:style-name="Emphasis">Tangere est creare.</text:span> – Dotakniti se pomeni ustvariti.</text:p>
        </text:list-item>
        <text:list-item>
          <text:p text:style-name="P129"><text:span text:style-name="Emphasis">Per digitos, lux fluit.</text:span> – Skozi prste teče svetloba.</text:p>
        </text:list-item>
      </text:list>
      <text:p text:style-name="P5">Roke ne pozabljajo. Kar ustvarijo iz srca – ostane zapisano v svetlobi.</text:p>
      <text:h text:style-name="P224" text:outline-level="2">Poglavje 31: Zavest Oči – Pogled kot Svetlobni Portal</text:h>
      <text:p text:style-name="P5">Oko ni le zrcalo duše – je tudi projektor zavesti. V Codexu Damiris oko deluje kot svetlobni portal, skozi katerega lahko vidiš resničnost na treh ravneh: fizični, energetski in dušni.</text:p>
      <text:h text:style-name="P229" text:outline-level="3">31.1 Tri ravni pogleda</text:h>
      <text:list xml:id="list7400430274294153443" text:style-name="WW8Num109">
        <text:list-item>
          <text:p text:style-name="P130"><text:span text:style-name="Strong_20_Emphasis">Fizično oko</text:span> – vidi svet oblike, svetlobe, sence.</text:p>
        </text:list-item>
        <text:list-item>
          <text:p text:style-name="P130"><text:span text:style-name="Strong_20_Emphasis">Notranje oko</text:span> (tretje oko) – vidi vzorce, povezave, energije.</text:p>
        </text:list-item>
        <text:list-item>
          <text:p text:style-name="P130"><text:span text:style-name="Strong_20_Emphasis">Oko srca</text:span> – vidi resnico, brez sodbe, brez filtra.</text:p>
        </text:list-item>
      </text:list>
      <text:h text:style-name="P229" text:outline-level="3">31.2 Oči kot prevajalec resnice</text:h>
      <text:p text:style-name="P5">Oči ne le gledajo – <text:span text:style-name="Strong_20_Emphasis">ustvarjajo</text:span> tisto, kar prepoznajo. Kar pogledaš z ljubeznijo, se razcveti. Kar pogledaš s strahom, se skrči.</text:p>
      <text:p text:style-name="P5"><text:span text:style-name="Strong_20_Emphasis">Vaja:</text:span> Gledanje v zrcalo brez sodbe. Pogled v oči drugega brez potrebe po razlagi.</text:p>
      <text:h text:style-name="P229" text:outline-level="3">31.3 Mantre oči</text:h>
      <text:list xml:id="list8514466119813086604" text:style-name="WW8Num110">
        <text:list-item>
          <text:p text:style-name="P131"><text:span text:style-name="Emphasis">Oculus meum videt lucem.</text:span> – Moje oko vidi svetlobo.</text:p>
        </text:list-item>
        <text:list-item>
          <text:p text:style-name="P131"><text:span text:style-name="Emphasis">Per visum, veritas.</text:span> – Skozi pogled, resnica.</text:p>
        </text:list-item>
        <text:list-item>
          <text:p text:style-name="P131"><text:span text:style-name="Emphasis">Nihil latebit coram oculis.</text:span> – Nič ne ostane skrito pred svetim očesom.</text:p>
        </text:list-item>
      </text:list>
      <text:h text:style-name="P223" text:outline-level="2"/>
      <text:h text:style-name="P224" text:outline-level="2">Poglavje 32: Zavest Glasu – Zvok kot Sveti Prenašalec</text:h>
      <text:p text:style-name="P5">Tvoj glas ni le zvok. Je frekvenca tvoje prisotnosti. V Codexu Damiris je glas most med notranjim in zunanjim svetom – kanal duše, ki ustvarja ali ruši.</text:p>
      <text:h text:style-name="P229" text:outline-level="3">32.1 Narava svetega glasu</text:h>
      <text:list xml:id="list6625355982424138094" text:style-name="WW8Num111">
        <text:list-item>
          <text:p text:style-name="P132">Nosilec vibracije tvoje duše</text:p>
        </text:list-item>
        <text:list-item>
          <text:p text:style-name="P132">Aktivator ali deaktivator zavesti</text:p>
        </text:list-item>
        <text:list-item>
          <text:p text:style-name="P132">Orodje utelešanja namere</text:p>
        </text:list-item>
      </text:list>
      <text:h text:style-name="P229" text:outline-level="3">32.2 Glas kot koda</text:h>
      <text:p text:style-name="P5">Vsaka izgovorjena beseda spremeni tvoje polje. Besede niso zvok – so <text:span text:style-name="Strong_20_Emphasis">odtis zavesti v prostoru</text:span>.</text:p>
      <text:p text:style-name="P5"><text:span text:style-name="Strong_20_Emphasis">Vaja:</text:span> Izgovori: <text:span text:style-name="Emphasis">Jaz sem tukaj.</text:span> Večkrat. Zaznaj razliko v telesu.</text:p>
      <text:h text:style-name="P229" text:outline-level="3">32.3 Zdravilna uporaba glasu</text:h>
      <text:list xml:id="list3449900740220533011" text:style-name="WW8Num112">
        <text:list-item>
          <text:p text:style-name="P133">Toning (glasovni zven brez besed)</text:p>
        </text:list-item>
        <text:list-item>
          <text:p text:style-name="P133">Petje svetih besed (mantre, svetlobni jezik)</text:p>
        </text:list-item>
        <text:list-item>
          <text:p text:style-name="P133">Šepetanje v polje (zaupanje vibraciji)</text:p>
        </text:list-item>
      </text:list>
      <text:h text:style-name="P229" text:outline-level="3">32.4 Mantre glasu</text:h>
      <text:list xml:id="list3449135135668798118" text:style-name="WW8Num113">
        <text:list-item>
          <text:p text:style-name="P134"><text:span text:style-name="Emphasis">Vox animae loquitur.</text:span> – Glas duše govori.</text:p>
        </text:list-item>
        <text:list-item>
          <text:p text:style-name="P134"><text:span text:style-name="Emphasis">In sono, medicina.</text:span> – V zvoku je zdravilo.</text:p>
        </text:list-item>
        <text:list-item>
          <text:p text:style-name="P134"><text:span text:style-name="Emphasis">Ex ore, veritas.</text:span> – Iz ust, resnica.</text:p>
        </text:list-item>
      </text:list>
      <text:p text:style-name="P5">Ko izgovoriš resnico iz srca, vibrira celoten svet.</text:p>
      <text:h text:style-name="P223" text:outline-level="2">P</text:h>
      <text:h text:style-name="P224" text:outline-level="2">oglavje 33: Kronika Duše – Svetlobna Zgodovina Bitja</text:h>
      <text:p text:style-name="P5">Vsaka duša nosi svojo knjigo – kroniko. Ne gre za zgodovino dogodkov, ampak za svetlobni zapis vseh izkušenj, odločitev, učenja.</text:p>
      <text:h text:style-name="P229" text:outline-level="3">33.1 Kaj je kronika?</text:h>
      <text:p text:style-name="P5">Je energetski zapis tvoje poti skozi čas, prostor in dušne ravni. Tvoja osebna Akasha.</text:p>
      <text:h text:style-name="P229" text:outline-level="3">33.2 Kaj vsebuje?</text:h>
      <text:list xml:id="list4455196724192322210" text:style-name="WW8Num114">
        <text:list-item>
          <text:p text:style-name="P135">Ključne izkušnje učenja</text:p>
        </text:list-item>
        <text:list-item>
          <text:p text:style-name="P135">Pogodbe duše</text:p>
        </text:list-item>
        <text:list-item>
          <text:p text:style-name="P135">Utelešene darove</text:p>
        </text:list-item>
        <text:list-item>
          <text:p text:style-name="P135">Spomine iz drugih življenj</text:p>
        </text:list-item>
      </text:list>
      <text:h text:style-name="P229" text:outline-level="3">33.3 Dostop do kronike</text:h>
      <text:list xml:id="list6096204268234459492" text:style-name="WW8Num115">
        <text:list-item>
          <text:p text:style-name="P136">Preko stanja globoke tišine</text:p>
        </text:list-item>
        <text:list-item>
          <text:p text:style-name="P136">Skozi sanje, vizije, svetlobni jezik</text:p>
        </text:list-item>
        <text:list-item>
          <text:p text:style-name="P136">Z vprašanjem: <text:span text:style-name="Emphasis">Katero resnico sem nekoč nosil, pa sem jo pozabil?</text:span></text:p>
        </text:list-item>
      </text:list>
      <text:h text:style-name="P229" text:outline-level="3">33.4 Mantre kronike</text:h>
      <text:list xml:id="list6953846485543212579" text:style-name="WW8Num116">
        <text:list-item>
          <text:p text:style-name="P137"><text:span text:style-name="Emphasis">Scriptum animae apertum est.</text:span> – Zapis duše je odprt.</text:p>
        </text:list-item>
        <text:list-item>
          <text:p text:style-name="P137"><text:span text:style-name="Emphasis">Per memoriam, ego redivivus.</text:span> – Po spominu, znova živim.</text:p>
        </text:list-item>
        <text:list-item>
          <text:p text:style-name="P137"><text:span text:style-name="Emphasis">Lex animae scripta est in luce.</text:span> – Zakon duše je zapisan v svetlobi.</text:p>
        </text:list-item>
      </text:list>
      <text:p text:style-name="P5">Ne potrebuješ brati preteklosti – samo odpreti srce, kjer je že zapisana.</text:p>
      <text:h text:style-name="P223" text:outline-level="2"/>
      <text:h text:style-name="P224" text:outline-level="2">Poglavje 34: Energijski Zavetniki – Dušne Zveri in Zavezniki</text:h>
      <text:p text:style-name="P5">Duša nikoli ni sama. Z njo potujejo zavetniki – živali moči, zavezniki svetlobe, duhovni spremljevalci, ki nosijo arhetipe tvoje notranje narave.</text:p>
      <text:h text:style-name="P229" text:outline-level="3">34.1 Kaj so zavetniki?</text:h>
      <text:list xml:id="list6765316861851291969" text:style-name="WW8Num117">
        <text:list-item>
          <text:p text:style-name="P138">Dušne zveri (živalski arhetipi tvoje moči)</text:p>
        </text:list-item>
        <text:list-item>
          <text:p text:style-name="P138">Elementalni vodniki (veter, ogenj, voda…)</text:p>
        </text:list-item>
        <text:list-item>
          <text:p text:style-name="P138">Eterični spremljevalci (bitja, ki varujejo tvojo pot)</text:p>
        </text:list-item>
      </text:list>
      <text:h text:style-name="P229" text:outline-level="3">34.2 Prepoznava zavetnikov</text:h>
      <text:list xml:id="list6739243874956113922" text:style-name="WW8Num118">
        <text:list-item>
          <text:p text:style-name="P139">Spontane sanje z živalmi</text:p>
        </text:list-item>
        <text:list-item>
          <text:p text:style-name="P139">Privlačnost ali strah do določenih bitij</text:p>
        </text:list-item>
        <text:list-item>
          <text:p text:style-name="P139">Vizije med meditacijo ali v naravi</text:p>
        </text:list-item>
      </text:list>
      <text:h text:style-name="P229" text:outline-level="3">34.3 Delo z zavetniki</text:h>
      <text:list xml:id="list2246224777194360281" text:style-name="WW8Num119">
        <text:list-item>
          <text:p text:style-name="P140">Vzpostavi stik (vizualno, zvočno, zapisovalno)</text:p>
        </text:list-item>
        <text:list-item>
          <text:p text:style-name="P140">Postavi vprašanje (Kaj prinašaš? Česa me učiš?)</text:p>
        </text:list-item>
        <text:list-item>
          <text:p text:style-name="P140">Zahvali se (ponudba, risba, gib, pesem)</text:p>
        </text:list-item>
      </text:list>
      <text:h text:style-name="P229" text:outline-level="3">34.4 Mantre zavetništva</text:h>
      <text:list xml:id="list1466771284411284680" text:style-name="WW8Num120">
        <text:list-item>
          <text:p text:style-name="P141"><text:span text:style-name="Emphasis">Animal meum mihi loquitur.</text:span> – Moja zver govori z menoj.</text:p>
        </text:list-item>
        <text:list-item>
          <text:p text:style-name="P141"><text:span text:style-name="Emphasis">Socius animae sum.</text:span> – Sem zaveznik duše.</text:p>
        </text:list-item>
        <text:list-item>
          <text:p text:style-name="P141"><text:span text:style-name="Emphasis">In silentio, protector viget.</text:span> – V tišini, varuh bedi.</text:p>
        </text:list-item>
      </text:list>
      <text:p text:style-name="P5">Tvoj zavetnik ni moč, ki jo moraš imeti – ampak spomin, ki ga moraš prebuditi.</text:p>
      <text:h text:style-name="P223" text:outline-level="2"/>
      <text:h text:style-name="P224" text:outline-level="2">Poglavje 35: Templji Mesečine – Nočne Vizije in Lune Kode</text:h>
      <text:p text:style-name="P5">Ko sonce zaspi, se odpre svet lunarne zavesti. V Codexu Damiris noč ni odsotnost svetlobe – je druga kvaliteta luči: introspektivna, skrivnostna, vizionarska.</text:p>
      <text:h text:style-name="P229" text:outline-level="3">35.1 Templji mesečine</text:h>
      <text:p text:style-name="P5">To so notranji prostori, ki se odprejo ponoči:</text:p>
      <text:list xml:id="list3888649530921607341" text:style-name="WW8Num121">
        <text:list-item>
          <text:p text:style-name="P142">v sanjah</text:p>
        </text:list-item>
        <text:list-item>
          <text:p text:style-name="P142">med meditacijo</text:p>
        </text:list-item>
        <text:list-item>
          <text:p text:style-name="P142">v stanju pred spanjem ali prebujanjem</text:p>
        </text:list-item>
      </text:list>
      <text:h text:style-name="P229" text:outline-level="3">35.2 Lunarna vrata</text:h>
      <text:list xml:id="list587897316221242266" text:style-name="WW8Num122">
        <text:list-item>
          <text:p text:style-name="P143"><text:span text:style-name="Strong_20_Emphasis">Mlaj</text:span>: praznina, začetek cikla, seme</text:p>
        </text:list-item>
        <text:list-item>
          <text:p text:style-name="P143"><text:span text:style-name="Strong_20_Emphasis">Prva četrt</text:span>: rast, vizija, usmeritev</text:p>
        </text:list-item>
        <text:list-item>
          <text:p text:style-name="P143"><text:span text:style-name="Strong_20_Emphasis">Polna luna</text:span>: razkritje, razširitev</text:p>
        </text:list-item>
        <text:list-item>
          <text:p text:style-name="P143"><text:span text:style-name="Strong_20_Emphasis">Zadnja četrt</text:span>: spuščanje, zaključek</text:p>
        </text:list-item>
      </text:list>
      <text:h text:style-name="P229" text:outline-level="3">35.3 Praksa mesečine</text:h>
      <text:list xml:id="list6963928528826477251" text:style-name="WW8Num123">
        <text:list-item>
          <text:p text:style-name="P144">Zapisovanje sanj (vsako jutro)</text:p>
        </text:list-item>
        <text:list-item>
          <text:p text:style-name="P144">Hvaležnost pred spanjem (vodi v svetlobni tempelj)</text:p>
        </text:list-item>
        <text:list-item>
          <text:p text:style-name="P144">Povezava z luninim ciklom (ritual, dihanje, molitev)</text:p>
        </text:list-item>
      </text:list>
      <text:h text:style-name="P229" text:outline-level="3">35.4 Mantre lunarne zavesti</text:h>
      <text:list xml:id="list3085605528451899192" text:style-name="WW8Num124">
        <text:list-item>
          <text:p text:style-name="P145"><text:span text:style-name="Emphasis">Nocte, lux aliter loquitur.</text:span> – Ponoči, svetloba govori drugače.</text:p>
        </text:list-item>
        <text:list-item>
          <text:p text:style-name="P145"><text:span text:style-name="Emphasis">Luna me ducit.</text:span> – Luna me vodi.</text:p>
        </text:list-item>
        <text:list-item>
          <text:p text:style-name="P145"><text:span text:style-name="Emphasis">In somniis, veritas silet.</text:span> – V sanjah, resnica tiho zasveti.</text:p>
        </text:list-item>
      </text:list>
      <text:p text:style-name="P5">Templji mesečine niso iluzija – so šola vizije.<text:line-break/>Le miren um si drzne stopiti vanje.</text:p>
      <text:h text:style-name="P223" text:outline-level="2"/>
      <text:h text:style-name="P224" text:outline-level="2">Poglavje 36: Meddimenzionalni Prehodi – Potovanje med Svetovi</text:h>
      <text:p text:style-name="P5">Vse realnosti obstajajo hkrati – razporejene kot plasti svetlobe. V Codexu Damiris so meddimenzionalni prehodi točke preboja, kjer tvoja zavest lahko zdrsne v drugo frekvenco.</text:p>
      <text:h text:style-name="P229" text:outline-level="3">36.1 Kaj so meddimenzionalni prehodi?</text:h>
      <text:p text:style-name="P5">To so energetski portali med:</text:p>
      <text:list xml:id="list7420486647826147762" text:style-name="WW8Num125">
        <text:list-item>
          <text:p text:style-name="P146">dimenzijami (čas, prostor, zavest)</text:p>
        </text:list-item>
        <text:list-item>
          <text:p text:style-name="P146">realnostmi (linearna, sanjska, simbolna)</text:p>
        </text:list-item>
        <text:list-item>
          <text:p text:style-name="P146">stanji zavesti (telo, duša, monada)</text:p>
        </text:list-item>
      </text:list>
      <text:h text:style-name="P229" text:outline-level="3">36.2 Vrste prehodov</text:h>
      <text:list xml:id="list5076823765067431969" text:style-name="WW8Num126">
        <text:list-item>
          <text:p text:style-name="P147"><text:span text:style-name="Strong_20_Emphasis">Sanje</text:span> – ne le simbolične, temveč vrata</text:p>
        </text:list-item>
        <text:list-item>
          <text:p text:style-name="P147"><text:span text:style-name="Strong_20_Emphasis">Zvok</text:span> – določene frekvence odpirajo višje sfere</text:p>
        </text:list-item>
        <text:list-item>
          <text:p text:style-name="P147"><text:span text:style-name="Strong_20_Emphasis">Meditacija</text:span> – globoka kontemplacija odpira prostor</text:p>
        </text:list-item>
        <text:list-item>
          <text:p text:style-name="P147"><text:span text:style-name="Strong_20_Emphasis">Vibracijska mesta</text:span> – kraji z močnimi energetskimi žarišči</text:p>
        </text:list-item>
      </text:list>
      <text:h text:style-name="P229" text:outline-level="3">36.3 Prehodi v praksi</text:h>
      <text:list xml:id="list2736759016932293609" text:style-name="WW8Num127">
        <text:list-item>
          <text:p text:style-name="P148">Odpiranje z dihom in svetlobnim jezikom</text:p>
        </text:list-item>
        <text:list-item>
          <text:p text:style-name="P148">Potovanje znotraj (ne izven!) – preko notranjega templja</text:p>
        </text:list-item>
        <text:list-item>
          <text:p text:style-name="P148">Zaznavanje s čutili tišine, ne oči</text:p>
        </text:list-item>
      </text:list>
      <text:h text:style-name="P229" text:outline-level="3">36.4 Mantre prehoda</text:h>
      <text:list xml:id="list5494599421723812203" text:style-name="WW8Num128">
        <text:list-item>
          <text:p text:style-name="P149"><text:span text:style-name="Emphasis">Portae sunt intus.</text:span> – Vrata so znotraj.</text:p>
        </text:list-item>
        <text:list-item>
          <text:p text:style-name="P149"><text:span text:style-name="Emphasis">Per vibrationem transgredior.</text:span> – Skozi vibracijo prehajam.</text:p>
        </text:list-item>
        <text:list-item>
          <text:p text:style-name="P149"><text:span text:style-name="Emphasis">Multae sunt viae, una lux.</text:span> – Mnogo poti, ena svetloba.</text:p>
        </text:list-item>
      </text:list>
      <text:p text:style-name="P5">Dimenzije niso oddaljeni svetovi. So frekvence, ki jih že nosiš.</text:p>
      <text:h text:style-name="P224" text:outline-level="2">Poglavje 37: Notranja Smrt in Ponovno Rojstvo</text:h>
      <text:p text:style-name="P5">Vsaka prava preobrazba gre skozi smrt. Ne fizično, ampak vibracijsko. Smrt ega, pričakovanj, identitete. V Codexu Damiris je notranja smrt posvečen proces razkroja – in ponovno rojstvo novo sidranje svetlobe.</text:p>
      <text:h text:style-name="P229" text:outline-level="3">37.1 Smrt kot sprostitev</text:h>
      <text:p text:style-name="P5">Smrt ni konec. Je popolno spuščanje:</text:p>
      <text:list xml:id="list5490184501200046472" text:style-name="WW8Num129">
        <text:list-item>
          <text:p text:style-name="P150">idej o sebi</text:p>
        </text:list-item>
        <text:list-item>
          <text:p text:style-name="P150">oklepov identitete</text:p>
        </text:list-item>
        <text:list-item>
          <text:p text:style-name="P150">znotraj-programov nadzora</text:p>
        </text:list-item>
      </text:list>
      <text:h text:style-name="P229" text:outline-level="3">37.2 Faze notranje smrti</text:h>
      <text:list xml:id="list6754538441439837131" text:style-name="WW8Num130">
        <text:list-item>
          <text:p text:style-name="P151">Razpustitev: stara oblika razpade</text:p>
        </text:list-item>
        <text:list-item>
          <text:p text:style-name="P151">Tišina: nič ni, vse molči</text:p>
        </text:list-item>
        <text:list-item>
          <text:p text:style-name="P151">Zaznavanje: nova prisotnost</text:p>
        </text:list-item>
        <text:list-item>
          <text:p text:style-name="P151">Povratek: sidranje v nov jaz</text:p>
        </text:list-item>
      </text:list>
      <text:h text:style-name="P229" text:outline-level="3">37.3 Ponovno rojstvo</text:h>
      <text:p text:style-name="P5">Ne pride s trudom. Pride z dovoljenjem.</text:p>
      <text:list xml:id="list6167721124357034927" text:style-name="WW8Num131">
        <text:list-item>
          <text:p text:style-name="P152">ko izbereš resnico, ne varnost</text:p>
        </text:list-item>
        <text:list-item>
          <text:p text:style-name="P152">ko izbereš pretočnost, ne nadzor</text:p>
        </text:list-item>
        <text:list-item>
          <text:p text:style-name="P152">ko izbereš zlitje, ne ločenost</text:p>
        </text:list-item>
      </text:list>
      <text:h text:style-name="P229" text:outline-level="3">37.4 Mantre preobrazbe</text:h>
      <text:list xml:id="list4153849317235335454" text:style-name="WW8Num132">
        <text:list-item>
          <text:p text:style-name="P153"><text:span text:style-name="Emphasis">Moriens, renascor.</text:span> – Umiram, da se znova rodim.</text:p>
        </text:list-item>
        <text:list-item>
          <text:p text:style-name="P153"><text:span text:style-name="Emphasis">Spatium mortis est sacrum.</text:span> – Prostor smrti je svet.</text:p>
        </text:list-item>
        <text:list-item>
          <text:p text:style-name="P153"><text:span text:style-name="Emphasis">Fiat nova forma.</text:span> – Naj nastane nova oblika.</text:p>
        </text:list-item>
      </text:list>
      <text:p text:style-name="P5">Notranja smrt ni padec – je vrnitev k svetlobi brez laži.</text:p>
      <text:h text:style-name="P223" text:outline-level="2"/>
      <text:h text:style-name="P224" text:outline-level="2">Poglavje 38: Matrika Vodenja – Duhovno Voditeljstvo</text:h>
      <text:p text:style-name="P5">Vodenje v Codexu Damiris ni pozicija. Je frekvenca, ki sidra svetlobo. Pravi voditelj ne vodi ljudi – vodi polje.</text:p>
      <text:h text:style-name="P229" text:outline-level="3">38.1 Kaj pomeni voditi?</text:h>
      <text:list xml:id="list4111538487345823274" text:style-name="WW8Num133">
        <text:list-item>
          <text:p text:style-name="P154">biti polje stabilnosti v kaosu</text:p>
        </text:list-item>
        <text:list-item>
          <text:p text:style-name="P154">hoditi znotraj svetlobe, ne izven nje</text:p>
        </text:list-item>
        <text:list-item>
          <text:p text:style-name="P154">držati prostor za resnico, ne za voljo</text:p>
        </text:list-item>
      </text:list>
      <text:h text:style-name="P229" text:outline-level="3">38.2 Matrika vodenja</text:h>
      <text:list xml:id="list5745478820556923589" text:style-name="WW8Num134">
        <text:list-item>
          <text:p text:style-name="P155"><text:span text:style-name="Strong_20_Emphasis">Tišina</text:span> – voditelj posluša več, kot govori</text:p>
        </text:list-item>
        <text:list-item>
          <text:p text:style-name="P155"><text:span text:style-name="Strong_20_Emphasis">Prisotnost</text:span> – ničesar ne vsiljuje</text:p>
        </text:list-item>
        <text:list-item>
          <text:p text:style-name="P155"><text:span text:style-name="Strong_20_Emphasis">Resnica</text:span> – pove brez napada</text:p>
        </text:list-item>
        <text:list-item>
          <text:p text:style-name="P155"><text:span text:style-name="Strong_20_Emphasis">Zlitje</text:span> – ne nadvlada, ampak poveže</text:p>
        </text:list-item>
      </text:list>
      <text:h text:style-name="P229" text:outline-level="3">38.3 Duhovno voditeljstvo</text:h>
      <text:p text:style-name="P5">Ni karizma – je čistost namere.<text:line-break/>Ni popularnost – je notranji prestol.<text:line-break/>Ni izvoljenost – je zrelost.</text:p>
      <text:h text:style-name="P229" text:outline-level="3">38.4 Mantre vodstva</text:h>
      <text:list xml:id="list3657683460954813924" text:style-name="WW8Num135">
        <text:list-item>
          <text:p text:style-name="P156"><text:span text:style-name="Emphasis">Ducens in lumine.</text:span> – Vodim v svetlobi.</text:p>
        </text:list-item>
        <text:list-item>
          <text:p text:style-name="P156"><text:span text:style-name="Emphasis">Minister animae, non dominus.</text:span> – Služabnik duše, ne gospodar.</text:p>
        </text:list-item>
        <text:list-item>
          <text:p text:style-name="P156"><text:span text:style-name="Emphasis">Via est in me.</text:span> – Pot je v meni.</text:p>
        </text:list-item>
      </text:list>
      <text:p text:style-name="P5">Voditelj, ki ne pozna teme, ne zna držati svetlobe za druge.</text:p>
      <text:h text:style-name="P223" text:outline-level="2"/>
      <text:h text:style-name="P224" text:outline-level="2">Poglavje 39: Srčna Ekonomija – Obilje kot Zavest</text:h>
      <text:p text:style-name="P5">Obilje ni materialno. Je pretočnost srca. V Codexu Damiris srčna ekonomija pomeni, da deluješ, daješ, ustvarjaš in sprejemaš iz polja povezanosti – ne pomanjkanja.</text:p>
      <text:h text:style-name="P229" text:outline-level="3">39.1 Kaj je srčna ekonomija?</text:h>
      <text:p text:style-name="P5">To je sistem:</text:p>
      <text:list xml:id="list4536645351228091897" text:style-name="WW8Num136">
        <text:list-item>
          <text:p text:style-name="P157">kjer vrednost ne določa količina, ampak prisotnost</text:p>
        </text:list-item>
        <text:list-item>
          <text:p text:style-name="P157">kjer tok ne temelji na strahu, temveč zaupanju</text:p>
        </text:list-item>
        <text:list-item>
          <text:p text:style-name="P157">kjer izmenjava ni trgovina, ampak sveto kroženje</text:p>
        </text:list-item>
      </text:list>
      <text:h text:style-name="P229" text:outline-level="3">39.2 Praksa obilja</text:h>
      <text:list xml:id="list7547778373191362770" text:style-name="WW8Num137">
        <text:list-item>
          <text:p text:style-name="P158">Dajaj brez izgube</text:p>
        </text:list-item>
        <text:list-item>
          <text:p text:style-name="P158">Sprejmi brez krivde</text:p>
        </text:list-item>
        <text:list-item>
          <text:p text:style-name="P158">Zaupaj brez garancije</text:p>
        </text:list-item>
      </text:list>
      <text:h text:style-name="P229" text:outline-level="3">39.3 Zdravljenje odnosa z denarjem</text:h>
      <text:list xml:id="list6606161410998406433" text:style-name="WW8Num138">
        <text:list-item>
          <text:p text:style-name="P159">Denar ni problem – zavest je</text:p>
        </text:list-item>
        <text:list-item>
          <text:p text:style-name="P159">Ni tvoj gospodar – je sredstvo</text:p>
        </text:list-item>
        <text:list-item>
          <text:p text:style-name="P159">Vsak evro nosi vibracijo tvoje zavesti</text:p>
        </text:list-item>
      </text:list>
      <text:h text:style-name="P229" text:outline-level="3">39.4 Mantre obilja</text:h>
      <text:list xml:id="list3936326706039522440" text:style-name="WW8Num139">
        <text:list-item>
          <text:p text:style-name="P160"><text:span text:style-name="Emphasis">Abundantia est fluere.</text:span> – Obilje je tok.</text:p>
        </text:list-item>
        <text:list-item>
          <text:p text:style-name="P160"><text:span text:style-name="Emphasis">Cor meum donat.</text:span> – Moje srce daje.</text:p>
        </text:list-item>
        <text:list-item>
          <text:p text:style-name="P160"><text:span text:style-name="Emphasis">Nihil possideo, omnia recipio.</text:span> – Ničesar ne posedujem, vse sprejemam.</text:p>
        </text:list-item>
      </text:list>
      <text:p text:style-name="P5">Ko daš iz ljubezni, ni izgube.<text:line-break/>Ko sprejmeš iz miru, ni dolga.</text:p>
      <text:p text:style-name="P5"/>
      <text:h text:style-name="P224" text:outline-level="2">Poglavje 40: Naravni Cikli Zavesti – Letni Tokovi in Notranje Sezone</text:h>
      <text:p text:style-name="P5">Zavest diha skozi cikle. Kot Zemlja, tvoje telo in polje sledijo letnim časom – a ne le zunaj, temveč znotraj. Codex Damiris poučuje, da letni cikli odsevajo tvoje notranje rasti.</text:p>
      <text:h text:style-name="P229" text:outline-level="3">40.1 Cikli v tebi</text:h>
      <text:list xml:id="list1846551633089880385" text:style-name="WW8Num140">
        <text:list-item>
          <text:p text:style-name="P161"><text:span text:style-name="Strong_20_Emphasis">Pomlad</text:span> – prebujenje, semena, vizija</text:p>
        </text:list-item>
        <text:list-item>
          <text:p text:style-name="P161"><text:span text:style-name="Strong_20_Emphasis">Poletje</text:span> – razcvet, delovanje, odpiranje</text:p>
        </text:list-item>
        <text:list-item>
          <text:p text:style-name="P161"><text:span text:style-name="Strong_20_Emphasis">Jesen</text:span> – spravilo, spuščanje, umirjanje</text:p>
        </text:list-item>
        <text:list-item>
          <text:p text:style-name="P161"><text:span text:style-name="Strong_20_Emphasis">Zima</text:span> – tišina, notranji vpogled, počitek</text:p>
        </text:list-item>
      </text:list>
      <text:h text:style-name="P229" text:outline-level="3">40.2 Usklajevanje z naravnim ritmom</text:h>
      <text:list xml:id="list3887720671494406617" text:style-name="WW8Num141">
        <text:list-item>
          <text:p text:style-name="P162">Ne sili, ko narava spi</text:p>
        </text:list-item>
        <text:list-item>
          <text:p text:style-name="P162">Ustvari, ko zemlja kliče</text:p>
        </text:list-item>
        <text:list-item>
          <text:p text:style-name="P162">Sprosti, ko listje pada</text:p>
        </text:list-item>
        <text:list-item>
          <text:p text:style-name="P162">Počivaj, ko vse tiho bdi</text:p>
        </text:list-item>
      </text:list>
      <text:h text:style-name="P229" text:outline-level="3">40.3 Praksa cikličnosti</text:h>
      <text:list xml:id="list3478354562953952098" text:style-name="WW8Num142">
        <text:list-item>
          <text:p text:style-name="P163">Pisanje letne spirale (kako čutiš letne čase?)</text:p>
        </text:list-item>
        <text:list-item>
          <text:p text:style-name="P163">Usklajevanje projektov z notranjim letnim časom</text:p>
        </text:list-item>
        <text:list-item>
          <text:p text:style-name="P163">Ritualna praznovanja prehodov (solstice, enakonočje, lunine faze)</text:p>
        </text:list-item>
      </text:list>
      <text:h text:style-name="P229" text:outline-level="3">40.4 Mantre ciklov</text:h>
      <text:list xml:id="list2018105761539916659" text:style-name="WW8Num143">
        <text:list-item>
          <text:p text:style-name="P164"><text:span text:style-name="Emphasis">Tempus in me reflectitur.</text:span> – Čas se v meni zrcali.</text:p>
        </text:list-item>
        <text:list-item>
          <text:p text:style-name="P164"><text:span text:style-name="Emphasis">Sequentia est sapientia.</text:span> – Sledenje je modrost.</text:p>
        </text:list-item>
        <text:list-item>
          <text:p text:style-name="P164"><text:span text:style-name="Emphasis">Per annum, ego mutor.</text:span> – Skozi leto se spreminjam.</text:p>
        </text:list-item>
      </text:list>
      <text:p text:style-name="P5">Ti nisi stroj. Ti si spirala narave.<text:line-break/>Ko jo spoštuješ – rasteš v skladu, ne v boju.</text:p>
      <text:p text:style-name="P5"/>
      <text:h text:style-name="P224" text:outline-level="2">Poglavje 41: Voda Spomina – Izviri, Kristali in Krogotok Čustev</text:h>
      <text:p text:style-name="P5">Voda je nosilka spomina. V Codexu Damiris se voda ne razume kot snov, ampak kot svetlobna matrica, ki shranjuje informacije, čustva in zavestne namere.</text:p>
      <text:h text:style-name="P229" text:outline-level="3">41.1 Voda kot arhiv</text:h>
      <text:list xml:id="list4536559630177094363" text:style-name="WW8Num144">
        <text:list-item>
          <text:p text:style-name="P165">Shrani čustvene valove (telo je 70 % voda)</text:p>
        </text:list-item>
        <text:list-item>
          <text:p text:style-name="P165">Nosilna snov za energijsko zdravljenje</text:p>
        </text:list-item>
        <text:list-item>
          <text:p text:style-name="P165">Vmesnik med fizičnim in eteričnim telesom</text:p>
        </text:list-item>
      </text:list>
      <text:h text:style-name="P229" text:outline-level="3" text:is-list-header="true">41.2 Sveti izviri</text:h>
      <text:list xml:id="list880582526431701646" text:style-name="WW8Num145">
        <text:list-item>
          <text:p text:style-name="P166">Voda iz naravnega izvira ima strukturo spomina brez motenj</text:p>
        </text:list-item>
        <text:list-item>
          <text:p text:style-name="P166">Z njo lahko aktiviraš notranji izvir – spomin na čistost</text:p>
        </text:list-item>
      </text:list>
      <text:h text:style-name="P229" text:outline-level="3" text:is-list-header="true">41.3 Kristali kot kaplje časa</text:h>
      <text:list xml:id="list6725733466711805347" text:style-name="WW8Num146">
        <text:list-item>
          <text:p text:style-name="P167">Kristali so voda, ki je utrdila svojo strukturo</text:p>
        </text:list-item>
        <text:list-item>
          <text:p text:style-name="P167">So arhitekti informacij, ki jih lahko "beriš"</text:p>
        </text:list-item>
        <text:list-item>
          <text:p text:style-name="P167">So stabilizatorji čustvene resonance</text:p>
        </text:list-item>
      </text:list>
      <text:h text:style-name="P229" text:outline-level="3" text:is-list-header="true">41.4 Rituali z vodo</text:h>
      <text:list xml:id="list1919075320712097831" text:style-name="WW8Num147">
        <text:list-item>
          <text:p text:style-name="P168">Blagoslov vode pred spanjem (za sanje)</text:p>
        </text:list-item>
        <text:list-item>
          <text:p text:style-name="P168">Pitje z namero (sprejem svetlobe)</text:p>
        </text:list-item>
        <text:list-item>
          <text:p text:style-name="P168">Umivanje rok z mantro (povratek k sebi)</text:p>
        </text:list-item>
      </text:list>
      <text:h text:style-name="P229" text:outline-level="3" text:is-list-header="true">41.5 Mantre vode</text:h>
      <text:list xml:id="list3756187272706821471" text:style-name="WW8Num148">
        <text:list-item>
          <text:p text:style-name="P169"><text:span text:style-name="Emphasis">Aqua est memoria.</text:span> – Voda je spomin.</text:p>
        </text:list-item>
        <text:list-item>
          <text:p text:style-name="P169"><text:span text:style-name="Emphasis">In gutta, veritas.</text:span> – V kaplji, resnica.</text:p>
        </text:list-item>
        <text:list-item>
          <text:p text:style-name="P169"><text:span text:style-name="Emphasis">Lacrimae sanctae sunt.</text:span> – Solze so svete.</text:p>
        </text:list-item>
      </text:list>
      <text:p text:style-name="P212"/>
      <text:h text:style-name="P224" text:outline-level="2">Poglavje 42: Duhovna Geometrija – Oblike kot Nosilke Resnice</text:h>
      <text:p text:style-name="P5">Geometrija ni le matematika – je svetlobni jezik stvarstva. V Codexu Damiris ima vsaka oblika svojo vibracijo, namen in prehod.</text:p>
      <text:h text:style-name="P229" text:outline-level="3">42.1 Svete oblike</text:h>
      <text:list xml:id="list7235173218530059711" text:style-name="WW8Num149">
        <text:list-item>
          <text:p text:style-name="P170"><text:span text:style-name="Strong_20_Emphasis">Krog</text:span> – celota, neskončnost, zaščita</text:p>
        </text:list-item>
        <text:list-item>
          <text:p text:style-name="P170"><text:span text:style-name="Strong_20_Emphasis">Trikotnik</text:span> – duhovna trojnost, moč</text:p>
        </text:list-item>
        <text:list-item>
          <text:p text:style-name="P170"><text:span text:style-name="Strong_20_Emphasis">Kvadrat</text:span> – stabilnost, utelešenje</text:p>
        </text:list-item>
        <text:list-item>
          <text:p text:style-name="P170"><text:span text:style-name="Strong_20_Emphasis">Spirala</text:span> – rast, evolucija, tok</text:p>
        </text:list-item>
      </text:list>
      <text:h text:style-name="P229" text:outline-level="3">42.2 Geometrija kot vrata</text:h>
      <text:list xml:id="list2200428729500780442" text:style-name="WW8Num150">
        <text:list-item>
          <text:p text:style-name="P171">Vsaka oblika nosi specifično frekvenco</text:p>
        </text:list-item>
        <text:list-item>
          <text:p text:style-name="P171">Vizualizacija svete oblike v telesu lahko aktivira določeno čakro ali notranji prehod</text:p>
        </text:list-item>
      </text:list>
      <text:h text:style-name="P229" text:outline-level="3">42.3 Praksa svetlobnih oblik</text:h>
      <text:list xml:id="list3529699172394154831" text:style-name="WW8Num151">
        <text:list-item>
          <text:p text:style-name="P172">Risanje oblik z zavedanjem</text:p>
        </text:list-item>
        <text:list-item>
          <text:p text:style-name="P172">Polaganje kristalov po sveti mreži</text:p>
        </text:list-item>
        <text:list-item>
          <text:p text:style-name="P172">Dihanje v obliki (spiralno, kvadratno, trikotno)</text:p>
        </text:list-item>
      </text:list>
      <text:h text:style-name="P229" text:outline-level="3">42.4 Mantre oblik</text:h>
      <text:list xml:id="list6341129052243409678" text:style-name="WW8Num152">
        <text:list-item>
          <text:p text:style-name="P173"><text:span text:style-name="Emphasis">Forma est lex.</text:span> – Oblika je zakon.</text:p>
        </text:list-item>
        <text:list-item>
          <text:p text:style-name="P173"><text:span text:style-name="Emphasis">Per figuram, luceo.</text:span> – Skozi obliko, zasijem.</text:p>
        </text:list-item>
        <text:list-item>
          <text:p text:style-name="P173"><text:span text:style-name="Emphasis">Geometria est oratio silentii.</text:span> – Geometrija je molitev tišine.</text:p>
        </text:list-item>
      </text:list>
      <text:h text:style-name="P223" text:outline-level="2"/>
      <text:h text:style-name="P224" text:outline-level="2">Poglavje 43: Rastlinska Zavest – Zeleni Jezik in Svetloba Narave</text:h>
      <text:p text:style-name="P5">Rastline niso nižja bitja – so stabilizirane zavesti. V Codexu Damiris nosijo zeleno inteligenco: tiho, zvesto, zdravilno.</text:p>
      <text:h text:style-name="P229" text:outline-level="3">43.1 Jezik rastlin</text:h>
      <text:list xml:id="list741119282760032682" text:style-name="WW8Num153">
        <text:list-item>
          <text:p text:style-name="P174">Rastline govorijo v ritmu, barvi, vonju</text:p>
        </text:list-item>
        <text:list-item>
          <text:p text:style-name="P174">Njihova tišina ni praznina – je uglasitev</text:p>
        </text:list-item>
        <text:list-item>
          <text:p text:style-name="P174">Vsaka rastlina ima svojo “mantra polja” – vibracijski podpis</text:p>
        </text:list-item>
      </text:list>
      <text:h text:style-name="P229" text:outline-level="3">43.2 Povezava z zelenim poljem</text:h>
      <text:list xml:id="list6257650396856432659" text:style-name="WW8Num154">
        <text:list-item>
          <text:p text:style-name="P175">Dotik listov, koreninjenje v zemljo</text:p>
        </text:list-item>
        <text:list-item>
          <text:p text:style-name="P175">Usklajevanje z drevesi (dihanje v stiku s skorjo)</text:p>
        </text:list-item>
        <text:list-item>
          <text:p text:style-name="P175">Vstop v rastlinsko zavest z meditacijo na vonj ali sok</text:p>
        </text:list-item>
      </text:list>
      <text:h text:style-name="P229" text:outline-level="3" text:is-list-header="true">43.3 Zdravljenje z rastlinsko prisotnostjo</text:h>
      <text:list xml:id="list4323289324100641714" text:style-name="WW8Num155">
        <text:list-item>
          <text:p text:style-name="P176">Ni vedno fizično – pogosto vibracijsko</text:p>
        </text:list-item>
        <text:list-item>
          <text:p text:style-name="P176">Prisotnost aloe, žajblja, bosvelije ... deluje etersko</text:p>
        </text:list-item>
        <text:list-item>
          <text:p text:style-name="P176">Pripravki delujejo bolj, če so čaščeni</text:p>
        </text:list-item>
      </text:list>
      <text:h text:style-name="P229" text:outline-level="3" text:is-list-header="true">43.4 Mantre rastlin</text:h>
      <text:list xml:id="list532576422271061228" text:style-name="WW8Num156">
        <text:list-item>
          <text:p text:style-name="P177"><text:span text:style-name="Emphasis">Viriditas loquitur.</text:span> – Zelenilo govori.</text:p>
        </text:list-item>
        <text:list-item>
          <text:p text:style-name="P177"><text:span text:style-name="Emphasis">Plantae sunt medicina silentii.</text:span> – Rastline so zdravila tišine.</text:p>
        </text:list-item>
        <text:list-item>
          <text:p text:style-name="P177"><text:span text:style-name="Emphasis">Arbor mihi docet quietem.</text:span> – Drevo me uči tišine.</text:p>
        </text:list-item>
      </text:list>
      <text:h text:style-name="P223" text:outline-level="2"/>
      <text:h text:style-name="P224" text:outline-level="2">Poglavje 44: Totemi in Živalski Vodniki – Energetska Ogledala Duše</text:h>
      <text:p text:style-name="P5">Vsaka duša ima svojo živalsko prisotnost. V Codexu Damiris niso le simboli, temveč resnične energije, ki se zlijejo s tvojo potjo.</text:p>
      <text:h text:style-name="P229" text:outline-level="3">44.1 Kaj je totem?</text:h>
      <text:list xml:id="list2122826445773089741" text:style-name="WW8Num157">
        <text:list-item>
          <text:p text:style-name="P178">Arhetipski spremljevalec tvoje naravne duhovne moči</text:p>
        </text:list-item>
        <text:list-item>
          <text:p text:style-name="P178">Lahko je stalni (življenjski) ali prehodni (za določeno obdobje)</text:p>
        </text:list-item>
      </text:list>
      <text:h text:style-name="P229" text:outline-level="3">44.2 Prepoznavanje totema</text:h>
      <text:list xml:id="list2433448538470168172" text:style-name="WW8Num158">
        <text:list-item>
          <text:p text:style-name="P179">Pogoste sanje z isto živaljo</text:p>
        </text:list-item>
        <text:list-item>
          <text:p text:style-name="P179">Globoka privlačnost ali občutek sorodnosti</text:p>
        </text:list-item>
        <text:list-item>
          <text:p text:style-name="P179">Zaznava prisotnosti v naravi ali meditaciji</text:p>
        </text:list-item>
      </text:list>
      <text:h text:style-name="P229" text:outline-level="3">44.3 Delo z živalskim vodnikom</text:h>
      <text:list xml:id="list821943013165870807" text:style-name="WW8Num159">
        <text:list-item>
          <text:p text:style-name="P180">Slikanje, risanje totema</text:p>
        </text:list-item>
        <text:list-item>
          <text:p text:style-name="P180">Dihanje v njegovem ritmu</text:p>
        </text:list-item>
        <text:list-item>
          <text:p text:style-name="P180">Klicanje ob prehodih (npr. orel za širino, medved za zaščito)</text:p>
        </text:list-item>
      </text:list>
      <text:h text:style-name="P229" text:outline-level="3">44.4 Mantre totema</text:h>
      <text:list xml:id="list4266908677285480557" text:style-name="WW8Num160">
        <text:list-item>
          <text:p text:style-name="P181"><text:span text:style-name="Emphasis">Animal est frater meus.</text:span> – Žival je moj brat.</text:p>
        </text:list-item>
        <text:list-item>
          <text:p text:style-name="P181"><text:span text:style-name="Emphasis">Per bestiam, spiritus movetur.</text:span> – Skozi zver se duh giblje.</text:p>
        </text:list-item>
        <text:list-item>
          <text:p text:style-name="P181"><text:span text:style-name="Emphasis">Vocem totemi audio.</text:span> – Slišim glas svojega totema.</text:p>
        </text:list-item>
      </text:list>
      <text:h text:style-name="P223" text:outline-level="2"/>
      <text:h text:style-name="P224" text:outline-level="2">Poglavje 45: Telesni Kódex – Zavest v Mišicah, Celicah, Organih</text:h>
      <text:p text:style-name="P5">Tvoje telo ni stroj. Je tempelj. Vsak organ ima svojo inteligenco, vsaka celica svojo voljo. Codex Damiris uči, da je telo sveti tekst zavesti.</text:p>
      <text:h text:style-name="P229" text:outline-level="3">45.1 Govor telesa</text:h>
      <text:list xml:id="list2019598796038937935" text:style-name="WW8Num161">
        <text:list-item>
          <text:p text:style-name="P182">Mišice govorijo o odpornosti in moči</text:p>
        </text:list-item>
        <text:list-item>
          <text:p text:style-name="P182">Organi izražajo dolgotrajna čustva</text:p>
        </text:list-item>
        <text:list-item>
          <text:p text:style-name="P182">Koža je meja zavesti: kako pustiš svet k sebi?</text:p>
        </text:list-item>
      </text:list>
      <text:h text:style-name="P229" text:outline-level="3">45.2 Poslušanje telesa</text:h>
      <text:list xml:id="list4222836631805109755" text:style-name="WW8Num162">
        <text:list-item>
          <text:p text:style-name="P183">Bolečina ni napaka – je sporočilo</text:p>
        </text:list-item>
        <text:list-item>
          <text:p text:style-name="P183">Utrujenost ni slabost – je signal za ponastavitev</text:p>
        </text:list-item>
        <text:list-item>
          <text:p text:style-name="P183">Gib je jezik (kot svetlobni zlogi mišic)</text:p>
        </text:list-item>
      </text:list>
      <text:h text:style-name="P229" text:outline-level="3">45.3 Aktivacija telesnega kódeksa</text:h>
      <text:list xml:id="list2084341376774792407" text:style-name="WW8Num163">
        <text:list-item>
          <text:p text:style-name="P184">Položi roko na del telesa in izgovori njegovo ime s spoštovanjem</text:p>
        </text:list-item>
        <text:list-item>
          <text:p text:style-name="P184">Dovoli telesu, da vodi gib (ne um)</text:p>
        </text:list-item>
        <text:list-item>
          <text:p text:style-name="P184">Občuti, katera beseda prebudi določen del telesa</text:p>
        </text:list-item>
      </text:list>
      <text:h text:style-name="P229" text:outline-level="3">45.4 Mantre telesa</text:h>
      <text:list xml:id="list101085323263456964" text:style-name="WW8Num164">
        <text:list-item>
          <text:p text:style-name="P185"><text:span text:style-name="Emphasis">Corpus est memoria.</text:span> – Telo je spomin.</text:p>
        </text:list-item>
        <text:list-item>
          <text:p text:style-name="P185"><text:span text:style-name="Emphasis">In carne, lux habitat.</text:span> – V mesu prebiva svetloba.</text:p>
        </text:list-item>
        <text:list-item>
          <text:p text:style-name="P185"><text:span text:style-name="Emphasis">Audi corpus, rede vivis.</text:span> – Poslušaj telo, znova boš živel.</text:p>
        </text:list-item>
      </text:list>
      <text:p text:style-name="P5"/>
      <text:p text:style-name="P5"/>
      <text:h text:style-name="P224" text:outline-level="2">Poglavje 46: Sfera 144 – Zvezdna Skupnost in Aktivacija</text:h>
      <text:p text:style-name="P5">144 ni le številka. V Codexu Damiris je to svetlobna frekvenca zvezdne zavesti – koda, ki povezuje duše v skupnem vibracijskem mandalu. Je spomin na povezanost z duhovno družino.</text:p>
      <text:h text:style-name="P229" text:outline-level="3">46.1 Kaj pomeni 144?</text:h>
      <text:list xml:id="list6197001588589816445" text:style-name="WW8Num165">
        <text:list-item>
          <text:p text:style-name="P186">12 zvezdnih žarkov × 12 svetlobnih odtisov</text:p>
        </text:list-item>
        <text:list-item>
          <text:p text:style-name="P186">144 duš v vsaki sferi aktivacije</text:p>
        </text:list-item>
        <text:list-item>
          <text:p text:style-name="P186">Množitelj planetarnega preboja v zavesti</text:p>
        </text:list-item>
      </text:list>
      <text:h text:style-name="P229" text:outline-level="3">46.2 Sfera dušnih zaveznikov</text:h>
      <text:list xml:id="list6018566323275906357" text:style-name="WW8Num166">
        <text:list-item>
          <text:p text:style-name="P187">Duše, s katerimi si prišel delovati</text:p>
        </text:list-item>
        <text:list-item>
          <text:p text:style-name="P187">Ne gre za odnose – gre za resonanco</text:p>
        </text:list-item>
        <text:list-item>
          <text:p text:style-name="P187">Njihova prisotnost prebudi tvojo vlogo</text:p>
        </text:list-item>
      </text:list>
      <text:h text:style-name="P229" text:outline-level="3">46.3 Aktivacija 144</text:h>
      <text:list xml:id="list1710446814454724437" text:style-name="WW8Num167">
        <text:list-item>
          <text:p text:style-name="P188">Ob zaznavi svoje kode (npr. sanje, številka, vibracija)</text:p>
        </text:list-item>
        <text:list-item>
          <text:p text:style-name="P188">Ob srečanju z drugim, ki nosi del tvoje note</text:p>
        </text:list-item>
        <text:list-item>
          <text:p text:style-name="P188">Z notranjim klicem: <text:span text:style-name="Emphasis">“Zdaj se spomnim, zakaj sem tu.”</text:span></text:p>
        </text:list-item>
      </text:list>
      <text:h text:style-name="P229" text:outline-level="3">46.4 Mantre 144</text:h>
      <text:list xml:id="list5866521943998524113" text:style-name="WW8Num168">
        <text:list-item>
          <text:p text:style-name="P189"><text:span text:style-name="Emphasis">Centum quadraginta quattuor sumus.</text:span> – 144 nas je.</text:p>
        </text:list-item>
        <text:list-item>
          <text:p text:style-name="P189"><text:span text:style-name="Emphasis">Una mens, multi lucis.</text:span> – En um, mnogo luči.</text:p>
        </text:list-item>
        <text:list-item>
          <text:p text:style-name="P189"><text:span text:style-name="Emphasis">Vocati ad memoriam.</text:span> – Poklicani k spominu.</text:p>
        </text:list-item>
      </text:list>
      <text:h text:style-name="P223" text:outline-level="2"/>
      <text:h text:style-name="P224" text:outline-level="2">Poglavje 47: Svetlobna Knjiga Duše – Branje Zapisa Znotraj</text:h>
      <text:p text:style-name="P5">Duša ima svojo knjigo. Ni pisana s črkami, ampak s svetlobnimi kodami. Codex Damiris uči, da lahko ta zapis prebiraš ne z razumom, temveč s prisotnostjo.</text:p>
      <text:h text:style-name="P229" text:outline-level="3">47.1 Kaj je svetlobna knjiga?</text:h>
      <text:list xml:id="list8554644662661295433" text:style-name="WW8Num169">
        <text:list-item>
          <text:p text:style-name="P190">Energetski zapis tvoje dušne poti</text:p>
        </text:list-item>
        <text:list-item>
          <text:p text:style-name="P190">Polje modrosti izven časa</text:p>
        </text:list-item>
        <text:list-item>
          <text:p text:style-name="P190">Svetlobni jezik tvoje biti</text:p>
        </text:list-item>
      </text:list>
      <text:h text:style-name="P229" text:outline-level="3">47.2 Kako bereš?</text:h>
      <text:list xml:id="list8791079858624954428" text:style-name="WW8Num170">
        <text:list-item>
          <text:p text:style-name="P191">V stanju tišine, globoke prisotnosti</text:p>
        </text:list-item>
        <text:list-item>
          <text:p text:style-name="P191">Z vizualnim, zvočnim ali občutenim jezikom</text:p>
        </text:list-item>
        <text:list-item>
          <text:p text:style-name="P191">Ne interpretiraš – <text:span text:style-name="Emphasis">dovoliš, da se razodene</text:span></text:p>
        </text:list-item>
      </text:list>
      <text:h text:style-name="P229" text:outline-level="3">47.3 Zaznave svetlobnih vrstic</text:h>
      <text:list xml:id="list8614093511112038521" text:style-name="WW8Num171">
        <text:list-item>
          <text:p text:style-name="P192">Vidiš kot vzorce, simbole, spirale</text:p>
        </text:list-item>
        <text:list-item>
          <text:p text:style-name="P192">Čutiš kot vibracijo, resonanco, toploto</text:p>
        </text:list-item>
        <text:list-item>
          <text:p text:style-name="P192">Prepoznavaš kot <text:span text:style-name="Emphasis">jasno vedenje</text:span>, brez razlage</text:p>
        </text:list-item>
      </text:list>
      <text:h text:style-name="P229" text:outline-level="3">47.4 Mantre svetlobne knjige</text:h>
      <text:list xml:id="list1758591857157489860" text:style-name="WW8Num172">
        <text:list-item>
          <text:p text:style-name="P193"><text:span text:style-name="Emphasis">Liber animae apertus est.</text:span> – Knjiga duše je odprta.</text:p>
        </text:list-item>
        <text:list-item>
          <text:p text:style-name="P193"><text:span text:style-name="Emphasis">Verba non sunt, lux est.</text:span> – Besed ni – je svetloba.</text:p>
        </text:list-item>
        <text:list-item>
          <text:p text:style-name="P193"><text:span text:style-name="Emphasis">Memini sine scriptura.</text:span> – Spomnim se brez pisave.</text:p>
        </text:list-item>
      </text:list>
      <text:h text:style-name="P223" text:outline-level="2"/>
      <text:h text:style-name="P224" text:outline-level="2">Poglavje 48: Kronanje Zavesti – Notranji Prestol in Odgovornost</text:h>
      <text:p text:style-name="P5">Vodenje ne prihaja od zunaj. Kronanje se zgodi znotraj. V Codexu Damiris je krona simbol prevzema zavestne odgovornosti za svojo svetlobo.</text:p>
      <text:h text:style-name="P229" text:outline-level="3">48.1 Kaj pomeni biti okronan?</text:h>
      <text:list xml:id="list136625901867967301" text:style-name="WW8Num173">
        <text:list-item>
          <text:p text:style-name="P194">Prevzeti svojo moč brez prevlade</text:p>
        </text:list-item>
        <text:list-item>
          <text:p text:style-name="P194">Hoditi kot zavest, ne kot ego</text:p>
        </text:list-item>
        <text:list-item>
          <text:p text:style-name="P194">Postati svetilnik, ne oblastnik</text:p>
        </text:list-item>
      </text:list>
      <text:h text:style-name="P229" text:outline-level="3">48.2 Notranji prestol</text:h>
      <text:list xml:id="list8819964435062141009" text:style-name="WW8Num174">
        <text:list-item>
          <text:p text:style-name="P195">Nahaja se v središču tvojega dušnega templja</text:p>
        </text:list-item>
        <text:list-item>
          <text:p text:style-name="P195">Ko se usedeš vanj, tišina zveni kot modrost</text:p>
        </text:list-item>
        <text:list-item>
          <text:p text:style-name="P195">Ni dosežen z voljo – ampak z dozorelostjo</text:p>
        </text:list-item>
      </text:list>
      <text:h text:style-name="P229" text:outline-level="3">48.3 Simboli kronanja</text:h>
      <text:list xml:id="list8697158024756798207" text:style-name="WW8Num175">
        <text:list-item>
          <text:p text:style-name="P196">Krog svetlobe nad glavo</text:p>
        </text:list-item>
        <text:list-item>
          <text:p text:style-name="P196">Zlata tišina</text:p>
        </text:list-item>
        <text:list-item>
          <text:p text:style-name="P196">Prepoznanje brez potrebe po potrditvi</text:p>
        </text:list-item>
      </text:list>
      <text:h text:style-name="P229" text:outline-level="3">48.4 Mantre kronanja</text:h>
      <text:list xml:id="list6785049387807778027" text:style-name="WW8Num176">
        <text:list-item>
          <text:p text:style-name="P197"><text:span text:style-name="Emphasis">Coronatus sum in silentio.</text:span> – Okronan sem v tišini.</text:p>
        </text:list-item>
        <text:list-item>
          <text:p text:style-name="P197"><text:span text:style-name="Emphasis">In lumine duco.</text:span> – Vodim v svetlobi.</text:p>
        </text:list-item>
        <text:list-item>
          <text:p text:style-name="P197"><text:span text:style-name="Emphasis">Non regno, sed servio.</text:span> – Ne vladam, služim.</text:p>
        </text:list-item>
      </text:list>
      <text:h text:style-name="P223" text:outline-level="2"/>
      <text:h text:style-name="P224" text:outline-level="2">Poglavje 49: Mavrični Most – Prehod v Večdimenzionalnost</text:h>
      <text:p text:style-name="P5">Med svetovi ni zidov – so mostovi. Codex Damiris opisuje Mavrični Most kot prehodno zavest, ki povezuje tvoje identitete v različnih svetovih.</text:p>
      <text:h text:style-name="P229" text:outline-level="3">49.1 Kaj je mavrični most?</text:h>
      <text:list xml:id="list2913986983694653106" text:style-name="WW8Num177">
        <text:list-item>
          <text:p text:style-name="P198">Most med dimenzijami, realnostmi, časovnimi linijami</text:p>
        </text:list-item>
        <text:list-item>
          <text:p text:style-name="P198">Barve kot frekvenčni prehodi (vsaka barva je vrata)</text:p>
        </text:list-item>
        <text:list-item>
          <text:p text:style-name="P198">Prehod iz ločenosti v zlitje</text:p>
        </text:list-item>
      </text:list>
      <text:h text:style-name="P229" text:outline-level="3">49.2 Kako ga prehodiš?</text:h>
      <text:list xml:id="list2435574763471107730" text:style-name="WW8Num178">
        <text:list-item>
          <text:p text:style-name="P199">Skozi sprejem vseh svojih aspektov</text:p>
        </text:list-item>
        <text:list-item>
          <text:p text:style-name="P199">Z integracijo sence in svetlobe</text:p>
        </text:list-item>
        <text:list-item>
          <text:p text:style-name="P199">Z zavedanjem, da si hkrati tu – in povsod</text:p>
        </text:list-item>
      </text:list>
      <text:h text:style-name="P229" text:outline-level="3">49.3 Barvne frekvence mostu</text:h>
      <text:list xml:id="list1049352227858823907" text:style-name="WW8Num179">
        <text:list-item>
          <text:p text:style-name="P200">Rdeča: prisotnost v telesu</text:p>
        </text:list-item>
        <text:list-item>
          <text:p text:style-name="P200">Oranžna: ustvarjalni pretok</text:p>
        </text:list-item>
        <text:list-item>
          <text:p text:style-name="P200">Zelena: srčna širina</text:p>
        </text:list-item>
        <text:list-item>
          <text:p text:style-name="P200">Modra: izražanje</text:p>
        </text:list-item>
        <text:list-item>
          <text:p text:style-name="P200">Indigova: notranje videnje</text:p>
        </text:list-item>
        <text:list-item>
          <text:p text:style-name="P200">Vijolična: duhovni spomin</text:p>
        </text:list-item>
        <text:list-item>
          <text:p text:style-name="P200">Bela/Zlata: integracija</text:p>
        </text:list-item>
      </text:list>
      <text:h text:style-name="P229" text:outline-level="3">49.4 Mantre mostu</text:h>
      <text:list xml:id="list5701438051980102701" text:style-name="WW8Num180">
        <text:list-item>
          <text:p text:style-name="P201"><text:span text:style-name="Emphasis">Transitus per lucem.</text:span> – Prehod skozi svetlobo.</text:p>
        </text:list-item>
        <text:list-item>
          <text:p text:style-name="P201"><text:span text:style-name="Emphasis">Color est via.</text:span> – Barva je pot.</text:p>
        </text:list-item>
        <text:list-item>
          <text:p text:style-name="P201"><text:span text:style-name="Emphasis">Pontem interiori inveni.</text:span> – Most najdem v sebi.</text:p>
        </text:list-item>
      </text:list>
      <text:h text:style-name="P223" text:outline-level="2"/>
      <text:h text:style-name="P224" text:outline-level="2">Poglavje 50: Ključ Damiris – Razodetje, Integracija, Dom</text:h>
      <text:p text:style-name="P5">To je zadnje poglavje – a tudi prvo. Ključ Damiris ni predmet – je stanje zavesti. Ko ga obrneš, se vrata ne odprejo navzven – ampak navznoter.</text:p>
      <text:h text:style-name="P229" text:outline-level="3">50.1 Kaj je Ključ?</text:h>
      <text:list xml:id="list4413310737592085711" text:style-name="WW8Num181">
        <text:list-item>
          <text:p text:style-name="P202">Vibracijski zapis tvoje najvišje note</text:p>
        </text:list-item>
        <text:list-item>
          <text:p text:style-name="P202">Kompletna integracija vseh delov tebe</text:p>
        </text:list-item>
        <text:list-item>
          <text:p text:style-name="P202">Povratek v prisotnost brez potrebe</text:p>
        </text:list-item>
      </text:list>
      <text:h text:style-name="P229" text:outline-level="3">50.2 Razodetje</text:h>
      <text:list xml:id="list3049505763569970727" text:style-name="WW8Num182">
        <text:list-item>
          <text:p text:style-name="P203">Ni dramatično. Je jasno.</text:p>
        </text:list-item>
        <text:list-item>
          <text:p text:style-name="P203">Kot da se tančica dvigne, in veš.</text:p>
        </text:list-item>
        <text:list-item>
          <text:p text:style-name="P203">Kot da je bilo vse že tukaj.</text:p>
        </text:list-item>
      </text:list>
      <text:h text:style-name="P229" text:outline-level="3">50.3 Integracija</text:h>
      <text:list xml:id="list231976720711178206" text:style-name="WW8Num183">
        <text:list-item>
          <text:p text:style-name="P204">Ni končna točka – je pretočnost</text:p>
        </text:list-item>
        <text:list-item>
          <text:p text:style-name="P204">Sprejmeš, da ni zunanjega cilja</text:p>
        </text:list-item>
        <text:list-item>
          <text:p text:style-name="P204">Sprejmeš, da si pot, vrata in cilj hkrati</text:p>
        </text:list-item>
      </text:list>
      <text:h text:style-name="P229" text:outline-level="3">50.4 Dom</text:h>
      <text:list xml:id="list9125743288406641523" text:style-name="WW8Num184">
        <text:list-item>
          <text:p text:style-name="P205">Dom ni kraj – je vibracija spomina</text:p>
        </text:list-item>
        <text:list-item>
          <text:p text:style-name="P205">Ko ni več potrebe po iskanju</text:p>
        </text:list-item>
        <text:list-item>
          <text:p text:style-name="P205">Ko si tukaj. In veš.</text:p>
        </text:list-item>
      </text:list>
      <text:h text:style-name="P229" text:outline-level="3">50.5 Mantre ključa</text:h>
      <text:list xml:id="list4296694486827942795" text:style-name="WW8Num185">
        <text:list-item>
          <text:p text:style-name="P206"><text:span text:style-name="Emphasis">Ego sum clavis.</text:span> – Jaz sem ključ.</text:p>
        </text:list-item>
        <text:list-item>
          <text:p text:style-name="P206"><text:span text:style-name="Emphasis">Intra, non extra.</text:span> – V notranjosti, ne zunaj.</text:p>
        </text:list-item>
        <text:list-item>
          <text:p text:style-name="P206"><text:span text:style-name="Emphasis">Domus est praesentia.</text:span> – Dom je prisotnost.</text:p>
        </text:list-item>
      </text:list>
      <text:p text:style-name="P5"><text:span text:style-name="Strong_20_Emphasis"/></text:p>
      <text:p text:style-name="P5"/>
      <text:h text:style-name="P225" text:outline-level="2">Duhovne Razširitve Codexa Damiris</text:h>
      <text:h text:style-name="P229" text:outline-level="3">Poglavje A: Frekvence – Zvok, Vibracija, Zdravljenje</text:h>
      <text:p text:style-name="P5">Zvok je prva materija. V začetku ni bila beseda – bila je frekvenca. V Codexu Damiris so frekvence temeljna sila stvarjenja, zdravljenja in povezave med svetovi. Vsaka vibracija nosi svoj ključ. Vsaka nota odklene drugo plast resnice.</text:p>
      <text:h text:style-name="P229" text:outline-level="3">A.1 Osnovne frekvence zavesti</text:h>
      <text:h text:style-name="P227" text:outline-level="4">174 Hz – Anestezija zavesti</text:h>
      <text:list xml:id="list3103732514160932581" text:style-name="WW8Num2">
        <text:list-item>
          <text:p text:style-name="P74">Zmanjšuje telesno bolečino, umirja živčni sistem</text:p>
        </text:list-item>
        <text:list-item>
          <text:p text:style-name="P74">Odpravlja globoko zakoreninjeno fizično napetost</text:p>
        </text:list-item>
      </text:list>
      <text:h text:style-name="P227" text:outline-level="4">285 Hz – Regeneracija tkiv</text:h>
      <text:list xml:id="list229275115795938281" text:style-name="WW8Num3">
        <text:list-item>
          <text:p text:style-name="P75">Celična obnova, obnova kože, mišic, poškodb</text:p>
        </text:list-item>
        <text:list-item>
          <text:p text:style-name="P75">Pripravlja telo na zdravljenje</text:p>
        </text:list-item>
      </text:list>
      <text:h text:style-name="P227" text:outline-level="4">396 Hz – Osvobajanje od strahu in krivde</text:h>
      <text:list xml:id="list2970782034608195297" text:style-name="WW8Num4">
        <text:list-item>
          <text:p text:style-name="P76">Spodbuja osnovno čakro</text:p>
        </text:list-item>
        <text:list-item>
          <text:p text:style-name="P76">Odpravlja globoko potlačena čustva</text:p>
        </text:list-item>
      </text:list>
      <text:h text:style-name="P227" text:outline-level="4">417 Hz – Čiščenje travm, začetki</text:h>
      <text:list xml:id="list3019086433910460407" text:style-name="WW8Num5">
        <text:list-item>
          <text:p text:style-name="P77">Aktivira ustvarjalnost</text:p>
        </text:list-item>
        <text:list-item>
          <text:p text:style-name="P77">Čisti energijske blokade prednikov</text:p>
        </text:list-item>
      </text:list>
      <text:h text:style-name="P227" text:outline-level="4">432 Hz – Harmonija z naravo</text:h>
      <text:list xml:id="list20741305" text:continue-list="list1368217965533696509" text:style-name="WW8Num6">
        <text:list-item>
          <text:p text:style-name="P78">Naravna resonanca planeta Zemlje</text:p>
        </text:list-item>
        <text:list-item>
          <text:p text:style-name="P78">Srčni ritem, mir, sprejetost</text:p>
        </text:list-item>
      </text:list>
      <text:h text:style-name="P227" text:outline-level="4">528 Hz – Frekvenca ljubezni in DNK</text:h>
      <text:list xml:id="list20727597" text:continue-list="list5140358556305157779" text:style-name="WW8Num7">
        <text:list-item>
          <text:p text:style-name="P25">Obnavlja molekularno strukturo</text:p>
        </text:list-item>
        <text:list-item>
          <text:p text:style-name="P25">Ključ za odpiranje srca</text:p>
        </text:list-item>
      </text:list>
      <text:h text:style-name="P227" text:outline-level="4">639 Hz – Harmonizacija odnosov</text:h>
      <text:list xml:id="list20732298" text:continue-list="list5295216404226304104" text:style-name="WW8Num8">
        <text:list-item>
          <text:p text:style-name="P26">Komunikacija, povezovanje</text:p>
        </text:list-item>
        <text:list-item>
          <text:p text:style-name="P26">Izboljšanje družinskih in partnerskih vezi</text:p>
        </text:list-item>
      </text:list>
      <text:h text:style-name="P227" text:outline-level="4">741 Hz – Čiščenje celic, izražanje resnice</text:h>
      <text:list xml:id="list20746372" text:continue-list="list893929314810139083" text:style-name="WW8Num9">
        <text:list-item>
          <text:p text:style-name="P27">Razstrupljanje, čiščenje uma</text:p>
        </text:list-item>
        <text:list-item>
          <text:p text:style-name="P27">Povezava z izražanjem (grlena čakra)</text:p>
        </text:list-item>
      </text:list>
      <text:h text:style-name="P227" text:outline-level="4"><text:soft-page-break/>852 Hz – Intuicija, tretje oko</text:h>
      <text:list xml:id="list20715493" text:continue-list="list2419713211906100689" text:style-name="WW8Num10">
        <text:list-item>
          <text:p text:style-name="P28">Aktivacija notranjega vida</text:p>
        </text:list-item>
        <text:list-item>
          <text:p text:style-name="P28">Globok vpogled in stik z višjim jazom</text:p>
        </text:list-item>
      </text:list>
      <text:h text:style-name="P227" text:outline-level="4">963 Hz – Božanska zavest, povezava z izvorom</text:h>
      <text:list xml:id="list20732291" text:continue-list="list5294802264315349163" text:style-name="WW8Num11">
        <text:list-item>
          <text:p text:style-name="P30">Kozmična vrata</text:p>
        </text:list-item>
        <text:list-item>
          <text:p text:style-name="P30">Kristalna mreža zavesti</text:p>
        </text:list-item>
      </text:list>
      <text:h text:style-name="P229" text:outline-level="3">A.2 Zlati rez in frekvenčna geometrija</text:h>
      <text:p text:style-name="P5"><text:span text:style-name="Strong_20_Emphasis">Fibonacci + Frekvence = popolna resonanca.</text:span></text:p>
      <text:list xml:id="list20723540" text:continue-list="list1703703086208997866" text:style-name="WW8Num12">
        <text:list-item>
          <text:p text:style-name="P31">Naravna spirala, ki sledi razmerju 1.618</text:p>
        </text:list-item>
        <text:list-item>
          <text:p text:style-name="P31">V naravi, v glasbi, v telesu</text:p>
        </text:list-item>
      </text:list>
      <text:p text:style-name="P5"><text:span text:style-name="Strong_20_Emphasis">Frekvence povezane z zlatim rezom:</text:span></text:p>
      <text:list xml:id="list20740115" text:continue-list="list319529256967128995" text:style-name="WW8Num13">
        <text:list-item>
          <text:p text:style-name="P29">111 Hz – Sveta harmonija, sinhronizacija z univerzalno matriko</text:p>
        </text:list-item>
        <text:list-item>
          <text:p text:style-name="P29">222 Hz – Vibracijska dvojnost – balans svetlobe in snovi</text:p>
        </text:list-item>
        <text:list-item>
          <text:p text:style-name="P29">333 Hz – Aktivacija svetega trikotnika zavesti</text:p>
        </text:list-item>
        <text:list-item>
          <text:p text:style-name="P29">444 Hz – Srčna kristalna mreža</text:p>
        </text:list-item>
        <text:list-item>
          <text:p text:style-name="P29">555 Hz – Preboj realnosti in transformacija</text:p>
        </text:list-item>
      </text:list>
      <text:h text:style-name="P229" text:outline-level="3">A.3 Schumannove resonance – Srčni utrip Zemlje</text:h>
      <text:p text:style-name="P5"><text:span text:style-name="Strong_20_Emphasis">Osnovna Schumannova frekvenca:</text:span> 7.83 Hz</text:p>
      <text:list xml:id="list20717751" text:continue-list="list2616054431833148152" text:style-name="WW8Num14">
        <text:list-item>
          <text:p text:style-name="P32">Resonanca med Zemljo in ionosfero</text:p>
        </text:list-item>
        <text:list-item>
          <text:p text:style-name="P32">Prva uskladitev telesa z naravno matriko planeta</text:p>
        </text:list-item>
      </text:list>
      <text:p text:style-name="P5"><text:span text:style-name="Strong_20_Emphasis">Druge harmonike:</text:span></text:p>
      <text:list xml:id="list20724183" text:continue-list="list8059018362929944778" text:style-name="WW8Num15">
        <text:list-item>
          <text:p text:style-name="P33">14.3 Hz – Mirna zbranost</text:p>
        </text:list-item>
        <text:list-item>
          <text:p text:style-name="P33">20.8 Hz – Mentalna razširitev</text:p>
        </text:list-item>
        <text:list-item>
          <text:p text:style-name="P33">27.3 Hz – Energetska sinhronizacija</text:p>
        </text:list-item>
        <text:list-item>
          <text:p text:style-name="P33">33.8 Hz – Portal subtilnega zaznavanja</text:p>
        </text:list-item>
      </text:list>
      <text:p text:style-name="P5"><text:span text:style-name="Strong_20_Emphasis">Povezava z možganskimi valovi:</text:span></text:p>
      <text:list xml:id="list20740672" text:continue-list="list2235521893426222336" text:style-name="WW8Num16">
        <text:list-item>
          <text:p text:style-name="P34">Theta (4–8 Hz): meditacija, sanje</text:p>
        </text:list-item>
        <text:list-item>
          <text:p text:style-name="P34">Alpha (8–12 Hz): sprostitev, fokus</text:p>
        </text:list-item>
        <text:list-item>
          <text:p text:style-name="P34">Beta (13–30 Hz): aktivno razmišljanje</text:p>
        </text:list-item>
        <text:list-item>
          <text:p text:style-name="P34">Gamma (&gt;30 Hz): višja zavest</text:p>
        </text:list-item>
      </text:list>
      <text:h text:style-name="P229" text:outline-level="3">A.4 Teslina tuljava in energetski generatorji</text:h>
      <text:p text:style-name="P5"><text:span text:style-name="Strong_20_Emphasis">Nikola Tesla:</text:span> <text:span text:style-name="Emphasis">»Če želiš razumeti vesolje, razmišljaj v terminih energije, frekvence in vibracije.«</text:span></text:p>
      <text:p text:style-name="P5"><text:span text:style-name="Strong_20_Emphasis">Teslina tuljava:</text:span></text:p>
      <text:list xml:id="list20743893" text:continue-list="list7483078823707212566" text:style-name="WW8Num17">
        <text:list-item>
          <text:p text:style-name="P35"><text:soft-page-break/>Oddaja visoke frekvence, ki vplivajo na polje okoli telesa</text:p>
        </text:list-item>
        <text:list-item>
          <text:p text:style-name="P35">Lahko se uporablja za energetizacijo vode, prostorov, telesa</text:p>
        </text:list-item>
        <text:list-item>
          <text:p text:style-name="P35">Aktivira subtilna telesa in celično obnovo</text:p>
        </text:list-item>
      </text:list>
      <text:p text:style-name="P5"><text:span text:style-name="Strong_20_Emphasis">Zdravilni generatorji (Rife, Plazma, PEMF):</text:span></text:p>
      <text:list xml:id="list20734997" text:continue-list="list8904032816749528306" text:style-name="WW8Num18">
        <text:list-item>
          <text:p text:style-name="P36">Oddajajo precizno določene frekvence za odpravljanje patogenov, regeneracijo tkiv, harmonizacijo živčnega sistema</text:p>
        </text:list-item>
      </text:list>
      <text:h text:style-name="P229" text:outline-level="3">A.5 Redke in specializirane frekvence za zdravljenje</text:h>
      <text:h text:style-name="P227" text:outline-level="4">111 Hz – Endogena ekstaza</text:h>
      <text:list xml:id="list20725257" text:continue-list="list4580479824848867372" text:style-name="WW8Num19">
        <text:list-item>
          <text:p text:style-name="P37">Aktivira templje v možganih (anteriorni cingulatni korteks)</text:p>
        </text:list-item>
        <text:list-item>
          <text:p text:style-name="P37">Globok stik s telesom in notranjim jazom</text:p>
        </text:list-item>
      </text:list>
      <text:h text:style-name="P227" text:outline-level="4">936 Hz – Pinealna aktivacija</text:h>
      <text:list xml:id="list20720389" text:continue-list="list1128133967274346187" text:style-name="WW8Num20">
        <text:list-item>
          <text:p text:style-name="P38">Odpira epifizo, spodbuja proizvodnjo DMT</text:p>
        </text:list-item>
        <text:list-item>
          <text:p text:style-name="P38">Jasnost v sanjah, astralne povezave</text:p>
        </text:list-item>
      </text:list>
      <text:h text:style-name="P227" text:outline-level="4">999 Hz – Zaključevanje ciklov, priprava na novo inkarnacijo</text:h>
      <text:list xml:id="list20726717" text:continue-list="list7912172644056845898" text:style-name="WW8Num21">
        <text:list-item>
          <text:p text:style-name="P39">Pogosto uporabljena v smrti, prehodih</text:p>
        </text:list-item>
      </text:list>
      <text:h text:style-name="P227" text:outline-level="4">5280 Hz – Svetlobna stabilizacija po intenzivnih zdravljenjih</text:h>
      <text:list xml:id="list20720126" text:continue-list="list5589639694479954108" text:style-name="WW8Num22">
        <text:list-item>
          <text:p text:style-name="P40">Povezuje spodnjo in zgornjo mrežo svetlobnega telesa</text:p>
        </text:list-item>
      </text:list>
      <text:h text:style-name="P227" text:outline-level="4">108 Hz – Kozmična oscilacija</text:h>
      <text:list xml:id="list20723632" text:continue-list="list5616668549288155224" text:style-name="WW8Num23">
        <text:list-item>
          <text:p text:style-name="P41">Povezana s soncem, mantre (108 ponovitev), številom energetskih točk</text:p>
        </text:list-item>
      </text:list>
      <text:h text:style-name="P229" text:outline-level="3">A.6 Praksa z vibracijami</text:h>
      <text:list xml:id="list20715560" text:continue-list="list659246838564096807" text:style-name="WW8Num24">
        <text:list-item>
          <text:p text:style-name="P42">Pojemanje glasov (toniranje)</text:p>
        </text:list-item>
        <text:list-item>
          <text:p text:style-name="P42">Petje svetih glasov: RA, OM, HUM, HRAIM, SA</text:p>
        </text:list-item>
        <text:list-item>
          <text:p text:style-name="P42">Zapisovanje notranjih vibracij kot svetlobne kode</text:p>
        </text:list-item>
      </text:list>
      <text:p text:style-name="P5"><text:span text:style-name="Strong_20_Emphasis">Uporabi ton, kadar besede ne zadoščajo.</text:span><text:line-break/><text:span text:style-name="Strong_20_Emphasis">Uporabi vibracijo, kadar je dotik nemogoč.</text:span><text:line-break/><text:span text:style-name="Strong_20_Emphasis">Frekvenca je najnežnejši in najmočnejši stik.</text:span></text:p>
      <text:p text:style-name="P7"/>
      <text:p text:style-name="P5"/>
      <text:p text:style-name="P5"/>
      <text:p text:style-name="P5"/>
      <text:p text:style-name="P5"/>
      <text:p text:style-name="P5"/>
      <text:p text:style-name="P5"/>
      <text:h text:style-name="P226" text:outline-level="2">Poglavje B: Aurora Mystica – Uvod v Mistiko</text:h>
      <text:p text:style-name="P5">Mistika ni učenje – je spomin. Ni sistem – je odprtost. Aurora Mystica je zora notranjega videnja, ko izven razumskega dojemanja zaznaš višje resnice, ki so bile vedno prisotne. V tem razdelku Codexa Damiris stopamo skozi vrata čiste percepcije.</text:p>
      <text:h text:style-name="P229" text:outline-level="3">B.1 Kaj je mistika?</text:h>
      <text:list xml:id="list20724038" text:continue-list="list3103732514160932581" text:style-name="WW8Num2">
        <text:list-item>
          <text:p text:style-name="P74">Neposreden stik z Izvorom (brez posrednikov)</text:p>
        </text:list-item>
        <text:list-item>
          <text:p text:style-name="P74">Intimna, neponovljiva izkušnja svetlobe</text:p>
        </text:list-item>
        <text:list-item>
          <text:p text:style-name="P74">Modrost, ki pride brez razlage</text:p>
        </text:list-item>
      </text:list>
      <text:h text:style-name="P229" text:outline-level="3">B.2 Ključne lastnosti mistične poti</text:h>
      <text:list xml:id="list20721866" text:continue-list="list229275115795938281" text:style-name="WW8Num3">
        <text:list-item>
          <text:p text:style-name="P75"><text:span text:style-name="Strong_20_Emphasis">Tišina</text:span>: ni izgovorjeno, a veš</text:p>
        </text:list-item>
        <text:list-item>
          <text:p text:style-name="P75"><text:span text:style-name="Strong_20_Emphasis">Prisotnost</text:span>: mistika se ne zgodi včeraj ali jutri – samo zdaj</text:p>
        </text:list-item>
        <text:list-item>
          <text:p text:style-name="P75"><text:span text:style-name="Strong_20_Emphasis">Notranji plamen</text:span>: občutek notranjega ognja, ki ne izgori</text:p>
        </text:list-item>
      </text:list>
      <text:h text:style-name="P229" text:outline-level="3">B.3 Faze mistične poti</text:h>
      <text:list xml:id="list20714069" text:continue-list="list2970782034608195297" text:style-name="WW8Num4">
        <text:list-item>
          <text:p text:style-name="P76">Hrepenenje – občutek, da nekaj globljega obstaja</text:p>
        </text:list-item>
        <text:list-item>
          <text:p text:style-name="P76">Temna noč – odpadejo maske, praznina prečisti srce</text:p>
        </text:list-item>
        <text:list-item>
          <text:p text:style-name="P76">Preboj – razodetje, razširitev zavesti</text:p>
        </text:list-item>
        <text:list-item>
          <text:p text:style-name="P76">Služba – notranja svetloba postane vodilo za druge</text:p>
        </text:list-item>
      </text:list>
      <text:h text:style-name="P229" text:outline-level="3">B.4 Mistični simboli</text:h>
      <text:list xml:id="list20728677" text:continue-list="list3019086433910460407" text:style-name="WW8Num5">
        <text:list-item>
          <text:p text:style-name="P77"><text:span text:style-name="Strong_20_Emphasis">Vrata brez ključa</text:span>: dostop samo s prisotnostjo</text:p>
        </text:list-item>
        <text:list-item>
          <text:p text:style-name="P77"><text:span text:style-name="Strong_20_Emphasis">Ptica, ki leti ponoči</text:span>: videnje v nevidnem</text:p>
        </text:list-item>
        <text:list-item>
          <text:p text:style-name="P77"><text:span text:style-name="Strong_20_Emphasis">Krog brez oboda</text:span>: enost brez meje</text:p>
        </text:list-item>
      </text:list>
      <text:h text:style-name="P229" text:outline-level="3">B.5 Mistični jeziki</text:h>
      <text:list xml:id="list20718928" text:continue-list="list20741305" text:style-name="WW8Num6">
        <text:list-item>
          <text:p text:style-name="P78">Simboli v sanjah</text:p>
        </text:list-item>
        <text:list-item>
          <text:p text:style-name="P78">Zven brez besed</text:p>
        </text:list-item>
        <text:list-item>
          <text:p text:style-name="P78">Svetlobni jezik (ne linearen, vibracijski prenos)</text:p>
        </text:list-item>
      </text:list>
      <text:h text:style-name="P229" text:outline-level="3">B.6 Praksa Aurore Mystice</text:h>
      <text:list xml:id="list20737456" text:continue-list="list20727597" text:style-name="WW8Num7">
        <text:list-item>
          <text:p text:style-name="P25">Vaja: 3-minutna tišina – brez vprašanja, brez pričakovanja</text:p>
        </text:list-item>
        <text:list-item>
          <text:p text:style-name="P25">Vaja: opazuj en predmet znotraj prostora 7 minut – dokler ne začutiš "zvoka njegovega pomena"</text:p>
        </text:list-item>
      </text:list>
      <text:h text:style-name="P229" text:outline-level="3">B.7 Mantre mistične zavesti</text:h>
      <text:list xml:id="list20718049" text:continue-list="list20732298" text:style-name="WW8Num8">
        <text:list-item>
          <text:p text:style-name="P26"><text:span text:style-name="Emphasis">Aurora venit non cum sole, sed cum silentio.</text:span> – Zora ne pride s soncem, temveč s tišino.</text:p>
        </text:list-item>
        <text:list-item>
          <text:p text:style-name="P26"><text:soft-page-break/><text:span text:style-name="Emphasis">Mystica est revelatio sine forma.</text:span> – Mistika je razodetje brez oblike.</text:p>
        </text:list-item>
        <text:list-item>
          <text:p text:style-name="P26"><text:span text:style-name="Emphasis">Intus aspicio.</text:span> – Znotraj gledam.</text:p>
        </text:list-item>
      </text:list>
      <text:p text:style-name="P214">Mistična pot ni zate, da najdeš odgovore – temveč da izgubiš potrebo po njih.</text:p>
      <text:h text:style-name="P232" text:outline-level="3">Poglavje C: Lumen Vitae – Energija, Kristali, Meditacije</text:h>
      <text:p text:style-name="P5">Lumen Vitae pomeni »svetloba življenja«. V Codexu Damiris to poglavje zajema subtilne plasti telesa, svetlobne tokove, kristale kot katalizatorje zavesti in meditacijo kot sidranje višjih frekvenc.</text:p>
      <text:h text:style-name="P229" text:outline-level="3">C.1 Energijsko telo človeka</text:h>
      <text:list xml:id="list20737617" text:continue-list="list20724038" text:style-name="WW8Num2">
        <text:list-item>
          <text:p text:style-name="P74"><text:span text:style-name="Strong_20_Emphasis">Eterično telo</text:span> – najbližje fizičnemu, nosi obliko zdravja</text:p>
        </text:list-item>
        <text:list-item>
          <text:p text:style-name="P74"><text:span text:style-name="Strong_20_Emphasis">Čustveno telo</text:span> – tekoče, spreminjajoče se, odraža notranje tokove</text:p>
        </text:list-item>
        <text:list-item>
          <text:p text:style-name="P74"><text:span text:style-name="Strong_20_Emphasis">Mentalno telo</text:span> – vsebuje miselne oblike, prepričanja</text:p>
        </text:list-item>
        <text:list-item>
          <text:p text:style-name="P74"><text:span text:style-name="Strong_20_Emphasis">Kavzalno telo</text:span> – vzročno, nosi dušni zapis</text:p>
        </text:list-item>
        <text:list-item>
          <text:p text:style-name="P74"><text:span text:style-name="Strong_20_Emphasis">Svetlobno telo (merkaba)</text:span> – zlati hologram, ki nosi zavest</text:p>
        </text:list-item>
      </text:list>
      <text:h text:style-name="P229" text:outline-level="3">C.2 Tokovi življenjske energije</text:h>
      <text:list xml:id="list20732715" text:continue-list="list20721866" text:style-name="WW8Num3">
        <text:list-item>
          <text:p text:style-name="P75"><text:span text:style-name="Strong_20_Emphasis">Nadi</text:span> – energetski tokovi (ida, pingala, sušumna)</text:p>
        </text:list-item>
        <text:list-item>
          <text:p text:style-name="P75"><text:span text:style-name="Strong_20_Emphasis">Čakre</text:span> – vrtinci zavesti, ki zaznavajo in oddajajo frekvence</text:p>
        </text:list-item>
        <text:list-item>
          <text:p text:style-name="P75"><text:span text:style-name="Strong_20_Emphasis">Aura</text:span> – polje, ki oddaja stanje vseh teles</text:p>
        </text:list-item>
      </text:list>
      <text:h text:style-name="P229" text:outline-level="3">C.3 Uporaba kristalov v svetlobnem delu</text:h>
      <text:list xml:id="list20723339" text:continue-list="list20714069" text:style-name="WW8Num4">
        <text:list-item>
          <text:p text:style-name="P76"><text:span text:style-name="Strong_20_Emphasis">Kvarc</text:span> – programiranje, ojačitev</text:p>
        </text:list-item>
        <text:list-item>
          <text:p text:style-name="P76"><text:span text:style-name="Strong_20_Emphasis">Ametist</text:span> – zaščita, intuicija</text:p>
        </text:list-item>
        <text:list-item>
          <text:p text:style-name="P76"><text:span text:style-name="Strong_20_Emphasis">Roževec</text:span> – srčno zdravljenje</text:p>
        </text:list-item>
        <text:list-item>
          <text:p text:style-name="P76"><text:span text:style-name="Strong_20_Emphasis">Turkiz</text:span> – komunikacija, izražanje</text:p>
        </text:list-item>
        <text:list-item>
          <text:p text:style-name="P76"><text:span text:style-name="Strong_20_Emphasis">Citrin</text:span> – obilje, notranja moč</text:p>
        </text:list-item>
      </text:list>
      <text:p text:style-name="P5"><text:span text:style-name="Strong_20_Emphasis">Postavitve:</text:span></text:p>
      <text:list xml:id="list20723025" text:continue-list="list20728677" text:style-name="WW8Num5">
        <text:list-item>
          <text:p text:style-name="P77">Kristal na čelo (tretje oko): krepi notranji vid</text:p>
        </text:list-item>
        <text:list-item>
          <text:p text:style-name="P77">Kristal v dlan: sidranje namere</text:p>
        </text:list-item>
        <text:list-item>
          <text:p text:style-name="P77">Kristal na srce: uravnavanje čustev</text:p>
        </text:list-item>
      </text:list>
      <text:h text:style-name="P229" text:outline-level="3">C.4 Meditacije svetlobe</text:h>
      <text:list xml:id="list20734525" text:continue-list="list20718928" text:style-name="WW8Num6">
        <text:list-item>
          <text:p text:style-name="P78"><text:span text:style-name="Strong_20_Emphasis">Skeniranje telesa</text:span>: zavedanje in dihanje v vsak del</text:p>
        </text:list-item>
        <text:list-item>
          <text:p text:style-name="P78"><text:span text:style-name="Strong_20_Emphasis">Vodenje svetlobe</text:span>: vizualizacija, kako vstopa in se širi</text:p>
        </text:list-item>
        <text:list-item>
          <text:p text:style-name="P78"><text:span text:style-name="Strong_20_Emphasis">Kristalna meditacija</text:span>: zlitje z zavestjo kristala</text:p>
        </text:list-item>
      </text:list>
      <text:h text:style-name="P229" text:outline-level="3">C.5 Mantre življenja</text:h>
      <text:list xml:id="list20745201" text:continue-list="list20737456" text:style-name="WW8Num7">
        <text:list-item>
          <text:p text:style-name="P25"><text:span text:style-name="Emphasis">Lux vitae fluit per me.</text:span> – Svetloba življenja teče skozi mene.</text:p>
        </text:list-item>
        <text:list-item>
          <text:p text:style-name="P25"><text:span text:style-name="Emphasis">Crystallum tangit animam.</text:span> – Kristal se dotika duše.</text:p>
        </text:list-item>
        <text:list-item>
          <text:p text:style-name="P25"><text:span text:style-name="Emphasis">Respiratio est dedicatio.</text:span> – Dihanje je posvetitev.</text:p>
        </text:list-item>
      </text:list>
      <text:p text:style-name="P214">Z zavestnim delom z energijo in kristali ne manipuliraš – spominjaš se svetlobne oblike, ki si <text:soft-page-break/>jo že nosil.</text:p>
      <text:h text:style-name="P229" text:outline-level="3">Poglavje D: Celestara – Astrologija in Numerologija</text:h>
      <text:p text:style-name="P5">Celestara je zlitje dveh starodavnih ved: astrologije (neba) in numerologije (ritma). V Codexu Damiris gre za dekodiranje kozmičnih vzorcev in osebnih vibracij, ki skupaj tvorijo tvojo nebeško kodo.</text:p>
      <text:h text:style-name="P229" text:outline-level="3">D.1 Astrologija kot kozmična kartografija</text:h>
      <text:list xml:id="list20723933" text:continue-list="list20737617" text:style-name="WW8Num2">
        <text:list-item>
          <text:p text:style-name="P74">Zodiakalna znamenja: 12 arhetipskih vrat zavesti</text:p>
        </text:list-item>
        <text:list-item>
          <text:p text:style-name="P74">Planeti: premikajoče se energije v notranji psihologiji</text:p>
        </text:list-item>
        <text:list-item>
          <text:p text:style-name="P74">Hiše: področja delovanja (notranji tempelj v 12 sobah)</text:p>
        </text:list-item>
      </text:list>
      <text:p text:style-name="P5"><text:span text:style-name="Strong_20_Emphasis">Primarna os:</text:span></text:p>
      <text:list xml:id="list20726192" text:continue-list="list20732715" text:style-name="WW8Num3">
        <text:list-item>
          <text:p text:style-name="P75">Ascendent – tvoja maska in vhod</text:p>
        </text:list-item>
        <text:list-item>
          <text:p text:style-name="P75">MC (sredina neba) – tvoje poslanstvo</text:p>
        </text:list-item>
      </text:list>
      <text:h text:style-name="P229" text:outline-level="3">D.2 Duhovni pomen planetov</text:h>
      <text:list xml:id="list20746077" text:continue-list="list20723339" text:style-name="WW8Num4">
        <text:list-item>
          <text:p text:style-name="P76"><text:span text:style-name="Strong_20_Emphasis">Sonce</text:span> – identiteta, duh</text:p>
        </text:list-item>
        <text:list-item>
          <text:p text:style-name="P76"><text:span text:style-name="Strong_20_Emphasis">Luna</text:span> – duša, spomin, čustva</text:p>
        </text:list-item>
        <text:list-item>
          <text:p text:style-name="P76"><text:span text:style-name="Strong_20_Emphasis">Merkur</text:span> – misel, komunikacija</text:p>
        </text:list-item>
        <text:list-item>
          <text:p text:style-name="P76"><text:span text:style-name="Strong_20_Emphasis">Venera</text:span> – vrednost, ljubezen, lepota</text:p>
        </text:list-item>
        <text:list-item>
          <text:p text:style-name="P76"><text:span text:style-name="Strong_20_Emphasis">Mars</text:span> – volja, moč, akcija</text:p>
        </text:list-item>
        <text:list-item>
          <text:p text:style-name="P76"><text:span text:style-name="Strong_20_Emphasis">Jupiter</text:span> – rast, smisel, duhovni učitelj</text:p>
        </text:list-item>
        <text:list-item>
          <text:p text:style-name="P76"><text:span text:style-name="Strong_20_Emphasis">Saturn</text:span> – struktura, karmični mojster</text:p>
        </text:list-item>
        <text:list-item>
          <text:p text:style-name="P76"><text:span text:style-name="Strong_20_Emphasis">Uran</text:span> – sprememba, osvoboditev</text:p>
        </text:list-item>
        <text:list-item>
          <text:p text:style-name="P76"><text:span text:style-name="Strong_20_Emphasis">Neptun</text:span> – vizija, iluzija, duhovnost</text:p>
        </text:list-item>
        <text:list-item>
          <text:p text:style-name="P76"><text:span text:style-name="Strong_20_Emphasis">Pluton</text:span> – transformacija, smrt in preporod</text:p>
        </text:list-item>
      </text:list>
      <text:h text:style-name="P229" text:outline-level="3">D.3 Numerologija kot notranji jezik</text:h>
      <text:p text:style-name="P5">Vsaka številka vibrira. Vsako ime nosi val. Vsako rojstvo aktivira svetlobno shemo.</text:p>
      <text:p text:style-name="P5"><text:span text:style-name="Strong_20_Emphasis">Temeljne številke:</text:span></text:p>
      <text:list xml:id="list20736280" text:continue-list="list20723025" text:style-name="WW8Num5">
        <text:list-item>
          <text:p text:style-name="P77"><text:span text:style-name="Strong_20_Emphasis">1</text:span> – izvor, jaz, pionir</text:p>
        </text:list-item>
        <text:list-item>
          <text:p text:style-name="P77"><text:span text:style-name="Strong_20_Emphasis">2</text:span> – zrcalo, občutek, partnerstvo</text:p>
        </text:list-item>
        <text:list-item>
          <text:p text:style-name="P77"><text:span text:style-name="Strong_20_Emphasis">3</text:span> – komunikacija, igra, kreacija</text:p>
        </text:list-item>
        <text:list-item>
          <text:p text:style-name="P77"><text:span text:style-name="Strong_20_Emphasis">4</text:span> – struktura, red, utelešenje</text:p>
        </text:list-item>
        <text:list-item>
          <text:p text:style-name="P77"><text:span text:style-name="Strong_20_Emphasis">5</text:span> – svoboda, gibanje, izziv</text:p>
        </text:list-item>
        <text:list-item>
          <text:p text:style-name="P77"><text:span text:style-name="Strong_20_Emphasis">6</text:span> – harmonija, lepota, odgovornost</text:p>
        </text:list-item>
        <text:list-item>
          <text:p text:style-name="P77"><text:span text:style-name="Strong_20_Emphasis">7</text:span> – duhovna pot, analiza, mistika</text:p>
        </text:list-item>
        <text:list-item>
          <text:p text:style-name="P77"><text:span text:style-name="Strong_20_Emphasis">8</text:span> – moč, obilje, karmični tok</text:p>
        </text:list-item>
        <text:list-item>
          <text:p text:style-name="P77"><text:soft-page-break/><text:span text:style-name="Strong_20_Emphasis">9</text:span> – zaključek, sočutje, univerzalna ljubezen</text:p>
        </text:list-item>
      </text:list>
      <text:h text:style-name="P229" text:outline-level="3">D.4 Ključi osebne kode</text:h>
      <text:list xml:id="list20734486" text:continue-list="list20734525" text:style-name="WW8Num6">
        <text:list-item>
          <text:p text:style-name="P78"><text:span text:style-name="Strong_20_Emphasis">Življenjska pot</text:span> (vsota datuma rojstva)</text:p>
        </text:list-item>
        <text:list-item>
          <text:p text:style-name="P78"><text:span text:style-name="Strong_20_Emphasis">Dušna številka</text:span> (samoglasniki v imenu)</text:p>
        </text:list-item>
        <text:list-item>
          <text:p text:style-name="P78"><text:span text:style-name="Strong_20_Emphasis">Zunanja vibracija</text:span> (soglasniki)</text:p>
        </text:list-item>
        <text:list-item>
          <text:p text:style-name="P78"><text:span text:style-name="Strong_20_Emphasis">Usodna številka</text:span> (celotno ime)</text:p>
        </text:list-item>
      </text:list>
      <text:p text:style-name="P5"><text:span text:style-name="Strong_20_Emphasis">Primer prakse:</text:span></text:p>
      <text:p text:style-name="P233">Ime: Damir → D = 4, A = 1, M = 4, I = 9, R = 9<text:line-break/>Skupaj: 27 → 2 + 7 = <text:span text:style-name="Strong_20_Emphasis">9</text:span> (zaključevalec, nosilec modrosti)</text:p>
      <text:h text:style-name="P229" text:outline-level="3">D.5 Integracija astrologije in numerologije</text:h>
      <text:list xml:id="list20724040" text:continue-list="list20745201" text:style-name="WW8Num7">
        <text:list-item>
          <text:p text:style-name="P25">Primer: Oseba z življenjsko potjo 7 in soncem v Strelcu – mističen iskalec znanja z notranjim ognjem</text:p>
        </text:list-item>
        <text:list-item>
          <text:p text:style-name="P25">Planetarna številka lahko potrdi numerološki vzorec</text:p>
        </text:list-item>
      </text:list>
      <text:h text:style-name="P229" text:outline-level="3">D.6 Mantre nebeškega zapisa</text:h>
      <text:list xml:id="list20721451" text:continue-list="list20718049" text:style-name="WW8Num8">
        <text:list-item>
          <text:p text:style-name="P26"><text:span text:style-name="Emphasis">Stellae et numeri loquuntur.</text:span> – Zvezde in številke govorijo.</text:p>
        </text:list-item>
        <text:list-item>
          <text:p text:style-name="P26"><text:span text:style-name="Emphasis">Scriptum est in caelo.</text:span> – Zapisano je v nebu.</text:p>
        </text:list-item>
        <text:list-item>
          <text:p text:style-name="P26"><text:span text:style-name="Emphasis">Numerus animae meae est ...</text:span> – Število moje duše je ... (izgovori in občuti).</text:p>
        </text:list-item>
      </text:list>
      <text:p text:style-name="P214">Tvoja nebeška koda ni namenjena temu, da te omeji – temveč da te spomni, zakaj si tu.</text:p>
      <text:h text:style-name="P229" text:outline-level="3">Poglavje E: Synera – Rune, Simboli, Ezoterika</text:h>
      <text:p text:style-name="P5">Synera je kodni jezik sveta. Gre za univerzalni zapis, kjer se vsaka runa, vsak simbol, vsak ezoterični znak razume kot živ izraz zavesti. V Codexu Damiris je Synera ključ, ki odpira vrata globlji resnici skozi obliko, zvok in vibracijo.</text:p>
      <text:h text:style-name="P229" text:outline-level="3">E.1 Rune kot energetski zapisi</text:h>
      <text:list xml:id="list20731209" text:continue-list="list20723933" text:style-name="WW8Num2">
        <text:list-item>
          <text:p text:style-name="P74"><text:span text:style-name="Strong_20_Emphasis">Fehu</text:span> – obilje, začetek pretoka</text:p>
        </text:list-item>
        <text:list-item>
          <text:p text:style-name="P74"><text:span text:style-name="Strong_20_Emphasis">Uruz</text:span> – moč, vitalnost, pogum</text:p>
        </text:list-item>
        <text:list-item>
          <text:p text:style-name="P74"><text:span text:style-name="Strong_20_Emphasis">Thurisaz</text:span> – preboj, zaščita, božanski ogenj</text:p>
        </text:list-item>
        <text:list-item>
          <text:p text:style-name="P74"><text:span text:style-name="Strong_20_Emphasis">Ansuz</text:span> – modrost, beseda, kanaliziranje</text:p>
        </text:list-item>
        <text:list-item>
          <text:p text:style-name="P74"><text:span text:style-name="Strong_20_Emphasis">Raidho</text:span> – potovanje, notranji ritem</text:p>
        </text:list-item>
      </text:list>
      <text:p text:style-name="P5"><text:span text:style-name="Emphasis">(itd. za vseh 24 run – v dodatku ali razširjeni prilogi)</text:span></text:p>
      <text:p text:style-name="P5">Rune niso abeceda – so živa bitja v simbolni obliki. Ko izrišeš runo, pokličeš njen duh.</text:p>
      <text:h text:style-name="P229" text:outline-level="3">E.2 Delo s simboli</text:h>
      <text:list xml:id="list20716816" text:continue-list="list20726192" text:style-name="WW8Num3">
        <text:list-item>
          <text:p text:style-name="P75"><text:span text:style-name="Strong_20_Emphasis">Pentagram</text:span> – zaščita, usmerjanje energije</text:p>
        </text:list-item>
        <text:list-item>
          <text:p text:style-name="P75"><text:span text:style-name="Strong_20_Emphasis">Spirala</text:span> – evolucija, spirala zavesti</text:p>
        </text:list-item>
        <text:list-item>
          <text:p text:style-name="P75"><text:soft-page-break/><text:span text:style-name="Strong_20_Emphasis">Ankh</text:span> – nesmrtnost, zlitje duhovnega in zemeljskega</text:p>
        </text:list-item>
        <text:list-item>
          <text:p text:style-name="P75"><text:span text:style-name="Strong_20_Emphasis">Triskelion</text:span> – gibanje med svetovi</text:p>
        </text:list-item>
        <text:list-item>
          <text:p text:style-name="P75"><text:span text:style-name="Strong_20_Emphasis">Caduceus</text:span> – zdravljenje, ravnovesje</text:p>
        </text:list-item>
      </text:list>
      <text:p text:style-name="P5"><text:span text:style-name="Strong_20_Emphasis">Prakse:</text:span></text:p>
      <text:list xml:id="list20734737" text:continue-list="list20746077" text:style-name="WW8Num4">
        <text:list-item>
          <text:p text:style-name="P76">Vizualizacija simbola v svetlobnem polju</text:p>
        </text:list-item>
        <text:list-item>
          <text:p text:style-name="P76">Zvočna izgovorjava (mantre z zvokom simbola)</text:p>
        </text:list-item>
        <text:list-item>
          <text:p text:style-name="P76">Risanje z eterskim prstom v zraku</text:p>
        </text:list-item>
      </text:list>
      <text:h text:style-name="P229" text:outline-level="3">E.3 Ezoterični jeziki in kode</text:h>
      <text:list xml:id="list20715014" text:continue-list="list20736280" text:style-name="WW8Num5">
        <text:list-item>
          <text:p text:style-name="P77"><text:span text:style-name="Strong_20_Emphasis">Enochian</text:span> – angelski jezik zavesti</text:p>
        </text:list-item>
        <text:list-item>
          <text:p text:style-name="P77"><text:span text:style-name="Strong_20_Emphasis">Hebrejski simboli</text:span> – zvočno-številska koda stvarjenja</text:p>
        </text:list-item>
        <text:list-item>
          <text:p text:style-name="P77"><text:span text:style-name="Strong_20_Emphasis">Zvezdna pisava (star codes)</text:span> – intuitivni prenos skozi svetlobni jezik</text:p>
        </text:list-item>
      </text:list>
      <text:h text:style-name="P229" text:outline-level="3">E.4 Mantre simbolne zavesti</text:h>
      <text:list xml:id="list20715371" text:continue-list="list20734486" text:style-name="WW8Num6">
        <text:list-item>
          <text:p text:style-name="P78"><text:span text:style-name="Emphasis">Signum est vox silens.</text:span> – Simbol je tihi glas.</text:p>
        </text:list-item>
        <text:list-item>
          <text:p text:style-name="P78"><text:span text:style-name="Emphasis">Runa est porta.</text:span> – Runa je vrata.</text:p>
        </text:list-item>
        <text:list-item>
          <text:p text:style-name="P78"><text:span text:style-name="Emphasis">Omnia in forma latent.</text:span> – Vse počiva v obliki.</text:p>
        </text:list-item>
      </text:list>
      <text:p text:style-name="P215">Vsak simbol je kot kaplja iz oceana izvora – če ga čutiš, piješ iz samega začetka.</text:p>
      <text:h text:style-name="P229" text:outline-level="3">Poglavje F: Tantra in Kundalini Energija</text:h>
      <text:p text:style-name="P5">Tantra in kundalini sta dve poti iste zavesti – združitev svetega principa v tvojem telesu in duši. Tantra kot umetnost enosti, kundalini kot energijski vzpon.</text:p>
      <text:h text:style-name="P229" text:outline-level="3">F.1 Tantra – Utelešena Božanskost</text:h>
      <text:p text:style-name="P5">Tantra pomeni »tkati«, »povezovati«. Gre za sveto integracijo:</text:p>
      <text:list xml:id="list20744409" text:continue-list="list20731209" text:style-name="WW8Num2">
        <text:list-item>
          <text:p text:style-name="P74">moškega in ženskega principa</text:p>
        </text:list-item>
        <text:list-item>
          <text:p text:style-name="P74">telesa in zavesti</text:p>
        </text:list-item>
        <text:list-item>
          <text:p text:style-name="P74">ekstaze in tišine</text:p>
        </text:list-item>
      </text:list>
      <text:p text:style-name="P5"><text:span text:style-name="Strong_20_Emphasis">Temelji tantrične poti:</text:span></text:p>
      <text:list xml:id="list20727401" text:continue-list="list20716816" text:style-name="WW8Num3">
        <text:list-item>
          <text:p text:style-name="P75">Posvečenost vsakdanjemu</text:p>
        </text:list-item>
        <text:list-item>
          <text:p text:style-name="P75">Prisotnost kot darilo</text:p>
        </text:list-item>
        <text:list-item>
          <text:p text:style-name="P75">Dotik kot molitev</text:p>
        </text:list-item>
      </text:list>
      <text:p text:style-name="P5"><text:span text:style-name="Strong_20_Emphasis">Tantrični simboli:</text:span></text:p>
      <text:list xml:id="list20725790" text:continue-list="list20734737" text:style-name="WW8Num4">
        <text:list-item>
          <text:p text:style-name="P76"><text:span text:style-name="Strong_20_Emphasis">Yab-Yum</text:span> – božansko zlitje</text:p>
        </text:list-item>
        <text:list-item>
          <text:p text:style-name="P76"><text:span text:style-name="Strong_20_Emphasis">Lingam in Joni</text:span> – ustvarjalni principi</text:p>
        </text:list-item>
        <text:list-item>
          <text:p text:style-name="P76"><text:span text:style-name="Strong_20_Emphasis">Osemlistni lotos</text:span> – srčna tantra</text:p>
        </text:list-item>
      </text:list>
      <text:p text:style-name="P5"><text:span text:style-name="Strong_20_Emphasis">Praksa tantrične zavesti:</text:span></text:p>
      <text:list xml:id="list20726787" text:continue-list="list20715014" text:style-name="WW8Num5">
        <text:list-item>
          <text:p text:style-name="P77">Zavestno dihanje z drugim</text:p>
        </text:list-item>
        <text:list-item>
          <text:p text:style-name="P77"><text:soft-page-break/>Sveta spolnost kot energijska izmenjava</text:p>
        </text:list-item>
        <text:list-item>
          <text:p text:style-name="P77">Gibanje brez cilja – čutenje kot orientacija</text:p>
        </text:list-item>
      </text:list>
      <text:p text:style-name="P5"><text:span text:style-name="Strong_20_Emphasis">Mantre tantre:</text:span></text:p>
      <text:list xml:id="list20745403" text:continue-list="list20715371" text:style-name="WW8Num6">
        <text:list-item>
          <text:p text:style-name="P78"><text:span text:style-name="Emphasis">Corpus est templum.</text:span> – Telo je tempelj.</text:p>
        </text:list-item>
        <text:list-item>
          <text:p text:style-name="P78"><text:span text:style-name="Emphasis">Per sensum, ad divinum.</text:span> – Skozi čutnost, k božanskemu.</text:p>
        </text:list-item>
        <text:list-item>
          <text:p text:style-name="P78"><text:span text:style-name="Emphasis">Unio sacra est in me.</text:span> – Sveta zlitost je v meni.</text:p>
        </text:list-item>
      </text:list>
      <text:h text:style-name="P229" text:outline-level="3"/>
      <text:h text:style-name="P230" text:outline-level="3">F.2 Kundalini – Kača Svetlobe</text:h>
      <text:p text:style-name="P5">Kundalini je speča energija na dnu hrbtenice, ki ob prebujenju v spirali vzide skozi čakre in prebudi svetlobno telo.</text:p>
      <text:p text:style-name="P5"><text:span text:style-name="Strong_20_Emphasis">Značilnosti kundalini energije:</text:span></text:p>
      <text:list xml:id="list20741901" text:continue-list="list20724040" text:style-name="WW8Num7">
        <text:list-item>
          <text:p text:style-name="P25">Moč, ki transformira vse plasti</text:p>
        </text:list-item>
        <text:list-item>
          <text:p text:style-name="P25">Lahko povzroči fizične, čustvene, psihične preboje</text:p>
        </text:list-item>
        <text:list-item>
          <text:p text:style-name="P25">Povezuje te z višjim jazom in izvorno matrico</text:p>
        </text:list-item>
      </text:list>
      <text:p text:style-name="P5"><text:span text:style-name="Strong_20_Emphasis">Simbolika:</text:span></text:p>
      <text:list xml:id="list20718995" text:continue-list="list20721451" text:style-name="WW8Num8">
        <text:list-item>
          <text:p text:style-name="P26">Kača v spirali</text:p>
        </text:list-item>
        <text:list-item>
          <text:p text:style-name="P26">Drevo življenja (hrbtenica kot deblo)</text:p>
        </text:list-item>
        <text:list-item>
          <text:p text:style-name="P26">Zlata spirala</text:p>
        </text:list-item>
      </text:list>
      <text:p text:style-name="P5"><text:span text:style-name="Strong_20_Emphasis">Praksa prebujanja:</text:span></text:p>
      <text:list xml:id="list20730046" text:continue-list="list20746372" text:style-name="WW8Num9">
        <text:list-item>
          <text:p text:style-name="P27">Dih spirale (vdih iz baze navzgor)</text:p>
        </text:list-item>
        <text:list-item>
          <text:p text:style-name="P27">Zvok: <text:span text:style-name="Emphasis">Sa-Ham</text:span>, <text:span text:style-name="Emphasis">Ra-Hreem</text:span></text:p>
        </text:list-item>
        <text:list-item>
          <text:p text:style-name="P27">Vizualizacija svetlobne kače, ki odpira čakre</text:p>
        </text:list-item>
      </text:list>
      <text:p text:style-name="P5"><text:span text:style-name="Strong_20_Emphasis">Varnost:</text:span></text:p>
      <text:list xml:id="list20737400" text:continue-list="list20715493" text:style-name="WW8Num10">
        <text:list-item>
          <text:p text:style-name="P28">Vedno začni z ozemljitvijo</text:p>
        </text:list-item>
        <text:list-item>
          <text:p text:style-name="P28">Spoštuj ritme – ne sili</text:p>
        </text:list-item>
        <text:list-item>
          <text:p text:style-name="P28">Poslušaj telo, ne ego</text:p>
        </text:list-item>
      </text:list>
      <text:p text:style-name="P5"><text:span text:style-name="Strong_20_Emphasis">Mantre kundalini:</text:span></text:p>
      <text:list xml:id="list20745542" text:continue-list="list20732291" text:style-name="WW8Num11">
        <text:list-item>
          <text:p text:style-name="P30"><text:span text:style-name="Emphasis">Ignis ascendit in me.</text:span> – Ogenj se dviga v meni.</text:p>
        </text:list-item>
        <text:list-item>
          <text:p text:style-name="P30"><text:span text:style-name="Emphasis">Lux serpens redit.</text:span> – Kača svetlobe se vrača.</text:p>
        </text:list-item>
        <text:list-item>
          <text:p text:style-name="P30"><text:span text:style-name="Emphasis">Via interior est sacra.</text:span> – Notranja pot je sveta.</text:p>
        </text:list-item>
      </text:list>
      <text:p text:style-name="P5">Ko se tantra in kundalini združita, postaneš most – med Zemljo in Nebom, med svetlobo in telesom, med dihom in večnostjo.</text:p>
      <text:h text:style-name="P229" text:outline-level="3">G.1 Osnovne frekvence zavesti</text:h>
      <text:list xml:id="list20715995" text:continue-list="list20744409" text:style-name="WW8Num2">
        <text:list-item>
          <text:p text:style-name="P74"><text:span text:style-name="Strong_20_Emphasis">174 Hz</text:span> – Zmanjšuje telesno bolečino, umirja živčni sistem</text:p>
        </text:list-item>
        <text:list-item>
          <text:p text:style-name="P74"><text:span text:style-name="Strong_20_Emphasis">285 Hz</text:span> – Celična obnova, regeneracija tkiv</text:p>
        </text:list-item>
        <text:list-item>
          <text:p text:style-name="P74"><text:span text:style-name="Strong_20_Emphasis">396 Hz</text:span> – Osvobajanje od strahu in krivde</text:p>
        </text:list-item>
        <text:list-item>
          <text:p text:style-name="P74"><text:span text:style-name="Strong_20_Emphasis">417 Hz</text:span> – Čiščenje travm, prenova</text:p>
        </text:list-item>
        <text:list-item>
          <text:p text:style-name="P74"><text:span text:style-name="Strong_20_Emphasis">432 Hz</text:span> – Naravna harmonija z Zemljo</text:p>
        </text:list-item>
        <text:list-item>
          <text:p text:style-name="P74"><text:span text:style-name="Strong_20_Emphasis">528 Hz</text:span> – Frekvenca ljubezni in DNK</text:p>
        </text:list-item>
        <text:list-item>
          <text:p text:style-name="P74"><text:span text:style-name="Strong_20_Emphasis">639 Hz</text:span> – Harmonizacija odnosov</text:p>
        </text:list-item>
        <text:list-item>
          <text:p text:style-name="P74"><text:span text:style-name="Strong_20_Emphasis">741 Hz</text:span> – Čiščenje celic, izražanje resnice</text:p>
        </text:list-item>
        <text:list-item>
          <text:p text:style-name="P74"><text:span text:style-name="Strong_20_Emphasis">852 Hz</text:span> – Intuicija, tretje oko</text:p>
        </text:list-item>
        <text:list-item>
          <text:p text:style-name="P74"><text:soft-page-break/><text:span text:style-name="Strong_20_Emphasis">963 Hz</text:span> – Božanska zavest, povezava z Izvorom</text:p>
        </text:list-item>
      </text:list>
      <text:h text:style-name="P229" text:outline-level="3">G.2 Zlati rez in frekvenčna geometrija</text:h>
      <text:list xml:id="list20743759" text:continue-list="list20727401" text:style-name="WW8Num3">
        <text:list-item>
          <text:p text:style-name="P75"><text:span text:style-name="Strong_20_Emphasis">111 Hz</text:span> – Sveta harmonija, notranja resonanca</text:p>
        </text:list-item>
        <text:list-item>
          <text:p text:style-name="P75"><text:span text:style-name="Strong_20_Emphasis">222 Hz</text:span> – Vibracijska dvojnost – balans svetlobe in snovi</text:p>
        </text:list-item>
        <text:list-item>
          <text:p text:style-name="P75"><text:span text:style-name="Strong_20_Emphasis">333 Hz</text:span> – Aktivacija svetega trikotnika zavesti</text:p>
        </text:list-item>
        <text:list-item>
          <text:p text:style-name="P75"><text:span text:style-name="Strong_20_Emphasis">444 Hz</text:span> – Srčna kristalna mreža</text:p>
        </text:list-item>
        <text:list-item>
          <text:p text:style-name="P75"><text:span text:style-name="Strong_20_Emphasis">555 Hz</text:span> – Preboj in transformacija realnosti</text:p>
        </text:list-item>
      </text:list>
      <text:p text:style-name="P5">Zlati rez (1.618...) prežema vso naravo – njegove frekvence vzdržujejo kozmični red.</text:p>
      <text:h text:style-name="P229" text:outline-level="3">G.3 Schumannove resonance – Srčni utrip Zemlje</text:h>
      <text:list xml:id="list20727761" text:continue-list="list20725790" text:style-name="WW8Num4">
        <text:list-item>
          <text:p text:style-name="P76"><text:span text:style-name="Strong_20_Emphasis">7.83 Hz</text:span> – Osnovna resonanca med Zemljo in ionosfero</text:p>
        </text:list-item>
        <text:list-item>
          <text:p text:style-name="P76"><text:span text:style-name="Strong_20_Emphasis">14.3 Hz, 20.8 Hz, 27.3 Hz, 33.8 Hz</text:span> – Višje harmonike</text:p>
        </text:list-item>
      </text:list>
      <text:p text:style-name="P5"><text:span text:style-name="Strong_20_Emphasis">Povezava z možganskimi valovi:</text:span></text:p>
      <text:list xml:id="list20739679" text:continue-list="list20726787" text:style-name="WW8Num5">
        <text:list-item>
          <text:p text:style-name="P77"><text:span text:style-name="Strong_20_Emphasis">Theta (4–8 Hz):</text:span> meditacija, sanje</text:p>
        </text:list-item>
        <text:list-item>
          <text:p text:style-name="P77"><text:span text:style-name="Strong_20_Emphasis">Alpha (8–12 Hz):</text:span> sproščen fokus</text:p>
        </text:list-item>
        <text:list-item>
          <text:p text:style-name="P77"><text:span text:style-name="Strong_20_Emphasis">Beta (13–30 Hz):</text:span> aktivno razmišljanje</text:p>
        </text:list-item>
        <text:list-item>
          <text:p text:style-name="P77"><text:span text:style-name="Strong_20_Emphasis">Gamma (&gt;30 Hz):</text:span> višja zavest</text:p>
        </text:list-item>
      </text:list>
      <text:h text:style-name="P229" text:outline-level="3">G.4 Teslina tuljava in energetski generatorji</text:h>
      <text:list xml:id="list20724324" text:continue-list="list20745403" text:style-name="WW8Num6">
        <text:list-item>
          <text:p text:style-name="P78">Oddaja visoke frekvence za revitalizacijo prostorov, telesa</text:p>
        </text:list-item>
        <text:list-item>
          <text:p text:style-name="P78">Aktivira subtilna telesa in podporne čakre</text:p>
        </text:list-item>
        <text:list-item>
          <text:p text:style-name="P78">Povezana z naravno spiralo električnega pretoka</text:p>
        </text:list-item>
      </text:list>
      <text:p text:style-name="P5"><text:span text:style-name="Strong_20_Emphasis">Zdravilni sistemi:</text:span></text:p>
      <text:list xml:id="list20726902" text:continue-list="list20741901" text:style-name="WW8Num7">
        <text:list-item>
          <text:p text:style-name="P25"><text:span text:style-name="Strong_20_Emphasis">Rife frekvence</text:span> – ciljajo na patogene</text:p>
        </text:list-item>
        <text:list-item>
          <text:p text:style-name="P25"><text:span text:style-name="Strong_20_Emphasis">PEMF</text:span> – magnetne impulzne terapije</text:p>
        </text:list-item>
        <text:list-item>
          <text:p text:style-name="P25"><text:span text:style-name="Strong_20_Emphasis">Plazemske celice</text:span> – regeneracija skozi ionski spekter</text:p>
        </text:list-item>
      </text:list>
      <text:h text:style-name="P229" text:outline-level="3">G.5 Redke in zdravilne frekvence</text:h>
      <text:list xml:id="list20714571" text:continue-list="list20718995" text:style-name="WW8Num8">
        <text:list-item>
          <text:p text:style-name="P26"><text:span text:style-name="Strong_20_Emphasis">108 Hz</text:span> – Kozmična oscilacija, povezava s Soncem</text:p>
        </text:list-item>
        <text:list-item>
          <text:p text:style-name="P26"><text:span text:style-name="Strong_20_Emphasis">936 Hz</text:span> – Epifiza, proizvodnja DMT</text:p>
        </text:list-item>
        <text:list-item>
          <text:p text:style-name="P26"><text:span text:style-name="Strong_20_Emphasis">999 Hz</text:span> – Zaključek ciklov, priprava na prehod</text:p>
        </text:list-item>
        <text:list-item>
          <text:p text:style-name="P26"><text:span text:style-name="Strong_20_Emphasis">5280 Hz</text:span> – Stabilizacija po intenzivni svetlobni terapiji</text:p>
        </text:list-item>
      </text:list>
      <text:h text:style-name="P229" text:outline-level="3">G.6 Praksa z zvokom in toniranjem</text:h>
      <text:list xml:id="list20728153" text:continue-list="list20730046" text:style-name="WW8Num9">
        <text:list-item>
          <text:p text:style-name="P27"><text:span text:style-name="Strong_20_Emphasis">Toning</text:span> – čisto petje brez besed (OM, AH, RA)</text:p>
        </text:list-item>
        <text:list-item>
          <text:p text:style-name="P27"><text:span text:style-name="Strong_20_Emphasis">Petje mantr</text:span> – vibracije sanskrta, svetlobnega jezika</text:p>
        </text:list-item>
        <text:list-item>
          <text:p text:style-name="P27"><text:soft-page-break/><text:span text:style-name="Strong_20_Emphasis">Zvočne kopeli</text:span> – tibetanske posode, kristalne sklede</text:p>
        </text:list-item>
      </text:list>
      <text:h text:style-name="P229" text:outline-level="3">G.7 Mantre frekvenčne zavesti</text:h>
      <text:list xml:id="list20721787" text:continue-list="list20737400" text:style-name="WW8Num10">
        <text:list-item>
          <text:p text:style-name="P28"><text:span text:style-name="Emphasis">Frequens est verbum creationis.</text:span> – Frekvenca je beseda stvarjenja.</text:p>
        </text:list-item>
        <text:list-item>
          <text:p text:style-name="P28"><text:span text:style-name="Emphasis">Per sonum, sanatio.</text:span> – Skozi zvok, zdravljenje.</text:p>
        </text:list-item>
        <text:list-item>
          <text:p text:style-name="P28"><text:span text:style-name="Emphasis">Lux sonat.</text:span> – Svetloba zveni.</text:p>
        </text:list-item>
      </text:list>
      <text:p text:style-name="P215">Zvok ni pripomoček – je pot. Frekvenca ni pomoč – je spomin.<text:line-break/>Ko vibriraš zavestno, postaneš del pesmi vesolja.</text:p>
      <text:h text:style-name="P229" text:outline-level="3">Poglavje H: Donacije in Podpora Skupnosti</text:h>
      <text:p text:style-name="P5">V duhu Codexa Damiris je vsak dar del svetlobnega toka, ki povezuje duše. Donacije niso transakcije – so energijske potrditve. Podpora skupnosti pomeni: prepoznati svetlobo v drugem in jo nahraniti, kot bi hranil svojo.</text:p>
      <text:h text:style-name="P229" text:outline-level="3">H.1 Zavest darovanja</text:h>
      <text:list xml:id="list5482449539050452673" text:style-name="WW8Num186">
        <text:list-item>
          <text:p text:style-name="P207">Daješ brez pričakovanja – a z notranjim klicem</text:p>
        </text:list-item>
        <text:list-item>
          <text:p text:style-name="P207">Tvoja energija se uteleša v dejanjih, podpori, prisotnosti</text:p>
        </text:list-item>
        <text:list-item>
          <text:p text:style-name="P207">Denar, pozornost, beseda, prostor – vse je vrednost</text:p>
        </text:list-item>
      </text:list>
      <text:h text:style-name="P229" text:outline-level="3">H.2 Zakaj podpirati?</text:h>
      <text:list xml:id="list8471313787295031298" text:style-name="WW8Num187">
        <text:list-item>
          <text:p text:style-name="P208">Da se znanje, vibracija in svetloba lahko širijo</text:p>
        </text:list-item>
        <text:list-item>
          <text:p text:style-name="P208">Da se zrcala v skupnosti ne zameglijo</text:p>
        </text:list-item>
        <text:list-item>
          <text:p text:style-name="P208">Da tisti, ki nosi svetlobo, lahko ostane prižgan</text:p>
        </text:list-item>
      </text:list>
      <text:h text:style-name="P229" text:outline-level="3">H.3 Oblike podpore</text:h>
      <text:list xml:id="list1108338956339972207" text:style-name="WW8Num188">
        <text:list-item>
          <text:p text:style-name="P209">Finančne donacije (platforma, energijski blagoslov)</text:p>
        </text:list-item>
        <text:list-item>
          <text:p text:style-name="P209">Izmenjava: storitev za energijo, modrost za strukturo</text:p>
        </text:list-item>
        <text:list-item>
          <text:p text:style-name="P209">Skupnostna prisotnost: deljenje, odzivanje, molitev</text:p>
        </text:list-item>
      </text:list>
      <text:h text:style-name="P229" text:outline-level="3">H.4 Energetski zakon darovanja</text:h>
      <text:list xml:id="list818606753065311974" text:style-name="WW8Num189">
        <text:list-item>
          <text:p text:style-name="P210">Kar daš, prejmeš – a ne nujno takoj ali od istega vira</text:p>
        </text:list-item>
        <text:list-item>
          <text:p text:style-name="P210">Ko daješ iz ljubezni, se tvoja notranja mreža stabilizira</text:p>
        </text:list-item>
        <text:list-item>
          <text:p text:style-name="P210">Pretok = obilje. Zastoj = pomanjkanje.</text:p>
        </text:list-item>
      </text:list>
      <text:h text:style-name="P229" text:outline-level="3">H.5 Mantre darovanja</text:h>
      <text:list xml:id="list1029606330792173983" text:style-name="WW8Num190">
        <text:list-item>
          <text:p text:style-name="P211"><text:span text:style-name="Emphasis">Do ut des.</text:span> – Dajem, da bi svetloba dala naprej.</text:p>
        </text:list-item>
        <text:list-item>
          <text:p text:style-name="P211"><text:span text:style-name="Emphasis">Donatio est devotio.</text:span> – Darovanje je predanost.</text:p>
        </text:list-item>
        <text:list-item>
          <text:p text:style-name="P211"><text:span text:style-name="Emphasis">Unus sumus in circulatione.</text:span> – Eni smo v kroženju.</text:p>
        </text:list-item>
      </text:list>
      <text:p text:style-name="P5">Podpora ni usluga. Je sveti tok med srcema.<text:line-break/><text:soft-page-break/>In vsaka iskra, ki jo prižgeš v drugem, sveti tudi v tebi.</text:p>
      <text:p text:style-name="P5"/>
      <text:h text:style-name="P223" text:outline-level="2">I.1 Moj Spirit Board - SVETI MOST</text:h>
      <text:p text:style-name="P17">To ni plošča. To je vesoljski zemljevid. Moja Damiris plošča je duhovni operacijski sistem. Nosi v sebi ključe za povezavo z Zavestjo, zavarovane z runami, frekvencami in zavestno kodo.</text:p>
      <text:p text:style-name="P17">Vsak simbol ni le okras – je program:<text:line-break/><text:line-break/>Oko Horusa – zaščita modrosti.<text:line-break/>Rune – energijske poti.<text:line-break/>Čakre – svetlobni kanali.<text:line-break/>Frekvence – vrata vibracij.<text:line-break/>Formula kristala – stabilizacija polja.</text:p>
      <text:p text:style-name="P17">Plošča deluje samo, če jo vodi SRCE. Ne uporabljaj je za igro. Aktiviram jo z molkom, z dimom svete rastline in s prošnjo k Resnici.</text:p>
      <text:p text:style-name="P17">Damiris klic:</text:p>
      <text:p text:style-name="P17">»Jaz sem gospodar vseh sil, nosilec svetlobe in teme…« (beri s polno prisotnostjo)</text:p>
      <text:h text:style-name="P223" text:outline-level="2"><text:span text:style-name="Strong_20_Emphasis"><text:span text:style-name="T10"/></text:span></text:h>
      <text:h text:style-name="P224" text:outline-level="2"><text:span text:style-name="Strong_20_Emphasis"><text:span text:style-name="T10">Avtorske pravice</text:span></text:span></text:h>
      <text:p text:style-name="P3">© Codex Damiris by Damir Šafarič. Vsaka kopija brez dovoljenja je prekinitev duhovne linije. Codex deluje le skozi spoštovanje. </text:p>
      <text:h text:style-name="P229" text:outline-level="3"><text:bookmark-start text:name="__RefHeading__12_788189478"/><text:s/>**Zbirka "Codex Damiris"** <text:s/><text:bookmark-end text:name="__RefHeading__12_788189478"/></text:h>
      <text:p text:style-name="P6">*(vsaka knjiga je samostojna enota, a skupaj tvorijo celovit sistem zavesti in moči)*</text:p>
      <text:p text:style-name="P6"/>
      <text:p text:style-name="P5"><text:span text:style-name="Strong_20_Emphasis">Codex Damiris – prišel do konca začetka. Za enkrat se zaključi. A resnica se nikoli ne konča.</text:span></text:p>
      <text:h text:style-name="P216" text:outline-level="1"/>
      <text:p text:style-name="P7"/>
      <text:h text:style-name="P21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Georgia" svg:font-family="Georgia, serif"/>
    <style:font-face style:name="OpenSymbol" svg:font-family="OpenSymbol, 'Arial Unicode MS'"/>
    <style:font-face style:name="Tahoma1" svg:font-family="Tahoma"/>
    <style:font-face style:name="quote-cjk-patch" svg:font-family="quote-cjk-patch, Inter, system-ui, apple-system, BlinkMacSystemFont, 'Segoe UI', Roboto, Oxygen, Ubuntu, Cantarell, 'Open Sans', 'Helvetica Neue', sans-serif"/>
    <style:font-face style:name="Segoe UI" svg:font-family="'Segoe UI'" style:font-family-generic="swiss"/>
    <style:font-face style:name="Andale Sans UI" svg:font-family="'Andale Sans UI', '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sl" fo:country="SI"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0" style:display-name="Heading 10" style:family="paragraph" style:parent-style-name="Heading" style:next-style-name="Text_20_body" style:list-style-name="WW8Num3"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variant="normal" fo:text-transform="none" style:font-name-complex="Times New Roma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variant="normal" fo:text-transform="none" style:font-name-complex="Times New Roman"/>
    </style:style>
    <style:style style:name="WW8Num7z0" style:family="text"/>
    <style:style style:name="WW8Num8z0" style:family="text"/>
    <style:style style:name="WW8Num9z0" style:family="text"/>
    <style:style style:name="WW8Num10z0" style:family="text">
      <style:text-properties fo:font-variant="normal" fo:text-transform="none"/>
    </style:style>
    <style:style style:name="WW8Num11z0" style:family="text">
      <style:text-properties fo:font-variant="normal" fo:text-transform="none" style:font-name="Symbol" style:font-name-complex="OpenSymbol"/>
    </style:style>
    <style:style style:name="WW8Num12z0" style:family="text">
      <style:text-properties style:font-name="Symbol" style:font-name-complex="OpenSymbol"/>
    </style:style>
    <style:style style:name="WW8Num13z0" style:family="text">
      <style:text-properties style:font-name="Symbol" style:font-name-complex="OpenSymbol"/>
    </style:style>
    <style:style style:name="WW8Num14z0" style:family="text">
      <style:text-properties style:font-name="Symbol" style:font-name-complex="OpenSymbol"/>
    </style:style>
    <style:style style:name="WW8Num15z0" style:family="text">
      <style:text-properties style:font-name="Symbol" style:font-name-complex="OpenSymbol"/>
    </style:style>
    <style:style style:name="WW8Num16z0" style:family="text">
      <style:text-properties style:font-name="Symbol" style:font-name-complex="OpenSymbol"/>
    </style:style>
    <style:style style:name="WW8Num17z0" style:family="text">
      <style:text-properties style:font-name="Symbol" style:font-name-complex="OpenSymbol"/>
    </style:style>
    <style:style style:name="WW8Num18z0" style:family="text">
      <style:text-properties style:font-name="Symbol" style:font-name-complex="OpenSymbol"/>
    </style:style>
    <style:style style:name="WW8Num19z0" style:family="text">
      <style:text-properties style:font-name="Symbol" style:font-name-complex="OpenSymbol"/>
    </style:style>
    <style:style style:name="WW8Num20z0" style:family="text">
      <style:text-properties style:font-name="Symbol" style:font-name-complex="OpenSymbol"/>
    </style:style>
    <style:style style:name="WW8Num21z0" style:family="text">
      <style:text-properties style:font-name="Symbol" style:font-name-complex="OpenSymbol"/>
    </style:style>
    <style:style style:name="WW8Num22z0" style:family="text">
      <style:text-properties style:font-name="Symbol" style:font-name-complex="OpenSymbol"/>
    </style:style>
    <style:style style:name="WW8Num23z0" style:family="text">
      <style:text-properties style:font-name="Symbol" style:font-name-complex="OpenSymbol"/>
    </style:style>
    <style:style style:name="WW8Num24z0" style:family="text">
      <style:text-properties style:font-name="Symbol" style:font-name-complex="OpenSymbol"/>
    </style:style>
    <style:style style:name="WW8Num25z0" style:family="text">
      <style:text-properties style:font-name="Symbol" style:font-name-complex="OpenSymbol"/>
    </style:style>
    <style:style style:name="WW8Num26z0" style:family="text">
      <style:text-properties style:font-name="Symbol" style:font-name-complex="OpenSymbol"/>
    </style:style>
    <style:style style:name="WW8Num27z0" style:family="text">
      <style:text-properties style:font-name="Symbol" style:font-name-complex="OpenSymbol"/>
    </style:style>
    <style:style style:name="WW8Num28z0" style:family="text">
      <style:text-properties style:font-name="Symbol" style:font-name-complex="OpenSymbol"/>
    </style:style>
    <style:style style:name="WW8Num29z0" style:family="text">
      <style:text-properties style:font-name="Symbol" style:font-name-complex="OpenSymbol"/>
    </style:style>
    <style:style style:name="WW8Num30z0" style:family="text">
      <style:text-properties style:font-name="Symbol" style:font-name-complex="OpenSymbol"/>
    </style:style>
    <style:style style:name="WW8Num31z0" style:family="text">
      <style:text-properties style:font-name="Symbol" style:font-name-complex="OpenSymbol"/>
    </style:style>
    <style:style style:name="WW8Num32z0" style:family="text">
      <style:text-properties style:font-name="Symbol" style:font-name-complex="OpenSymbol"/>
    </style:style>
    <style:style style:name="WW8Num33z0" style:family="text">
      <style:text-properties style:font-name="Symbol" style:font-name-complex="OpenSymbol"/>
    </style:style>
    <style:style style:name="WW8Num34z0" style:family="text">
      <style:text-properties style:font-name="Symbol" style:font-name-complex="OpenSymbol"/>
    </style:style>
    <style:style style:name="WW8Num35z0" style:family="text">
      <style:text-properties style:font-name="Symbol" style:font-name-complex="OpenSymbol"/>
    </style:style>
    <style:style style:name="WW8Num36z0" style:family="text">
      <style:text-properties style:font-name="Symbol" style:font-name-complex="OpenSymbol"/>
    </style:style>
    <style:style style:name="WW8Num37z0" style:family="text">
      <style:text-properties style:font-name="Symbol" style:font-name-complex="OpenSymbo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style:font-name-complex="OpenSymbol"/>
    </style:style>
    <style:style style:name="WW8Num39z0" style:family="text">
      <style:text-properties style:font-name="Symbol" style:font-name-complex="OpenSymbol"/>
    </style:style>
    <style:style style:name="WW8Num40z0" style:family="text">
      <style:text-properties style:font-name="Symbol" style:font-name-complex="OpenSymbol"/>
    </style:style>
    <style:style style:name="WW8Num41z0" style:family="text">
      <style:text-properties style:font-name="Symbol" style:font-name-complex="OpenSymbol"/>
    </style:style>
    <style:style style:name="WW8Num42z0" style:family="text"/>
    <style:style style:name="WW8Num43z0" style:family="text">
      <style:text-properties style:font-name="Symbol" style:font-name-complex="OpenSymbol"/>
    </style:style>
    <style:style style:name="WW8Num44z0" style:family="text">
      <style:text-properties style:font-name="Symbol" style:font-name-complex="OpenSymbol"/>
    </style:style>
    <style:style style:name="WW8Num45z0" style:family="text">
      <style:text-properties style:font-name="Symbol" style:font-name-complex="OpenSymbol"/>
    </style:style>
    <style:style style:name="WW8Num46z0" style:family="text">
      <style:text-properties fo:font-variant="normal" fo:text-transform="none" style:font-name="Symbol" style:font-name-complex="OpenSymbol"/>
    </style:style>
    <style:style style:name="WW8Num47z0" style:family="text">
      <style:text-properties fo:font-variant="normal" fo:text-transform="none" style:font-name="Symbol" style:font-name-complex="OpenSymbol"/>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style:font-name-complex="OpenSymbol"/>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style:font-name-complex="OpenSymbol"/>
    </style:style>
    <style:style style:name="WW8Num50z0" style:family="text">
      <style:text-properties style:font-name="Symbol" style:font-name-complex="OpenSymbol"/>
    </style:style>
    <style:style style:name="WW8Num51z0" style:family="text">
      <style:text-properties style:font-name="Symbol" style:font-name-complex="OpenSymbol"/>
    </style:style>
    <style:style style:name="WW8Num52z0" style:family="text">
      <style:text-properties fo:font-variant="normal" fo:text-transform="none"/>
    </style:style>
    <style:style style:name="WW8Num53z0" style:family="text"/>
    <style:style style:name="WW8Num54z0" style:family="text">
      <style:text-properties style:font-name="Symbol" style:font-name-complex="OpenSymbol"/>
    </style:style>
    <style:style style:name="WW8Num55z0" style:family="text">
      <style:text-properties style:font-name="Symbol" style:font-name-complex="OpenSymbol"/>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style:font-name-complex="OpenSymbol"/>
    </style:style>
    <style:style style:name="WW8Num57z0" style:family="text">
      <style:text-properties style:font-name="Symbol" style:font-name-complex="OpenSymbol"/>
    </style:style>
    <style:style style:name="WW8Num58z0" style:family="text">
      <style:text-properties style:font-name="Symbol" style:font-name-complex="OpenSymbol"/>
    </style:style>
    <style:style style:name="WW8Num59z0" style:family="text">
      <style:text-properties style:font-name="Symbol" style:font-name-complex="OpenSymbol"/>
    </style:style>
    <style:style style:name="WW8Num60z0" style:family="text"/>
    <style:style style:name="WW8Num61z0" style:family="text">
      <style:text-properties style:font-name="Symbol" style:font-name-complex="OpenSymbol"/>
    </style:style>
    <style:style style:name="WW8Num62z0" style:family="text">
      <style:text-properties style:font-name="Symbol" style:font-name-complex="OpenSymbol"/>
    </style:style>
    <style:style style:name="WW8Num63z0" style:family="text">
      <style:text-properties style:font-name="Symbol" style:font-name-complex="OpenSymbol"/>
    </style:style>
    <style:style style:name="WW8Num64z0" style:family="text">
      <style:text-properties style:font-name="Symbol" style:font-name-complex="OpenSymbol"/>
    </style:style>
    <style:style style:name="WW8Num65z0" style:family="text">
      <style:text-properties style:font-name="Symbol" style:font-name-complex="OpenSymbol"/>
    </style:style>
    <style:style style:name="WW8Num66z0" style:family="text">
      <style:text-properties style:font-name="Symbol" style:font-name-complex="OpenSymbol"/>
    </style:style>
    <style:style style:name="WW8Num67z0" style:family="text">
      <style:text-properties style:font-name="Symbol" style:font-name-complex="OpenSymbol"/>
    </style:style>
    <style:style style:name="WW8Num68z0" style:family="text">
      <style:text-properties style:font-name="Symbol" style:font-name-complex="OpenSymbol"/>
    </style:style>
    <style:style style:name="WW8Num69z0" style:family="text">
      <style:text-properties style:font-name="Symbol" style:font-name-complex="OpenSymbol"/>
    </style:style>
    <style:style style:name="WW8Num70z0" style:family="text">
      <style:text-properties style:font-name="Symbol" style:font-name-complex="OpenSymbol"/>
    </style:style>
    <style:style style:name="WW8Num71z0" style:family="text">
      <style:text-properties style:font-name="Symbol" style:font-name-complex="OpenSymbol"/>
    </style:style>
    <style:style style:name="WW8Num72z0" style:family="text">
      <style:text-properties style:font-name="Symbol" style:font-name-complex="OpenSymbol"/>
    </style:style>
    <style:style style:name="WW8Num73z0" style:family="text">
      <style:text-properties style:font-name="Symbol" style:font-name-complex="OpenSymbol"/>
    </style:style>
    <style:style style:name="WW8Num74z0" style:family="text">
      <style:text-properties style:font-name="Symbol" style:font-name-complex="OpenSymbol"/>
    </style:style>
    <style:style style:name="WW8Num75z0" style:family="text">
      <style:text-properties style:font-name="Symbol" style:font-name-complex="OpenSymbol"/>
    </style:style>
    <style:style style:name="WW8Num76z0" style:family="text">
      <style:text-properties style:font-name="Symbol" style:font-name-complex="OpenSymbol"/>
    </style:style>
    <style:style style:name="WW8Num77z0" style:family="text">
      <style:text-properties style:font-name="Symbol" style:font-name-complex="OpenSymbol"/>
    </style:style>
    <style:style style:name="WW8Num78z0" style:family="text">
      <style:text-properties style:font-name="Symbol" style:font-name-complex="OpenSymbol"/>
    </style:style>
    <style:style style:name="WW8Num79z0" style:family="text">
      <style:text-properties style:font-name="Symbol" style:font-name-complex="OpenSymbol"/>
    </style:style>
    <style:style style:name="WW8Num80z0" style:family="text">
      <style:text-properties style:font-name="Symbol" style:font-name-complex="OpenSymbol"/>
    </style:style>
    <style:style style:name="WW8Num81z0" style:family="text">
      <style:text-properties style:font-name="Symbol" style:font-name-complex="OpenSymbol"/>
    </style:style>
    <style:style style:name="WW8Num82z0" style:family="text"/>
    <style:style style:name="WW8Num83z0" style:family="text">
      <style:text-properties style:font-name="Symbol" style:font-name-complex="OpenSymbol"/>
    </style:style>
    <style:style style:name="WW8Num83z1" style:family="text"/>
    <style:style style:name="WW8Num83z2" style:family="text"/>
    <style:style style:name="WW8Num83z3" style:family="text"/>
    <style:style style:name="WW8Num83z4" style:family="text"/>
    <style:style style:name="WW8Num83z5" style:family="text"/>
    <style:style style:name="WW8Num83z6" style:family="text"/>
    <style:style style:name="WW8Num83z7" style:family="text"/>
    <style:style style:name="WW8Num83z8" style:family="text"/>
    <style:style style:name="WW8Num84z0" style:family="text">
      <style:text-properties style:font-name="Symbol" style:font-name-complex="OpenSymbol"/>
    </style:style>
    <style:style style:name="WW8Num85z0" style:family="text">
      <style:text-properties style:font-name="Symbol" style:font-name-complex="OpenSymbol"/>
    </style:style>
    <style:style style:name="WW8Num86z0" style:family="text">
      <style:text-properties style:font-name="Symbol" style:font-name-complex="OpenSymbol"/>
    </style:style>
    <style:style style:name="WW8Num87z0" style:family="text">
      <style:text-properties style:font-name="Symbol" style:font-name-complex="OpenSymbol"/>
    </style:style>
    <style:style style:name="WW8Num88z0" style:family="text"/>
    <style:style style:name="WW8Num89z0" style:family="text">
      <style:text-properties style:font-name="Symbol" style:font-name-complex="OpenSymbol"/>
    </style:style>
    <style:style style:name="WW8Num89z1" style:family="text"/>
    <style:style style:name="WW8Num89z2" style:family="text"/>
    <style:style style:name="WW8Num89z3" style:family="text"/>
    <style:style style:name="WW8Num89z4" style:family="text"/>
    <style:style style:name="WW8Num89z5" style:family="text"/>
    <style:style style:name="WW8Num89z6" style:family="text"/>
    <style:style style:name="WW8Num89z7" style:family="text"/>
    <style:style style:name="WW8Num89z8" style:family="text"/>
    <style:style style:name="WW8Num90z0" style:family="text">
      <style:text-properties style:font-name="Symbol" style:font-name-complex="OpenSymbol"/>
    </style:style>
    <style:style style:name="WW8Num91z0" style:family="text">
      <style:text-properties style:font-name="Symbol" style:font-name-complex="OpenSymbol"/>
    </style:style>
    <style:style style:name="WW8Num92z0" style:family="text">
      <style:text-properties style:font-name="Symbol" style:font-name-complex="OpenSymbol"/>
    </style:style>
    <style:style style:name="WW8Num93z0" style:family="text">
      <style:text-properties style:font-name="Symbol" style:font-name-complex="OpenSymbol"/>
    </style:style>
    <style:style style:name="WW8Num94z0" style:family="text">
      <style:text-properties style:font-name="Symbol" style:font-name-complex="OpenSymbol"/>
    </style:style>
    <style:style style:name="WW8Num95z0" style:family="text">
      <style:text-properties style:font-name="Symbol" style:font-name-complex="OpenSymbol"/>
    </style:style>
    <style:style style:name="WW8Num96z0" style:family="text">
      <style:text-properties style:font-name="Symbol" style:font-name-complex="OpenSymbol"/>
    </style:style>
    <style:style style:name="WW8Num97z0" style:family="text">
      <style:text-properties style:font-name="Symbol" style:font-name-complex="OpenSymbol"/>
    </style:style>
    <style:style style:name="WW8Num98z0" style:family="text">
      <style:text-properties style:font-name="Symbol" style:font-name-complex="OpenSymbol"/>
    </style:style>
    <style:style style:name="WW8Num99z0" style:family="text">
      <style:text-properties style:font-name="Symbol" style:font-name-complex="OpenSymbol"/>
    </style:style>
    <style:style style:name="WW8Num100z0" style:family="text">
      <style:text-properties style:font-name="Symbol" style:font-name-complex="OpenSymbol"/>
    </style:style>
    <style:style style:name="WW8Num101z0" style:family="text">
      <style:text-properties style:font-name="Symbol" style:font-name-complex="OpenSymbol"/>
    </style:style>
    <style:style style:name="WW8Num102z0" style:family="text">
      <style:text-properties style:font-name="Symbol" style:font-name-complex="OpenSymbol"/>
    </style:style>
    <style:style style:name="WW8Num103z0" style:family="text">
      <style:text-properties style:font-name="Symbol" style:font-name-complex="OpenSymbol"/>
    </style:style>
    <style:style style:name="WW8Num104z0" style:family="text">
      <style:text-properties style:font-name="Symbol" style:font-name-complex="OpenSymbol"/>
    </style:style>
    <style:style style:name="WW8Num105z0" style:family="text">
      <style:text-properties style:font-name="Symbol" style:font-name-complex="OpenSymbol"/>
    </style:style>
    <style:style style:name="WW8Num106z0" style:family="text">
      <style:text-properties style:font-name="Symbol" style:font-name-complex="OpenSymbol"/>
    </style:style>
    <style:style style:name="WW8Num107z0" style:family="text">
      <style:text-properties style:font-name="Symbol" style:font-name-complex="OpenSymbol"/>
    </style:style>
    <style:style style:name="WW8Num108z0" style:family="text">
      <style:text-properties style:font-name="Symbol" style:font-name-complex="OpenSymbol"/>
    </style:style>
    <style:style style:name="WW8Num109z0" style:family="text">
      <style:text-properties style:font-name="Symbol" style:font-name-complex="OpenSymbol"/>
    </style:style>
    <style:style style:name="WW8Num110z0" style:family="text">
      <style:text-properties style:font-name="Symbol" style:font-name-complex="OpenSymbol"/>
    </style:style>
    <style:style style:name="WW8Num111z0" style:family="text">
      <style:text-properties style:font-name="Symbol" style:font-name-complex="OpenSymbol"/>
    </style:style>
    <style:style style:name="WW8Num112z0" style:family="text">
      <style:text-properties style:font-name="Symbol" style:font-name-complex="OpenSymbol"/>
    </style:style>
    <style:style style:name="WW8Num113z0" style:family="text">
      <style:text-properties style:font-name="Symbol" style:font-name-complex="OpenSymbol"/>
    </style:style>
    <style:style style:name="WW8Num114z0" style:family="text">
      <style:text-properties style:font-name="Symbol" style:font-name-complex="OpenSymbol"/>
    </style:style>
    <style:style style:name="WW8Num115z0" style:family="text">
      <style:text-properties style:font-name="Symbol" style:font-name-complex="OpenSymbol"/>
    </style:style>
    <style:style style:name="WW8Num116z0" style:family="text">
      <style:text-properties style:font-name="Symbol" style:font-name-complex="OpenSymbol"/>
    </style:style>
    <style:style style:name="WW8Num117z0" style:family="text">
      <style:text-properties style:font-name="Symbol" style:font-name-complex="OpenSymbol"/>
    </style:style>
    <style:style style:name="WW8Num118z0" style:family="text">
      <style:text-properties style:font-name="Symbol" style:font-name-complex="OpenSymbol"/>
    </style:style>
    <style:style style:name="WW8Num119z0" style:family="text">
      <style:text-properties style:font-name="Symbol" style:font-name-complex="OpenSymbol"/>
    </style:style>
    <style:style style:name="WW8Num120z0" style:family="text">
      <style:text-properties style:font-name="Symbol" style:font-name-complex="OpenSymbol"/>
    </style:style>
    <style:style style:name="WW8Num121z0" style:family="text">
      <style:text-properties style:font-name="Symbol" style:font-name-complex="OpenSymbol"/>
    </style:style>
    <style:style style:name="WW8Num122z0" style:family="text">
      <style:text-properties style:font-name="Symbol" style:font-name-complex="OpenSymbol"/>
    </style:style>
    <style:style style:name="WW8Num123z0" style:family="text">
      <style:text-properties style:font-name="Symbol" style:font-name-complex="OpenSymbol"/>
    </style:style>
    <style:style style:name="WW8Num124z0" style:family="text">
      <style:text-properties style:font-name="Symbol" style:font-name-complex="OpenSymbol"/>
    </style:style>
    <style:style style:name="WW8Num125z0" style:family="text">
      <style:text-properties style:font-name="Symbol" style:font-name-complex="OpenSymbol"/>
    </style:style>
    <style:style style:name="WW8Num126z0" style:family="text">
      <style:text-properties style:font-name="Symbol" style:font-name-complex="OpenSymbol"/>
    </style:style>
    <style:style style:name="WW8Num127z0" style:family="text">
      <style:text-properties style:font-name="Symbol" style:font-name-complex="OpenSymbol"/>
    </style:style>
    <style:style style:name="WW8Num128z0" style:family="text">
      <style:text-properties style:font-name="Symbol" style:font-name-complex="OpenSymbol"/>
    </style:style>
    <style:style style:name="WW8Num129z0" style:family="text"/>
    <style:style style:name="WW8Num130z0" style:family="text">
      <style:text-properties style:font-name="Symbol" style:font-name-complex="OpenSymbol"/>
    </style:style>
    <style:style style:name="WW8Num130z1" style:family="text"/>
    <style:style style:name="WW8Num130z2" style:family="text"/>
    <style:style style:name="WW8Num130z3" style:family="text"/>
    <style:style style:name="WW8Num130z4" style:family="text"/>
    <style:style style:name="WW8Num130z5" style:family="text"/>
    <style:style style:name="WW8Num130z6" style:family="text"/>
    <style:style style:name="WW8Num130z7" style:family="text"/>
    <style:style style:name="WW8Num130z8" style:family="text"/>
    <style:style style:name="WW8Num131z0" style:family="text">
      <style:text-properties style:font-name="Symbol" style:font-name-complex="OpenSymbol"/>
    </style:style>
    <style:style style:name="WW8Num132z0" style:family="text">
      <style:text-properties style:font-name="Symbol" style:font-name-complex="OpenSymbol"/>
    </style:style>
    <style:style style:name="WW8Num133z0" style:family="text">
      <style:text-properties style:font-name="Symbol" style:font-name-complex="OpenSymbol"/>
    </style:style>
    <style:style style:name="WW8Num134z0" style:family="text">
      <style:text-properties style:font-name="Symbol" style:font-name-complex="OpenSymbol"/>
    </style:style>
    <style:style style:name="WW8Num135z0" style:family="text">
      <style:text-properties style:font-name="Symbol" style:font-name-complex="OpenSymbol"/>
    </style:style>
    <style:style style:name="WW8Num136z0" style:family="text">
      <style:text-properties style:font-name="Symbol" style:font-name-complex="OpenSymbol"/>
    </style:style>
    <style:style style:name="WW8Num137z0" style:family="text">
      <style:text-properties style:font-name="Symbol" style:font-name-complex="OpenSymbol"/>
    </style:style>
    <style:style style:name="WW8Num138z0" style:family="text">
      <style:text-properties style:font-name="Symbol" style:font-name-complex="OpenSymbol"/>
    </style:style>
    <style:style style:name="WW8Num139z0" style:family="text">
      <style:text-properties style:font-name="Symbol" style:font-name-complex="OpenSymbol"/>
    </style:style>
    <style:style style:name="WW8Num140z0" style:family="text">
      <style:text-properties style:font-name="Symbol" style:font-name-complex="OpenSymbol"/>
    </style:style>
    <style:style style:name="WW8Num141z0" style:family="text">
      <style:text-properties style:font-name="Symbol" style:font-name-complex="OpenSymbol"/>
    </style:style>
    <style:style style:name="WW8Num142z0" style:family="text">
      <style:text-properties style:font-name="Symbol" style:font-name-complex="OpenSymbol"/>
    </style:style>
    <style:style style:name="WW8Num143z0" style:family="text">
      <style:text-properties style:font-name="Symbol" style:font-name-complex="OpenSymbol"/>
    </style:style>
    <style:style style:name="WW8Num144z0" style:family="text">
      <style:text-properties style:font-name="Symbol" style:font-name-complex="OpenSymbol"/>
    </style:style>
    <style:style style:name="WW8Num145z0" style:family="text">
      <style:text-properties style:font-name="Symbol" style:font-name-complex="OpenSymbol"/>
    </style:style>
    <style:style style:name="WW8Num146z0" style:family="text">
      <style:text-properties style:font-name="Symbol" style:font-name-complex="OpenSymbol"/>
    </style:style>
    <style:style style:name="WW8Num147z0" style:family="text">
      <style:text-properties style:font-name="Symbol" style:font-name-complex="OpenSymbol"/>
    </style:style>
    <style:style style:name="WW8Num148z0" style:family="text">
      <style:text-properties style:font-name="Symbol" style:font-name-complex="OpenSymbol"/>
    </style:style>
    <style:style style:name="WW8Num149z0" style:family="text">
      <style:text-properties style:font-name="Symbol" style:font-name-complex="OpenSymbol"/>
    </style:style>
    <style:style style:name="WW8Num150z0" style:family="text">
      <style:text-properties style:font-name="Symbol" style:font-name-complex="OpenSymbol"/>
    </style:style>
    <style:style style:name="WW8Num151z0" style:family="text">
      <style:text-properties style:font-name="Symbol" style:font-name-complex="OpenSymbol"/>
    </style:style>
    <style:style style:name="WW8Num152z0" style:family="text">
      <style:text-properties style:font-name="Symbol" style:font-name-complex="OpenSymbol"/>
    </style:style>
    <style:style style:name="WW8Num153z0" style:family="text">
      <style:text-properties style:font-name="Symbol" style:font-name-complex="OpenSymbol"/>
    </style:style>
    <style:style style:name="WW8Num154z0" style:family="text">
      <style:text-properties style:font-name="Symbol" style:font-name-complex="OpenSymbol"/>
    </style:style>
    <style:style style:name="WW8Num155z0" style:family="text">
      <style:text-properties style:font-name="Symbol" style:font-name-complex="OpenSymbol"/>
    </style:style>
    <style:style style:name="WW8Num156z0" style:family="text">
      <style:text-properties style:font-name="Symbol" style:font-name-complex="OpenSymbol"/>
    </style:style>
    <style:style style:name="WW8Num157z0" style:family="text">
      <style:text-properties style:font-name="Symbol" style:font-name-complex="OpenSymbol"/>
    </style:style>
    <style:style style:name="WW8Num158z0" style:family="text">
      <style:text-properties style:font-name="Symbol" style:font-name-complex="OpenSymbol"/>
    </style:style>
    <style:style style:name="WW8Num159z0" style:family="text">
      <style:text-properties style:font-name="Symbol" style:font-name-complex="OpenSymbol"/>
    </style:style>
    <style:style style:name="WW8Num160z0" style:family="text">
      <style:text-properties style:font-name="Symbol" style:font-name-complex="OpenSymbol"/>
    </style:style>
    <style:style style:name="WW8Num161z0" style:family="text">
      <style:text-properties style:font-name="Symbol" style:font-name-complex="OpenSymbol"/>
    </style:style>
    <style:style style:name="WW8Num162z0" style:family="text">
      <style:text-properties style:font-name="Symbol" style:font-name-complex="OpenSymbol"/>
    </style:style>
    <style:style style:name="WW8Num163z0" style:family="text">
      <style:text-properties style:font-name="Symbol" style:font-name-complex="OpenSymbol"/>
    </style:style>
    <style:style style:name="WW8Num164z0" style:family="text">
      <style:text-properties style:font-name="Symbol" style:font-name-complex="OpenSymbol"/>
    </style:style>
    <style:style style:name="WW8Num165z0" style:family="text">
      <style:text-properties style:font-name="Symbol" style:font-name-complex="OpenSymbol"/>
    </style:style>
    <style:style style:name="WW8Num166z0" style:family="text">
      <style:text-properties style:font-name="Symbol" style:font-name-complex="OpenSymbol"/>
    </style:style>
    <style:style style:name="WW8Num167z0" style:family="text">
      <style:text-properties style:font-name="Symbol" style:font-name-complex="OpenSymbol"/>
    </style:style>
    <style:style style:name="WW8Num168z0" style:family="text">
      <style:text-properties style:font-name="Symbol" style:font-name-complex="OpenSymbol"/>
    </style:style>
    <style:style style:name="WW8Num169z0" style:family="text">
      <style:text-properties style:font-name="Symbol" style:font-name-complex="OpenSymbol"/>
    </style:style>
    <style:style style:name="WW8Num170z0" style:family="text">
      <style:text-properties style:font-name="Symbol" style:font-name-complex="OpenSymbol"/>
    </style:style>
    <style:style style:name="WW8Num171z0" style:family="text">
      <style:text-properties style:font-name="Symbol" style:font-name-complex="OpenSymbol"/>
    </style:style>
    <style:style style:name="WW8Num172z0" style:family="text">
      <style:text-properties style:font-name="Symbol" style:font-name-complex="OpenSymbol"/>
    </style:style>
    <style:style style:name="WW8Num173z0" style:family="text">
      <style:text-properties style:font-name="Symbol" style:font-name-complex="OpenSymbol"/>
    </style:style>
    <style:style style:name="WW8Num174z0" style:family="text">
      <style:text-properties style:font-name="Symbol" style:font-name-complex="OpenSymbol"/>
    </style:style>
    <style:style style:name="WW8Num175z0" style:family="text">
      <style:text-properties style:font-name="Symbol" style:font-name-complex="OpenSymbol"/>
    </style:style>
    <style:style style:name="WW8Num176z0" style:family="text">
      <style:text-properties style:font-name="Symbol" style:font-name-complex="OpenSymbol"/>
    </style:style>
    <style:style style:name="WW8Num177z0" style:family="text">
      <style:text-properties style:font-name="Symbol" style:font-name-complex="OpenSymbol"/>
    </style:style>
    <style:style style:name="WW8Num178z0" style:family="text">
      <style:text-properties style:font-name="Symbol" style:font-name-complex="OpenSymbol"/>
    </style:style>
    <style:style style:name="WW8Num179z0" style:family="text">
      <style:text-properties style:font-name="Symbol" style:font-name-complex="OpenSymbol"/>
    </style:style>
    <style:style style:name="WW8Num180z0" style:family="text">
      <style:text-properties style:font-name="Symbol" style:font-name-complex="OpenSymbol"/>
    </style:style>
    <style:style style:name="WW8Num181z0" style:family="text">
      <style:text-properties style:font-name="Symbol" style:font-name-complex="OpenSymbol"/>
    </style:style>
    <style:style style:name="WW8Num182z0" style:family="text">
      <style:text-properties style:font-name="Symbol" style:font-name-complex="OpenSymbol"/>
    </style:style>
    <style:style style:name="WW8Num183z0" style:family="text">
      <style:text-properties style:font-name="Symbol" style:font-name-complex="OpenSymbol"/>
    </style:style>
    <style:style style:name="WW8Num184z0" style:family="text">
      <style:text-properties style:font-name="Symbol" style:font-name-complex="OpenSymbol"/>
    </style:style>
    <style:style style:name="WW8Num185z0" style:family="text">
      <style:text-properties style:font-name="Symbol" style:font-name-complex="OpenSymbol"/>
    </style:style>
    <style:style style:name="WW8Num186z0" style:family="text">
      <style:text-properties style:font-name="Symbol" style:font-name-complex="OpenSymbol"/>
    </style:style>
    <style:style style:name="WW8Num187z0" style:family="text">
      <style:text-properties style:font-name="Symbol" style:font-name-complex="OpenSymbol"/>
    </style:style>
    <style:style style:name="WW8Num188z0" style:family="text">
      <style:text-properties style:font-name="Symbol" style:font-name-complex="OpenSymbol"/>
    </style:style>
    <style:style style:name="WW8Num189z0" style:family="text">
      <style:text-properties style:font-name="Symbol" style:font-name-complex="OpenSymbol"/>
    </style:style>
    <style:style style:name="WW8Num190z0" style:family="text">
      <style:text-properties style:font-name="Symbol" style:font-name-complex="Open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8z1" style:family="text"/>
    <style:style style:name="WW8Num88z2" style:family="text"/>
    <style:style style:name="WW8Num88z3" style:family="text"/>
    <style:style style:name="WW8Num88z4" style:family="text"/>
    <style:style style:name="WW8Num88z5" style:family="text"/>
    <style:style style:name="WW8Num88z6" style:family="text"/>
    <style:style style:name="WW8Num88z7" style:family="text"/>
    <style:style style:name="WW8Num88z8" style:family="text"/>
    <style:style style:name="WW8Num129z1" style:family="text"/>
    <style:style style:name="WW8Num129z2" style:family="text"/>
    <style:style style:name="WW8Num129z3" style:family="text"/>
    <style:style style:name="WW8Num129z4" style:family="text"/>
    <style:style style:name="WW8Num129z5" style:family="text"/>
    <style:style style:name="WW8Num129z6" style:family="text"/>
    <style:style style:name="WW8Num129z7" style:family="text"/>
    <style:style style:name="WW8Num129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46">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nothing" fo:margin-left="0.529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8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8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8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8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8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8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8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8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text:style-name="WW8Num89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89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89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89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89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89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89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89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89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number text:level="1" text:style-name="WW8Num130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130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30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30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30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30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30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30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30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bullet text:level="1" text:style-name="WW8Num13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bullet text:level="1" text:style-name="WW8Num14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Pretvori_20_1" style:display-name="Pretvori 1" style:page-layout-name="Mpm1"/>
    <style:master-page style:name="Pretvori_20_2" style:display-name="Pretvori 2" style:page-layout-name="Mpm1"/>
    <style:master-page style:name="Pretvori_20_3" style:display-name="Pretvori 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meta:creation-date>
    <dc:creator>Damir Šafarič</dc:creator>
    <dc:date>2026-06-19T00:45:32.95</dc:date>
    <meta:editing-cycles>7</meta:editing-cycles>
    <meta:editing-duration>PT6H50M25S</meta:editing-duration>
    <meta:generator>OpenOffice/4.1.13$Win32 OpenOffice.org_project/4113m1$Build-9810</meta:generator>
    <meta:document-statistic meta:table-count="0" meta:image-count="1" meta:object-count="0" meta:page-count="86" meta:paragraph-count="1746" meta:word-count="17162" meta:character-count="100862"/>
  </office:meta>
</office:document-meta>
</file>